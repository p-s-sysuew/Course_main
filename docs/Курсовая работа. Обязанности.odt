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B0000000A2721EAA1.png" manifest:media-type="image/png"/>
  <manifest:file-entry manifest:full-path="Pictures/100000010000000B0000000BEEBD0F60.png" manifest:media-type="image/png"/>
  <manifest:file-entry manifest:full-path="Pictures/100000010000000A0000000BBCEEB7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ext_20_body">
      <style:paragraph-properties fo:margin-left="0.012cm" fo:margin-right="0cm" fo:margin-top="0.369cm" fo:margin-bottom="0cm" style:contextual-spacing="false" fo:line-height="121%"/>
    </style:style>
    <style:style style:name="P2" style:family="paragraph" style:parent-style-name="Text_20_body">
      <style:paragraph-properties fo:margin-left="0cm" fo:margin-right="0cm" fo:margin-top="0.026cm" fo:margin-bottom="0cm" style:contextual-spacing="false"/>
    </style:style>
    <style:style style:name="P3" style:family="paragraph" style:parent-style-name="Text_20_body">
      <style:paragraph-properties fo:margin-left="0cm" fo:margin-right="0cm" fo:margin-top="0.026cm" fo:margin-bottom="0cm" style:contextual-spacing="false"/>
      <style:text-properties fo:font-weight="bold" fo:background-color="#81d41a" style:font-weight-asian="bold"/>
    </style:style>
    <style:style style:name="P4" style:family="paragraph" style:parent-style-name="Text_20_body">
      <style:paragraph-properties fo:margin-left="0cm" fo:margin-right="0cm" fo:margin-top="0.064cm" fo:margin-bottom="0cm" style:contextual-spacing="false"/>
      <style:text-properties fo:font-weight="bold" fo:background-color="#81d41a" style:font-weight-asian="bold"/>
    </style:style>
    <style:style style:name="P5" style:family="paragraph" style:parent-style-name="Text_20_body">
      <style:paragraph-properties fo:margin-left="0cm" fo:margin-right="0cm" fo:margin-top="0.028cm" fo:margin-bottom="0cm" style:contextual-spacing="false"/>
      <style:text-properties fo:font-weight="bold" fo:background-color="#ffb66c" style:font-weight-asian="bold"/>
    </style:style>
    <style:style style:name="P6" style:family="paragraph" style:parent-style-name="Text_20_body">
      <style:paragraph-properties fo:margin-left="2.358cm" fo:margin-right="0cm" fo:margin-top="0.002cm" fo:margin-bottom="0cm" style:contextual-spacing="false"/>
      <style:text-properties fo:background-color="#81d41a"/>
    </style:style>
    <style:style style:name="P7" style:family="paragraph" style:parent-style-name="Text_20_body">
      <style:paragraph-properties fo:margin-left="2.358cm" fo:margin-right="0cm" fo:margin-top="0.056cm" fo:margin-bottom="0cm" style:contextual-spacing="false"/>
      <style:text-properties fo:background-color="#81d41a"/>
    </style:style>
    <style:style style:name="P8" style:family="paragraph" style:parent-style-name="Text_20_body">
      <style:paragraph-properties fo:margin-left="2.358cm" fo:margin-right="0cm" fo:margin-top="0.035cm" fo:margin-bottom="0cm" style:contextual-spacing="false"/>
      <style:text-properties fo:background-color="#81d41a"/>
    </style:style>
    <style:style style:name="P9" style:family="paragraph" style:parent-style-name="Text_20_body">
      <style:paragraph-properties fo:margin-left="2.835cm" fo:margin-right="0cm" fo:margin-top="0.056cm" fo:margin-bottom="0cm" style:contextual-spacing="false"/>
      <style:text-properties fo:background-color="#81d41a"/>
    </style:style>
    <style:style style:name="P10" style:family="paragraph" style:parent-style-name="Text_20_body">
      <style:paragraph-properties fo:margin-left="0cm" fo:margin-right="0cm"/>
      <style:text-properties fo:background-color="#81d41a"/>
    </style:style>
    <style:style style:name="P11" style:family="paragraph" style:parent-style-name="Text_20_body">
      <style:paragraph-properties fo:margin-left="0.012cm" fo:margin-right="0.381cm" fo:margin-top="0.085cm" fo:margin-bottom="0cm" style:contextual-spacing="false" fo:line-height="115%" fo:text-align="justify" style:justify-single-word="false"/>
      <style:text-properties fo:background-color="#81d41a"/>
    </style:style>
    <style:style style:name="P12" style:family="paragraph" style:parent-style-name="Text_20_body">
      <style:paragraph-properties fo:margin-left="2.835cm" fo:margin-right="0.381cm" fo:line-height="113%" fo:text-indent="-0.476cm" style:auto-text-indent="false"/>
      <style:text-properties fo:background-color="#81d41a"/>
    </style:style>
    <style:style style:name="P13" style:family="paragraph" style:parent-style-name="Text_20_body">
      <style:paragraph-properties fo:margin-left="2.835cm" fo:margin-right="1.169cm" fo:margin-top="0.011cm" fo:margin-bottom="0cm" style:contextual-spacing="false" fo:line-height="113%" fo:text-indent="-0.476cm" style:auto-text-indent="false"/>
      <style:text-properties fo:background-color="#81d41a"/>
    </style:style>
    <style:style style:name="P14" style:family="paragraph" style:parent-style-name="Text_20_body">
      <style:paragraph-properties fo:margin-left="2.835cm" fo:margin-right="0cm" fo:margin-top="0.093cm" fo:margin-bottom="0cm" style:contextual-spacing="false" fo:line-height="113%" fo:text-indent="-0.476cm" style:auto-text-indent="false"/>
      <style:text-properties fo:background-color="#81d41a"/>
    </style:style>
    <style:style style:name="P15" style:family="paragraph" style:parent-style-name="Text_20_body">
      <style:paragraph-properties fo:margin-left="0.012cm" fo:margin-right="1.695cm" fo:line-height="113%"/>
      <style:text-properties fo:background-color="#81d41a"/>
    </style:style>
    <style:style style:name="P16" style:family="paragraph" style:parent-style-name="Text_20_body">
      <style:paragraph-properties fo:margin-left="0.012cm" fo:margin-right="0cm" fo:margin-top="0.056cm" fo:margin-bottom="0cm" style:contextual-spacing="false"/>
      <style:text-properties fo:background-color="#81d41a"/>
    </style:style>
    <style:style style:name="P17" style:family="paragraph" style:parent-style-name="Text_20_body">
      <style:paragraph-properties fo:margin-left="0.012cm" fo:margin-right="0cm" fo:margin-top="0.004cm" fo:margin-bottom="0cm" style:contextual-spacing="false"/>
      <style:text-properties fo:background-color="#81d41a"/>
    </style:style>
    <style:style style:name="P18" style:family="paragraph" style:parent-style-name="Text_20_body">
      <style:paragraph-properties fo:margin-left="0.012cm" fo:margin-right="0cm" fo:margin-top="0.056cm" fo:margin-bottom="0cm" style:contextual-spacing="false" fo:line-height="121%"/>
      <style:text-properties fo:background-color="#81d41a"/>
    </style:style>
    <style:style style:name="P19" style:family="paragraph" style:parent-style-name="Standard">
      <style:paragraph-properties fo:margin-left="0.012cm" fo:margin-right="0cm" fo:margin-top="0.355cm" fo:margin-bottom="0cm" style:contextual-spacing="false" fo:text-align="start" style:justify-single-word="false" fo:text-indent="0cm" style:auto-text-indent="false"/>
      <style:text-properties fo:background-color="#81d41a"/>
    </style:style>
    <style:style style:name="P20" style:family="paragraph" style:parent-style-name="Standard">
      <style:paragraph-properties fo:margin-left="0.012cm" fo:margin-right="0cm" fo:margin-top="0.353cm" fo:margin-bottom="0cm" style:contextual-spacing="false" fo:text-align="start" style:justify-single-word="false" fo:text-indent="0cm" style:auto-text-indent="false"/>
      <style:text-properties fo:background-color="#81d41a"/>
    </style:style>
    <style:style style:name="P21" style:family="paragraph" style:parent-style-name="Standard">
      <style:paragraph-properties fo:margin-left="0.012cm" fo:margin-right="0cm" fo:margin-top="0.058cm" fo:margin-bottom="0cm" style:contextual-spacing="false" fo:text-align="start" style:justify-single-word="false" fo:text-indent="0cm" style:auto-text-indent="false"/>
      <style:text-properties fo:background-color="#81d41a"/>
    </style:style>
    <style:style style:name="P22" style:family="paragraph" style:parent-style-name="Heading_20_3">
      <style:paragraph-properties fo:text-align="justify" style:justify-single-word="false"/>
      <style:text-properties fo:background-color="#81d41a"/>
    </style:style>
    <style:style style:name="P23" style:family="paragraph" style:parent-style-name="Text_20_body">
      <style:paragraph-properties fo:margin-left="0cm" fo:margin-right="0cm" fo:margin-top="0.028cm" fo:margin-bottom="0cm" style:contextual-spacing="false"/>
      <style:text-properties fo:font-style="italic" fo:background-color="#81d41a" style:font-style-asian="italic"/>
    </style:style>
    <style:style style:name="P24" style:family="paragraph" style:parent-style-name="Text_20_body">
      <style:paragraph-properties fo:margin-left="2.358cm" fo:margin-right="0cm" fo:margin-top="0.346cm" fo:margin-bottom="0cm" style:contextual-spacing="false"/>
      <style:text-properties fo:background-color="#ffb66c"/>
    </style:style>
    <style:style style:name="P25" style:family="paragraph" style:parent-style-name="Text_20_body">
      <style:paragraph-properties fo:margin-left="2.835cm" fo:margin-right="0cm" fo:margin-top="0.056cm" fo:margin-bottom="0cm" style:contextual-spacing="false"/>
      <style:text-properties fo:background-color="#ffb66c"/>
    </style:style>
    <style:style style:name="P26" style:family="paragraph" style:parent-style-name="Text_20_body">
      <style:paragraph-properties fo:margin-left="0cm" fo:margin-right="0cm" fo:margin-top="0.026cm" fo:margin-bottom="0cm" style:contextual-spacing="false"/>
      <style:text-properties fo:background-color="#ffb66c"/>
    </style:style>
    <style:style style:name="P27" style:family="paragraph" style:parent-style-name="Text_20_body">
      <style:paragraph-properties fo:margin-left="2.835cm" fo:margin-right="0.157cm" fo:margin-top="0.056cm" fo:margin-bottom="0cm" style:contextual-spacing="false" fo:line-height="116%" fo:text-align="justify" style:justify-single-word="false" fo:text-indent="-0.476cm" style:auto-text-indent="false"/>
      <style:text-properties fo:background-color="#ffb66c"/>
    </style:style>
    <style:style style:name="P28" style:family="paragraph" style:parent-style-name="Heading_20_3">
      <style:paragraph-properties fo:margin-top="0.386cm" fo:margin-bottom="0cm" style:contextual-spacing="false"/>
      <style:text-properties fo:background-color="#ffb66c"/>
    </style:style>
    <style:style style:name="P29" style:family="paragraph" style:parent-style-name="List_20_Paragraph">
      <style:paragraph-properties fo:margin-left="1.423cm" fo:margin-right="0.261cm" fo:margin-top="0cm" fo:margin-bottom="0cm" style:contextual-spacing="false" fo:line-height="121%" fo:text-align="start" style:justify-single-word="false" fo:text-indent="-0.476cm" style:auto-text-indent="false">
        <style:tab-stops>
          <style:tab-stop style:position="1.423cm"/>
        </style:tab-stops>
      </style:paragraph-properties>
      <style:text-properties officeooo:paragraph-rsid="001b3d6c" fo:background-color="#ffb66c"/>
    </style:style>
    <style:style style:name="P30" style:family="paragraph" style:parent-style-name="Text_20_body">
      <style:paragraph-properties fo:margin-left="0.012cm" fo:margin-right="0cm" fo:margin-top="0.321cm" fo:margin-bottom="0cm" style:contextual-spacing="false"/>
      <style:text-properties fo:background-color="#bf819e"/>
    </style:style>
    <style:style style:name="P31" style:family="paragraph" style:parent-style-name="Text_20_body">
      <style:paragraph-properties fo:margin-left="0cm" fo:margin-right="0cm" fo:margin-top="0.026cm" fo:margin-bottom="0cm" style:contextual-spacing="false"/>
      <style:text-properties fo:background-color="#bf819e"/>
    </style:style>
    <style:style style:name="P32" style:family="paragraph" style:parent-style-name="Text_20_body">
      <style:paragraph-properties fo:margin-left="0.012cm" fo:margin-right="0cm" fo:line-height="121%"/>
      <style:text-properties fo:background-color="#bf819e"/>
    </style:style>
    <style:style style:name="P33" style:family="paragraph" style:parent-style-name="Heading_20_2">
      <style:text-properties fo:color="#000000" loext:opacity="100%" fo:background-color="#81d41a"/>
    </style:style>
    <style:style style:name="P34" style:family="paragraph" style:parent-style-name="List_20_Paragraph">
      <style:paragraph-properties fo:margin-left="1.42cm" fo:margin-right="0cm" fo:margin-top="0.085cm" fo:margin-bottom="0cm" style:contextual-spacing="false" fo:line-height="100%" fo:text-align="start" style:justify-single-word="false" fo:text-indent="-0.561cm" style:auto-text-indent="false">
        <style:tab-stops>
          <style:tab-stop style:position="1.42cm"/>
        </style:tab-stops>
      </style:paragraph-properties>
      <style:text-properties fo:color="#000000" loext:opacity="100%" fo:background-color="#81d41a"/>
    </style:style>
    <style:style style:name="P35" style:family="paragraph" style:parent-style-name="Text_20_body">
      <style:paragraph-properties fo:margin-left="0cm" fo:margin-right="0cm" fo:margin-top="0.028cm" fo:margin-bottom="0cm" style:contextual-spacing="false"/>
      <style:text-properties fo:color="#000000" loext:opacity="100%" fo:font-weight="bold" fo:background-color="transparent" style:font-weight-asian="bold"/>
    </style:style>
    <style:style style:name="P36" style:family="paragraph" style:parent-style-name="Text_20_body">
      <style:paragraph-properties fo:margin-left="0.012cm" fo:margin-right="0cm" fo:line-height="121%"/>
      <style:text-properties fo:color="#000000" loext:opacity="100%" fo:background-color="transparent"/>
    </style:style>
    <style:style style:name="P37" style:family="paragraph" style:parent-style-name="Heading_20_1" style:master-page-name="Standard">
      <style:paragraph-properties fo:line-height="121%" fo:text-align="center" style:justify-single-word="false" style:page-number="auto"/>
    </style:style>
    <style:style style:name="P38" style:family="paragraph" style:parent-style-name="Heading_20_3" style:list-style-name="WWNum3">
      <style:paragraph-properties fo:margin-left="1.42cm" fo:margin-right="0cm" fo:margin-top="0cm" fo:margin-bottom="0cm" style:contextual-spacing="false" fo:line-height="100%" fo:text-align="start" style:justify-single-word="false" fo:text-indent="-0.561cm" style:auto-text-indent="false">
        <style:tab-stops>
          <style:tab-stop style:position="1.42cm"/>
        </style:tab-stops>
      </style:paragraph-properties>
      <style:text-properties fo:background-color="#81d41a"/>
    </style:style>
    <style:style style:name="P39" style:family="paragraph" style:parent-style-name="Heading_20_3">
      <style:text-properties fo:color="#000000" loext:opacity="100%" fo:background-color="transparent"/>
    </style:style>
    <style:style style:name="P40" style:family="paragraph" style:parent-style-name="List_20_Paragraph" style:list-style-name="WWNum1">
      <style:paragraph-properties fo:margin-left="1.42cm" fo:margin-right="0cm" fo:margin-top="0.085cm" fo:margin-bottom="0cm" style:contextual-spacing="false" fo:line-height="100%" fo:text-align="center" style:justify-single-word="false" fo:text-indent="-0.561cm" style:auto-text-indent="false">
        <style:tab-stops>
          <style:tab-stop style:position="1.42cm"/>
        </style:tab-stops>
      </style:paragraph-properties>
      <style:text-properties fo:color="#000000" loext:opacity="100%" fo:background-color="transparent"/>
    </style:style>
    <style:style style:name="P41" style:family="paragraph" style:parent-style-name="List_20_Paragraph">
      <style:paragraph-properties fo:margin-left="1.42cm" fo:margin-right="0cm" fo:margin-top="0.085cm" fo:margin-bottom="0cm" style:contextual-spacing="false" fo:line-height="100%" fo:text-align="start" style:justify-single-word="false" fo:text-indent="-0.561cm" style:auto-text-indent="false">
        <style:tab-stops>
          <style:tab-stop style:position="1.42cm"/>
        </style:tab-stops>
      </style:paragraph-properties>
      <style:text-properties fo:color="#000000" loext:opacity="100%" fo:font-size="10pt" fo:letter-spacing="-0.007cm" officeooo:rsid="001b3d6c" officeooo:paragraph-rsid="001b3d6c" fo:background-color="#81d41a" style:font-size-asian="10pt" style:text-scale="110%"/>
    </style:style>
    <style:style style:name="P42" style:family="paragraph" style:parent-style-name="List_20_Paragraph">
      <style:paragraph-properties fo:margin-left="1.42cm" fo:margin-right="0cm" fo:margin-top="0.085cm" fo:margin-bottom="0cm" style:contextual-spacing="false" fo:line-height="100%" fo:text-align="start" style:justify-single-word="false" fo:text-indent="-0.561cm" style:auto-text-indent="false">
        <style:tab-stops>
          <style:tab-stop style:position="1.42cm"/>
        </style:tab-stops>
      </style:paragraph-properties>
      <style:text-properties fo:color="#000000" loext:opacity="100%" fo:font-size="10pt" fo:letter-spacing="-0.007cm" officeooo:rsid="001b3d6c" officeooo:paragraph-rsid="001b3d6c" fo:background-color="#bf819e" style:font-size-asian="10pt" style:text-scale="110%"/>
    </style:style>
    <style:style style:name="P43" style:family="paragraph" style:parent-style-name="List_20_Paragraph">
      <style:paragraph-properties fo:margin-left="1.42cm" fo:margin-right="0cm" fo:margin-top="0.085cm" fo:margin-bottom="0cm" style:contextual-spacing="false" fo:line-height="100%" fo:text-align="start" style:justify-single-word="false" fo:text-indent="-0.561cm" style:auto-text-indent="false">
        <style:tab-stops>
          <style:tab-stop style:position="1.42cm"/>
        </style:tab-stops>
      </style:paragraph-properties>
      <style:text-properties fo:color="#000000" loext:opacity="100%" fo:font-size="10pt" fo:letter-spacing="-0.007cm" officeooo:rsid="001b3d6c" officeooo:paragraph-rsid="001b3d6c" fo:background-color="#ffb66c" style:font-size-asian="10pt" style:text-scale="110%"/>
    </style:style>
    <style:style style:name="P44" style:family="paragraph" style:parent-style-name="List_20_Paragraph" style:list-style-name="WWNum4">
      <style:paragraph-properties fo:margin-left="1.423cm" fo:margin-right="0.891cm" fo:margin-top="0.349cm" fo:margin-bottom="0cm" style:contextual-spacing="false" fo:line-height="117%" fo:text-align="start" style:justify-single-word="false" fo:text-indent="-0.564cm" style:auto-text-indent="false">
        <style:tab-stops>
          <style:tab-stop style:position="1.42cm"/>
          <style:tab-stop style:position="1.423cm"/>
        </style:tab-stops>
      </style:paragraph-properties>
      <style:text-properties fo:color="#000000" loext:opacity="100%" fo:background-color="#bf819e"/>
    </style:style>
    <style:style style:name="P45" style:family="paragraph" style:parent-style-name="List_20_Paragraph" style:list-style-name="WWNum1">
      <style:paragraph-properties fo:margin-left="1.42cm" fo:margin-right="0cm" fo:margin-top="0.085cm" fo:margin-bottom="0cm" style:contextual-spacing="false" fo:line-height="100%" fo:text-align="start" style:justify-single-word="false" fo:text-indent="0cm" style:auto-text-indent="false">
        <style:tab-stops>
          <style:tab-stop style:position="1.42cm"/>
        </style:tab-stops>
      </style:paragraph-properties>
    </style:style>
    <style:style style:name="P46" style:family="paragraph" style:parent-style-name="List_20_Paragraph" style:list-style-name="WWNum2">
      <style:paragraph-properties fo:margin-left="0.012cm" fo:margin-right="1.683cm" fo:margin-top="0cm" fo:margin-bottom="0cm" style:contextual-spacing="false" fo:line-height="121%" fo:text-align="start" style:justify-single-word="false" fo:text-indent="0cm" style:auto-text-indent="false">
        <style:tab-stops>
          <style:tab-stop style:position="0.512cm"/>
        </style:tab-stops>
      </style:paragraph-properties>
      <style:text-properties fo:background-color="#bf819e"/>
    </style:style>
    <style:style style:name="P47" style:family="paragraph" style:parent-style-name="List_20_Paragraph" style:list-style-name="WWNum4">
      <style:paragraph-properties fo:margin-left="1.423cm" fo:margin-right="0.827cm" fo:margin-top="0.344cm" fo:margin-bottom="0cm" style:contextual-spacing="false" fo:line-height="121%" fo:text-align="start" style:justify-single-word="false" fo:text-indent="-0.564cm" style:auto-text-indent="false">
        <style:tab-stops>
          <style:tab-stop style:position="1.42cm"/>
          <style:tab-stop style:position="1.423cm"/>
        </style:tab-stops>
      </style:paragraph-properties>
      <style:text-properties fo:background-color="#bf819e"/>
    </style:style>
    <style:style style:name="P48" style:family="paragraph" style:parent-style-name="List_20_Paragraph" style:list-style-name="WWNum4">
      <style:paragraph-properties fo:margin-left="1.423cm" fo:margin-right="0.96cm" fo:margin-top="0.346cm" fo:margin-bottom="0cm" style:contextual-spacing="false" fo:line-height="121%" fo:text-align="start" style:justify-single-word="false" fo:text-indent="-0.564cm" style:auto-text-indent="false">
        <style:tab-stops>
          <style:tab-stop style:position="1.42cm"/>
          <style:tab-stop style:position="1.423cm"/>
        </style:tab-stops>
      </style:paragraph-properties>
      <style:text-properties fo:background-color="#bf819e"/>
    </style:style>
    <style:style style:name="P49" style:family="paragraph" style:parent-style-name="List_20_Paragraph" style:list-style-name="WWNum2">
      <style:paragraph-properties fo:margin-left="1.423cm" fo:margin-right="0cm" fo:margin-top="0cm" fo:margin-bottom="0cm" style:contextual-spacing="false" fo:line-height="100%" fo:text-align="start" style:justify-single-word="false" fo:text-indent="-0.476cm" style:auto-text-indent="false">
        <style:tab-stops>
          <style:tab-stop style:position="1.423cm"/>
        </style:tab-stops>
      </style:paragraph-properties>
      <style:text-properties fo:background-color="#bf819e"/>
    </style:style>
    <style:style style:name="P50" style:family="paragraph" style:parent-style-name="List_20_Paragraph" style:list-style-name="WWNum2">
      <style:paragraph-properties fo:margin-left="1.423cm" fo:margin-right="0cm" fo:margin-top="0.085cm" fo:margin-bottom="0cm" style:contextual-spacing="false" fo:line-height="100%" fo:text-align="start" style:justify-single-word="false" fo:text-indent="-0.476cm" style:auto-text-indent="false">
        <style:tab-stops>
          <style:tab-stop style:position="1.423cm"/>
        </style:tab-stops>
      </style:paragraph-properties>
      <style:text-properties fo:background-color="#bf819e"/>
    </style:style>
    <style:style style:name="P51" style:family="paragraph" style:parent-style-name="List_20_Paragraph" style:list-style-name="WWNum2">
      <style:paragraph-properties fo:margin-left="1.423cm" fo:margin-right="1.129cm" fo:margin-top="0.347cm" fo:margin-bottom="0cm" style:contextual-spacing="false" fo:line-height="113%" fo:text-align="start" style:justify-single-word="false" fo:text-indent="-0.564cm" style:auto-text-indent="false">
        <style:tab-stops>
          <style:tab-stop style:position="1.42cm"/>
          <style:tab-stop style:position="1.423cm"/>
        </style:tab-stops>
      </style:paragraph-properties>
      <style:text-properties fo:background-color="#bf819e"/>
    </style:style>
    <style:style style:name="P52" style:family="paragraph" style:parent-style-name="List_20_Paragraph" style:list-style-name="WWNum2">
      <style:paragraph-properties fo:margin-left="1.423cm" fo:margin-right="3.168cm" fo:margin-top="0.035cm" fo:margin-bottom="0cm" style:contextual-spacing="false" fo:line-height="113%" fo:text-align="start" style:justify-single-word="false" fo:text-indent="-0.564cm" style:auto-text-indent="false">
        <style:tab-stops>
          <style:tab-stop style:position="1.42cm"/>
          <style:tab-stop style:position="1.423cm"/>
        </style:tab-stops>
      </style:paragraph-properties>
      <style:text-properties fo:background-color="#ffbf00"/>
    </style:style>
    <style:style style:name="P53" style:family="paragraph" style:parent-style-name="List_20_Paragraph" style:list-style-name="WWNum2">
      <style:paragraph-properties fo:margin-left="1.423cm" fo:margin-right="1.48cm" fo:margin-top="0cm" fo:margin-bottom="0cm" style:contextual-spacing="false" fo:line-height="121%" fo:text-align="start" style:justify-single-word="false" fo:text-indent="-0.476cm" style:auto-text-indent="false">
        <style:tab-stops>
          <style:tab-stop style:position="1.423cm"/>
        </style:tab-stops>
      </style:paragraph-properties>
      <style:text-properties fo:background-color="#ffb66c"/>
    </style:style>
    <style:style style:name="P54" style:family="paragraph" style:parent-style-name="List_20_Paragraph" style:list-style-name="WWNum2">
      <style:paragraph-properties fo:margin-left="1.423cm" fo:margin-right="1.124cm" fo:margin-top="0cm" fo:margin-bottom="0cm" style:contextual-spacing="false" fo:line-height="121%" fo:text-align="start" style:justify-single-word="false" fo:text-indent="-0.476cm" style:auto-text-indent="false">
        <style:tab-stops>
          <style:tab-stop style:position="1.423cm"/>
        </style:tab-stops>
      </style:paragraph-properties>
      <style:text-properties fo:background-color="#ffb66c"/>
    </style:style>
    <style:style style:name="P55" style:family="paragraph" style:parent-style-name="List_20_Paragraph" style:list-style-name="WWNum2">
      <style:paragraph-properties fo:margin-left="1.423cm" fo:margin-right="1.161cm" fo:margin-top="0.035cm" fo:margin-bottom="0cm" style:contextual-spacing="false" fo:line-height="121%" fo:text-align="start" style:justify-single-word="false" fo:text-indent="-0.476cm" style:auto-text-indent="false">
        <style:tab-stops>
          <style:tab-stop style:position="1.423cm"/>
        </style:tab-stops>
      </style:paragraph-properties>
      <style:text-properties fo:background-color="#ffb66c"/>
    </style:style>
    <style:style style:name="P56" style:family="paragraph" style:parent-style-name="List_20_Paragraph" style:list-style-name="WWNum2">
      <style:paragraph-properties fo:margin-left="1.423cm" fo:margin-right="0.522cm" fo:margin-top="0cm" fo:margin-bottom="0cm" style:contextual-spacing="false" fo:line-height="121%" fo:text-align="start" style:justify-single-word="false" fo:text-indent="-0.476cm" style:auto-text-indent="false">
        <style:tab-stops>
          <style:tab-stop style:position="1.423cm"/>
        </style:tab-stops>
      </style:paragraph-properties>
      <style:text-properties fo:background-color="#ffb66c"/>
    </style:style>
    <style:style style:name="P57" style:family="paragraph" style:parent-style-name="List_20_Paragraph" style:list-style-name="WWNum2">
      <style:paragraph-properties fo:margin-left="1.423cm" fo:margin-right="0.261cm" fo:margin-top="0cm" fo:margin-bottom="0cm" style:contextual-spacing="false" fo:line-height="121%" fo:text-align="start" style:justify-single-word="false" fo:text-indent="-0.476cm" style:auto-text-indent="false">
        <style:tab-stops>
          <style:tab-stop style:position="1.423cm"/>
        </style:tab-stops>
      </style:paragraph-properties>
      <style:text-properties officeooo:paragraph-rsid="001b3d6c" fo:background-color="#ffb66c"/>
    </style:style>
    <style:style style:name="P58" style:family="paragraph" style:parent-style-name="List_20_Paragraph" style:list-style-name="WWNum2">
      <style:paragraph-properties fo:margin-left="1.423cm" fo:margin-right="0.261cm" fo:margin-top="0cm" fo:margin-bottom="0cm" style:contextual-spacing="false" fo:line-height="121%" fo:text-align="start" style:justify-single-word="false" fo:text-indent="0cm" style:auto-text-indent="false">
        <style:tab-stops>
          <style:tab-stop style:position="1.423cm"/>
        </style:tab-stops>
      </style:paragraph-properties>
      <style:text-properties officeooo:paragraph-rsid="001b3d6c" fo:background-color="#ffb66c"/>
    </style:style>
    <style:style style:name="P59" style:family="paragraph" style:parent-style-name="List_20_Paragraph" style:list-style-name="WWNum4">
      <style:paragraph-properties fo:margin-left="1.423cm" fo:margin-right="0.579cm" fo:margin-top="0.342cm" fo:margin-bottom="0cm" style:contextual-spacing="false" fo:line-height="121%" fo:text-align="start" style:justify-single-word="false" fo:text-indent="-0.564cm" style:auto-text-indent="false">
        <style:tab-stops>
          <style:tab-stop style:position="1.42cm"/>
          <style:tab-stop style:position="1.423cm"/>
        </style:tab-stops>
      </style:paragraph-properties>
      <style:text-properties fo:background-color="#ffb66c"/>
    </style:style>
    <style:style style:name="P60" style:family="paragraph" style:parent-style-name="List_20_Paragraph" style:list-style-name="WWNum4">
      <style:paragraph-properties fo:margin-left="2.835cm" fo:margin-right="0.707cm" fo:margin-top="0.002cm" fo:margin-bottom="0cm" style:contextual-spacing="false" fo:line-height="121%" fo:text-align="start" style:justify-single-word="false" fo:text-indent="-0.476cm" style:auto-text-indent="false">
        <style:tab-stops>
          <style:tab-stop style:position="2.835cm"/>
        </style:tab-stops>
      </style:paragraph-properties>
      <style:text-properties fo:background-color="#ffb66c"/>
    </style:style>
    <style:style style:name="P61" style:family="paragraph" style:parent-style-name="List_20_Paragraph" style:list-style-name="WWNum4">
      <style:paragraph-properties fo:margin-left="2.835cm" fo:margin-right="0.085cm" fo:margin-top="0cm" fo:margin-bottom="0cm" style:contextual-spacing="false" fo:line-height="121%" fo:text-align="start" style:justify-single-word="false" fo:text-indent="-0.476cm" style:auto-text-indent="false">
        <style:tab-stops>
          <style:tab-stop style:position="2.835cm"/>
        </style:tab-stops>
      </style:paragraph-properties>
      <style:text-properties fo:background-color="#ffb66c"/>
    </style:style>
    <style:style style:name="P62" style:family="paragraph" style:parent-style-name="List_20_Paragraph" style:list-style-name="WWNum4">
      <style:paragraph-properties fo:margin-left="2.835cm" fo:margin-right="0.198cm" fo:margin-top="0cm" fo:margin-bottom="0cm" style:contextual-spacing="false" fo:line-height="121%" fo:text-align="start" style:justify-single-word="false" fo:text-indent="-0.476cm" style:auto-text-indent="false">
        <style:tab-stops>
          <style:tab-stop style:position="2.835cm"/>
        </style:tab-stops>
      </style:paragraph-properties>
      <style:text-properties fo:background-color="#ffb66c"/>
    </style:style>
    <style:style style:name="P63" style:family="paragraph" style:parent-style-name="List_20_Paragraph" style:list-style-name="WWNum2">
      <style:paragraph-properties fo:margin-left="1.423cm" fo:margin-right="1.321cm" fo:margin-top="0.369cm" fo:margin-bottom="0cm" style:contextual-spacing="false" fo:line-height="113%" fo:text-align="start" style:justify-single-word="false" fo:text-indent="-0.476cm" style:auto-text-indent="false">
        <style:tab-stops>
          <style:tab-stop style:position="1.423cm"/>
        </style:tab-stops>
      </style:paragraph-properties>
      <style:text-properties fo:background-color="#ffb66c"/>
    </style:style>
    <style:style style:name="P64" style:family="paragraph" style:parent-style-name="List_20_Paragraph" style:list-style-name="WWNum4">
      <style:paragraph-properties fo:margin-left="1.42cm" fo:margin-right="0cm" fo:margin-top="0.344cm" fo:margin-bottom="0cm" style:contextual-spacing="false" fo:line-height="100%" fo:text-align="start" style:justify-single-word="false" fo:text-indent="-0.561cm" style:auto-text-indent="false">
        <style:tab-stops>
          <style:tab-stop style:position="1.42cm"/>
        </style:tab-stops>
      </style:paragraph-properties>
      <style:text-properties fo:background-color="#ffb66c"/>
    </style:style>
    <style:style style:name="P65" style:family="paragraph" style:parent-style-name="List_20_Paragraph" style:list-style-name="WWNum4" style:master-page-name="Converted2">
      <style:paragraph-properties fo:margin-left="1.423cm" fo:margin-right="0.25cm" fo:margin-top="0.127cm" fo:margin-bottom="0cm" style:contextual-spacing="false" fo:line-height="121%" fo:text-align="start" style:justify-single-word="false" fo:text-indent="-0.564cm" style:auto-text-indent="false" style:page-number="auto">
        <style:tab-stops>
          <style:tab-stop style:position="1.42cm"/>
          <style:tab-stop style:position="1.423cm"/>
        </style:tab-stops>
      </style:paragraph-properties>
      <style:text-properties fo:background-color="#808080"/>
    </style:style>
    <style:style style:name="P66" style:family="paragraph" style:parent-style-name="List_20_Paragraph" style:list-style-name="WWNum4">
      <style:paragraph-properties fo:margin-left="1.423cm" fo:margin-right="0.446cm" fo:margin-top="0.346cm" fo:margin-bottom="0cm" style:contextual-spacing="false" fo:line-height="121%" fo:text-align="start" style:justify-single-word="false" fo:text-indent="-0.564cm" style:auto-text-indent="false">
        <style:tab-stops>
          <style:tab-stop style:position="1.42cm"/>
          <style:tab-stop style:position="1.423cm"/>
        </style:tab-stops>
      </style:paragraph-properties>
      <style:text-properties fo:background-color="#808080"/>
    </style:style>
    <style:style style:name="P67" style:family="paragraph" style:parent-style-name="List_20_Paragraph" style:list-style-name="WWNum4">
      <style:paragraph-properties fo:margin-left="1.423cm" fo:margin-right="0.243cm" fo:margin-top="0.335cm" fo:margin-bottom="0cm" style:contextual-spacing="false" fo:line-height="113%" fo:text-align="start" style:justify-single-word="false" fo:text-indent="-0.776cm" style:auto-text-indent="false">
        <style:tab-stops>
          <style:tab-stop style:position="1.418cm"/>
          <style:tab-stop style:position="1.423cm"/>
        </style:tab-stops>
      </style:paragraph-properties>
      <style:text-properties fo:background-color="#81d41a"/>
    </style:style>
    <style:style style:name="P68" style:family="paragraph" style:parent-style-name="List_20_Paragraph" style:list-style-name="WWNum4">
      <style:paragraph-properties fo:margin-left="1.423cm" fo:margin-right="0.055cm" fo:margin-top="0.344cm" fo:margin-bottom="0cm" style:contextual-spacing="false" fo:line-height="116%" fo:text-align="start" style:justify-single-word="false" fo:text-indent="-0.776cm" style:auto-text-indent="false">
        <style:tab-stops>
          <style:tab-stop style:position="1.418cm"/>
          <style:tab-stop style:position="1.423cm"/>
        </style:tab-stops>
      </style:paragraph-properties>
      <style:text-properties fo:background-color="#81d41a"/>
    </style:style>
    <style:style style:name="P69" style:family="paragraph" style:parent-style-name="List_20_Paragraph" style:list-style-name="WWNum4">
      <style:paragraph-properties fo:margin-left="1.423cm" fo:margin-right="0.277cm" fo:margin-top="0cm" fo:margin-bottom="0cm" style:contextual-spacing="false" fo:line-height="116%" fo:text-align="start" style:justify-single-word="false" fo:text-indent="-0.776cm" style:auto-text-indent="false">
        <style:tab-stops>
          <style:tab-stop style:position="1.418cm"/>
          <style:tab-stop style:position="1.423cm"/>
        </style:tab-stops>
      </style:paragraph-properties>
    </style:style>
    <style:style style:name="P70" style:family="paragraph" style:parent-style-name="List_20_Paragraph" style:list-style-name="WWNum4">
      <style:paragraph-properties fo:margin-left="1.423cm" fo:margin-right="0.139cm" fo:margin-top="0.346cm" fo:margin-bottom="0cm" style:contextual-spacing="false" fo:line-height="121%" fo:text-align="start" style:justify-single-word="false" fo:text-indent="-0.564cm" style:auto-text-indent="false">
        <style:tab-stops>
          <style:tab-stop style:position="1.42cm"/>
          <style:tab-stop style:position="1.423cm"/>
        </style:tab-stops>
      </style:paragraph-properties>
      <style:text-properties fo:background-color="#ff0000"/>
    </style:style>
    <style:style style:name="P71" style:family="paragraph" style:parent-style-name="List_20_Paragraph" style:list-style-name="WWNum4">
      <style:paragraph-properties fo:margin-left="1.423cm" fo:margin-right="0.504cm" fo:margin-top="0.347cm" fo:margin-bottom="0cm" style:contextual-spacing="false" fo:line-height="121%" fo:text-align="start" style:justify-single-word="false" fo:text-indent="-0.564cm" style:auto-text-indent="false">
        <style:tab-stops>
          <style:tab-stop style:position="1.42cm"/>
          <style:tab-stop style:position="1.423cm"/>
        </style:tab-stops>
      </style:paragraph-properties>
      <style:text-properties fo:background-color="#ff0000"/>
    </style:style>
    <style:style style:name="T1" style:family="text">
      <style:text-properties fo:color="#212121" loext:opacity="100%"/>
    </style:style>
    <style:style style:name="T2" style:family="text">
      <style:text-properties fo:color="#212121" loext:opacity="100%" style:text-scale="120%"/>
    </style:style>
    <style:style style:name="T3" style:family="text">
      <style:text-properties fo:color="#212121" loext:opacity="100%" fo:letter-spacing="-0.041cm" style:text-scale="120%"/>
    </style:style>
    <style:style style:name="T4" style:family="text">
      <style:text-properties fo:color="#212121" loext:opacity="100%" fo:letter-spacing="-0.004cm"/>
    </style:style>
    <style:style style:name="T5" style:family="text">
      <style:text-properties fo:color="#212121" loext:opacity="100%" fo:letter-spacing="-0.004cm" style:text-scale="120%"/>
    </style:style>
    <style:style style:name="T6" style:family="text">
      <style:text-properties fo:color="#212121" loext:opacity="100%" fo:letter-spacing="-0.004cm" style:text-scale="115%"/>
    </style:style>
    <style:style style:name="T7" style:family="text">
      <style:text-properties fo:color="#212121" loext:opacity="100%" fo:letter-spacing="-0.004cm" style:text-scale="110%"/>
    </style:style>
    <style:style style:name="T8" style:family="text">
      <style:text-properties fo:color="#212121" loext:opacity="100%" fo:letter-spacing="-0.004cm" style:text-scale="105%"/>
    </style:style>
    <style:style style:name="T9" style:family="text">
      <style:text-properties fo:color="#212121" loext:opacity="100%" fo:font-size="10pt" style:font-size-asian="10pt"/>
    </style:style>
    <style:style style:name="T10" style:family="text">
      <style:text-properties fo:color="#212121" loext:opacity="100%" fo:font-size="10pt" style:font-size-asian="10pt" style:text-scale="110%"/>
    </style:style>
    <style:style style:name="T11" style:family="text">
      <style:text-properties fo:color="#212121" loext:opacity="100%" fo:font-size="10pt" style:font-size-asian="10pt" style:text-scale="115%"/>
    </style:style>
    <style:style style:name="T12" style:family="text">
      <style:text-properties fo:color="#212121" loext:opacity="100%" fo:font-size="10pt" fo:letter-spacing="-0.007cm" style:font-size-asian="10pt" style:text-scale="115%"/>
    </style:style>
    <style:style style:name="T13" style:family="text">
      <style:text-properties fo:color="#212121" loext:opacity="100%" fo:font-size="10pt" fo:letter-spacing="-0.007cm" fo:font-weight="bold" style:font-size-asian="10pt" style:font-weight-asian="bold" style:text-scale="115%"/>
    </style:style>
    <style:style style:name="T14" style:family="text">
      <style:text-properties fo:color="#212121" loext:opacity="100%" fo:font-size="10pt" fo:letter-spacing="-0.007cm" fo:background-color="#81d41a" loext:char-shading-value="0" style:font-size-asian="10pt" style:text-scale="115%"/>
    </style:style>
    <style:style style:name="T15" style:family="text">
      <style:text-properties fo:color="#212121" loext:opacity="100%" fo:font-size="10pt" fo:letter-spacing="-0.026cm" style:font-size-asian="10pt" style:text-scale="115%"/>
    </style:style>
    <style:style style:name="T16" style:family="text">
      <style:text-properties fo:color="#212121" loext:opacity="100%" fo:font-size="10pt" fo:letter-spacing="-0.014cm" style:font-size-asian="10pt" style:text-scale="115%"/>
    </style:style>
    <style:style style:name="T17" style:family="text">
      <style:text-properties fo:color="#212121" loext:opacity="100%" fo:font-size="10pt" fo:letter-spacing="-0.014cm" fo:font-weight="bold" style:font-size-asian="10pt" style:font-weight-asian="bold" style:text-scale="115%"/>
    </style:style>
    <style:style style:name="T18" style:family="text">
      <style:text-properties fo:color="#212121" loext:opacity="100%" fo:font-size="10pt" fo:letter-spacing="-0.012cm" style:font-size-asian="10pt" style:text-scale="115%"/>
    </style:style>
    <style:style style:name="T19" style:family="text">
      <style:text-properties fo:color="#212121" loext:opacity="100%" fo:font-size="10pt" fo:letter-spacing="-0.012cm" style:font-size-asian="10pt" style:text-scale="110%"/>
    </style:style>
    <style:style style:name="T20" style:family="text">
      <style:text-properties fo:color="#212121" loext:opacity="100%" fo:font-size="10pt" fo:letter-spacing="-0.012cm" fo:font-weight="bold" style:font-size-asian="10pt" style:font-weight-asian="bold" style:text-scale="115%"/>
    </style:style>
    <style:style style:name="T21" style:family="text">
      <style:text-properties fo:color="#212121" loext:opacity="100%" fo:font-size="10pt" fo:letter-spacing="-0.012cm" fo:background-color="#bf819e" loext:char-shading-value="0" style:font-size-asian="10pt" style:text-scale="115%"/>
    </style:style>
    <style:style style:name="T22" style:family="text">
      <style:text-properties fo:color="#212121" loext:opacity="100%" fo:font-size="10pt" fo:font-weight="bold" style:font-size-asian="10pt" style:font-weight-asian="bold" style:text-scale="120%"/>
    </style:style>
    <style:style style:name="T23" style:family="text">
      <style:text-properties fo:color="#212121" loext:opacity="100%" fo:font-size="10pt" fo:font-weight="bold" style:font-size-asian="10pt" style:font-weight-asian="bold" style:text-scale="115%"/>
    </style:style>
    <style:style style:name="T24" style:family="text">
      <style:text-properties fo:color="#212121" loext:opacity="100%" fo:font-size="10pt" fo:font-weight="bold" style:font-size-asian="10pt" style:font-weight-asian="bold" style:text-scale="110%"/>
    </style:style>
    <style:style style:name="T25" style:family="text">
      <style:text-properties fo:color="#212121" loext:opacity="100%" fo:font-size="10pt" fo:font-weight="bold" fo:background-color="#81d41a" loext:char-shading-value="0" style:font-size-asian="10pt" style:font-weight-asian="bold" style:text-scale="115%"/>
    </style:style>
    <style:style style:name="T26" style:family="text">
      <style:text-properties fo:color="#212121" loext:opacity="100%" fo:font-size="10pt" fo:font-weight="bold" fo:background-color="#bf819e" loext:char-shading-value="0" style:font-size-asian="10pt" style:font-weight-asian="bold" style:text-scale="110%"/>
    </style:style>
    <style:style style:name="T27" style:family="text">
      <style:text-properties fo:color="#212121" loext:opacity="100%" fo:font-size="10pt" fo:font-weight="bold" fo:background-color="#bf819e" loext:char-shading-value="0" style:font-size-asian="10pt" style:font-weight-asian="bold" style:text-scale="115%"/>
    </style:style>
    <style:style style:name="T28" style:family="text">
      <style:text-properties fo:color="#212121" loext:opacity="100%" fo:font-size="10pt" fo:letter-spacing="-0.004cm" fo:font-weight="bold" style:font-size-asian="10pt" style:font-weight-asian="bold" style:text-scale="120%"/>
    </style:style>
    <style:style style:name="T29" style:family="text">
      <style:text-properties fo:color="#212121" loext:opacity="100%" fo:font-size="10pt" fo:letter-spacing="-0.004cm" fo:font-weight="bold" style:font-size-asian="10pt" style:font-weight-asian="bold" style:text-scale="115%"/>
    </style:style>
    <style:style style:name="T30" style:family="text">
      <style:text-properties fo:color="#212121" loext:opacity="100%" fo:font-size="10pt" fo:letter-spacing="-0.004cm" style:font-size-asian="10pt" style:text-scale="115%"/>
    </style:style>
    <style:style style:name="T31" style:family="text">
      <style:text-properties fo:color="#212121" loext:opacity="100%" fo:font-size="10pt" fo:letter-spacing="-0.004cm" fo:font-style="italic" style:font-size-asian="10pt" style:font-style-asian="italic" style:text-scale="115%"/>
    </style:style>
    <style:style style:name="T32" style:family="text">
      <style:text-properties fo:color="#212121" loext:opacity="100%" fo:font-size="10pt" fo:letter-spacing="-0.004cm" fo:font-style="italic" style:font-size-asian="10pt" style:font-style-asian="italic" style:text-scale="110%"/>
    </style:style>
    <style:style style:name="T33" style:family="text">
      <style:text-properties fo:color="#212121" loext:opacity="100%" fo:font-size="10pt" fo:letter-spacing="-0.004cm" fo:background-color="#bf819e" loext:char-shading-value="0" style:font-size-asian="10pt" style:text-scale="115%"/>
    </style:style>
    <style:style style:name="T34" style:family="text">
      <style:text-properties fo:color="#212121" loext:opacity="100%" fo:font-size="10pt" fo:letter-spacing="-0.021cm" fo:font-weight="bold" style:font-size-asian="10pt" style:font-weight-asian="bold" style:text-scale="120%"/>
    </style:style>
    <style:style style:name="T35" style:family="text">
      <style:text-properties fo:color="#212121" loext:opacity="100%" fo:font-size="10pt" fo:letter-spacing="-0.021cm" fo:font-weight="bold" style:font-size-asian="10pt" style:font-weight-asian="bold" style:text-scale="115%"/>
    </style:style>
    <style:style style:name="T36" style:family="text">
      <style:text-properties fo:color="#212121" loext:opacity="100%" fo:font-size="10pt" fo:letter-spacing="-0.021cm" style:font-size-asian="10pt" style:text-scale="115%"/>
    </style:style>
    <style:style style:name="T37" style:family="text">
      <style:text-properties fo:color="#212121" loext:opacity="100%" fo:font-size="10pt" fo:letter-spacing="0.004cm" fo:font-weight="bold" style:font-size-asian="10pt" style:font-weight-asian="bold" style:text-scale="115%"/>
    </style:style>
    <style:style style:name="T38" style:family="text">
      <style:text-properties fo:color="#212121" loext:opacity="100%" fo:font-size="10pt" fo:letter-spacing="0.004cm" fo:font-style="italic" style:font-size-asian="10pt" style:font-style-asian="italic" style:text-scale="115%"/>
    </style:style>
    <style:style style:name="T39" style:family="text">
      <style:text-properties fo:color="#212121" loext:opacity="100%" fo:font-size="10pt" fo:letter-spacing="-0.005cm" style:font-size-asian="10pt" style:text-scale="115%"/>
    </style:style>
    <style:style style:name="T40" style:family="text">
      <style:text-properties fo:color="#212121" loext:opacity="100%" fo:font-size="10pt" fo:letter-spacing="-0.005cm" fo:background-color="#81d41a" loext:char-shading-value="0" style:font-size-asian="10pt" style:text-scale="115%"/>
    </style:style>
    <style:style style:name="T41" style:family="text">
      <style:text-properties fo:color="#212121" loext:opacity="100%" fo:font-size="10pt" fo:letter-spacing="-0.005cm" fo:background-color="#bf819e" loext:char-shading-value="0" style:font-size-asian="10pt" style:text-scale="115%"/>
    </style:style>
    <style:style style:name="T42" style:family="text">
      <style:text-properties fo:color="#212121" loext:opacity="100%" fo:font-size="10pt" fo:letter-spacing="0.028cm" fo:font-weight="bold" style:font-size-asian="10pt" style:font-weight-asian="bold" style:text-scale="115%"/>
    </style:style>
    <style:style style:name="T43" style:family="text">
      <style:text-properties fo:color="#212121" loext:opacity="100%" fo:font-size="10pt" fo:letter-spacing="0.016cm" fo:font-weight="bold" style:font-size-asian="10pt" style:font-weight-asian="bold" style:text-scale="115%"/>
    </style:style>
    <style:style style:name="T44" style:family="text">
      <style:text-properties fo:color="#212121" loext:opacity="100%" fo:font-size="10pt" fo:letter-spacing="0.016cm" style:font-size-asian="10pt" style:text-scale="115%"/>
    </style:style>
    <style:style style:name="T45" style:family="text">
      <style:text-properties fo:color="#212121" loext:opacity="100%" fo:font-size="10pt" fo:letter-spacing="0.023cm" fo:font-weight="bold" style:font-size-asian="10pt" style:font-weight-asian="bold" style:text-scale="115%"/>
    </style:style>
    <style:style style:name="T46" style:family="text">
      <style:text-properties fo:color="#212121" loext:opacity="100%" fo:font-size="10pt" fo:letter-spacing="0.011cm" fo:font-weight="bold" style:font-size-asian="10pt" style:font-weight-asian="bold" style:text-scale="115%"/>
    </style:style>
    <style:style style:name="T47" style:family="text">
      <style:text-properties fo:color="#212121" loext:opacity="100%" fo:font-size="10pt" fo:letter-spacing="0.011cm" style:font-size-asian="10pt" style:text-scale="115%"/>
    </style:style>
    <style:style style:name="T48" style:family="text">
      <style:text-properties fo:color="#212121" loext:opacity="100%" fo:font-size="10pt" fo:letter-spacing="-0.023cm" style:font-size-asian="10pt" style:text-scale="115%"/>
    </style:style>
    <style:style style:name="T49" style:family="text">
      <style:text-properties fo:color="#212121" loext:opacity="100%" fo:font-size="10pt" fo:letter-spacing="-0.002cm" style:font-size-asian="10pt" style:text-scale="115%"/>
    </style:style>
    <style:style style:name="T50" style:family="text">
      <style:text-properties fo:color="#212121" loext:opacity="100%" fo:font-size="10pt" fo:letter-spacing="-0.002cm" fo:font-weight="bold" style:font-size-asian="10pt" style:font-weight-asian="bold" style:text-scale="115%"/>
    </style:style>
    <style:style style:name="T51" style:family="text">
      <style:text-properties fo:color="#212121" loext:opacity="100%" fo:font-size="10pt" fo:letter-spacing="-0.002cm" fo:font-weight="bold" fo:background-color="#bf819e" loext:char-shading-value="0" style:font-size-asian="10pt" style:font-weight-asian="bold" style:text-scale="115%"/>
    </style:style>
    <style:style style:name="T52" style:family="text">
      <style:text-properties fo:color="#212121" loext:opacity="100%" fo:font-size="10pt" fo:letter-spacing="-0.002cm" fo:background-color="#bf819e" loext:char-shading-value="0" style:font-size-asian="10pt" style:text-scale="115%"/>
    </style:style>
    <style:style style:name="T53" style:family="text">
      <style:text-properties fo:color="#212121" loext:opacity="100%" fo:font-size="10pt" fo:font-style="italic" style:font-size-asian="10pt" style:font-style-asian="italic" style:text-scale="110%"/>
    </style:style>
    <style:style style:name="T54" style:family="text">
      <style:text-properties fo:color="#212121" loext:opacity="100%" fo:font-size="10pt" fo:letter-spacing="0.002cm" fo:font-style="italic" style:font-size-asian="10pt" style:font-style-asian="italic" style:text-scale="110%"/>
    </style:style>
    <style:style style:name="T55" style:family="text">
      <style:text-properties fo:color="#212121" loext:opacity="100%" fo:font-size="10pt" fo:letter-spacing="-0.016cm" style:font-size-asian="10pt"/>
    </style:style>
    <style:style style:name="T56" style:family="text">
      <style:text-properties fo:color="#212121" loext:opacity="100%" fo:font-size="10pt" fo:letter-spacing="-0.016cm" style:font-size-asian="10pt" style:text-scale="115%"/>
    </style:style>
    <style:style style:name="T57" style:family="text">
      <style:text-properties fo:color="#212121" loext:opacity="100%" fo:font-size="10pt" fo:letter-spacing="-0.016cm" fo:background-color="#bf819e" loext:char-shading-value="0" style:font-size-asian="10pt" style:text-scale="115%"/>
    </style:style>
    <style:style style:name="T58" style:family="text">
      <style:text-properties fo:color="#212121" loext:opacity="100%" fo:font-size="10pt" fo:letter-spacing="-0.009cm" style:font-size-asian="10pt"/>
    </style:style>
    <style:style style:name="T59" style:family="text">
      <style:text-properties fo:color="#212121" loext:opacity="100%" fo:font-size="10pt" fo:letter-spacing="-0.009cm" style:font-size-asian="10pt" style:text-scale="115%"/>
    </style:style>
    <style:style style:name="T60" style:family="text">
      <style:text-properties fo:color="#212121" loext:opacity="100%" fo:font-size="10pt" fo:letter-spacing="-0.009cm" fo:font-weight="bold" style:font-size-asian="10pt" style:font-weight-asian="bold" style:text-scale="115%"/>
    </style:style>
    <style:style style:name="T61" style:family="text">
      <style:text-properties fo:color="#212121" loext:opacity="100%" fo:font-size="10pt" fo:letter-spacing="-0.018cm" style:font-size-asian="10pt" style:text-scale="115%"/>
    </style:style>
    <style:style style:name="T62" style:family="text">
      <style:text-properties fo:color="#212121" loext:opacity="100%" fo:font-size="10pt" fo:letter-spacing="-0.018cm" style:font-size-asian="10pt" style:text-scale="110%"/>
    </style:style>
    <style:style style:name="T63" style:family="text">
      <style:text-properties fo:color="#212121" loext:opacity="100%" fo:font-size="10pt" fo:letter-spacing="-0.018cm" fo:font-weight="bold" style:font-size-asian="10pt" style:font-weight-asian="bold" style:text-scale="115%"/>
    </style:style>
    <style:style style:name="T64" style:family="text">
      <style:text-properties fo:color="#212121" loext:opacity="100%" fo:font-size="10pt" fo:letter-spacing="-0.018cm" fo:background-color="#bf819e" loext:char-shading-value="0" style:font-size-asian="10pt" style:text-scale="115%"/>
    </style:style>
    <style:style style:name="T65" style:family="text">
      <style:text-properties fo:color="#212121" loext:opacity="100%" fo:font-size="10pt" fo:letter-spacing="-0.028cm" style:font-size-asian="10pt" style:text-scale="115%"/>
    </style:style>
    <style:style style:name="T66" style:family="text">
      <style:text-properties fo:color="#212121" loext:opacity="100%" fo:font-size="10pt" fo:letter-spacing="-0.032cm" fo:font-weight="bold" style:font-size-asian="10pt" style:font-weight-asian="bold" style:text-scale="115%"/>
    </style:style>
    <style:style style:name="T67" style:family="text">
      <style:text-properties fo:color="#212121" loext:opacity="100%" fo:font-size="10pt" fo:letter-spacing="-0.032cm" style:font-size-asian="10pt" style:text-scale="115%"/>
    </style:style>
    <style:style style:name="T68" style:family="text">
      <style:text-properties fo:color="#212121" loext:opacity="100%" fo:font-size="10pt" fo:letter-spacing="-0.032cm" fo:background-color="#bf819e" loext:char-shading-value="0" style:font-size-asian="10pt" style:text-scale="115%"/>
    </style:style>
    <style:style style:name="T69" style:family="text">
      <style:text-properties fo:color="#212121" loext:opacity="100%" fo:font-size="10pt" fo:letter-spacing="-0.03cm" fo:font-weight="bold" style:font-size-asian="10pt" style:font-weight-asian="bold" style:text-scale="115%"/>
    </style:style>
    <style:style style:name="T70" style:family="text">
      <style:text-properties fo:color="#212121" loext:opacity="100%" fo:font-size="10pt" fo:letter-spacing="-0.03cm" style:font-size-asian="10pt" style:text-scale="115%"/>
    </style:style>
    <style:style style:name="T71" style:family="text">
      <style:text-properties fo:color="#212121" loext:opacity="100%" fo:font-size="10pt" fo:letter-spacing="-0.03cm" fo:background-color="#bf819e" loext:char-shading-value="0" style:font-size-asian="10pt" style:text-scale="115%"/>
    </style:style>
    <style:style style:name="T72" style:family="text">
      <style:text-properties fo:color="#212121" loext:opacity="100%" fo:font-size="10pt" fo:letter-spacing="-0.019cm" style:font-size-asian="10pt" style:text-scale="115%"/>
    </style:style>
    <style:style style:name="T73" style:family="text">
      <style:text-properties fo:color="#212121" loext:opacity="100%" fo:font-size="10pt" fo:letter-spacing="-0.011cm" style:font-size-asian="10pt" style:text-scale="110%"/>
    </style:style>
    <style:style style:name="T74" style:family="text">
      <style:text-properties fo:color="#212121" loext:opacity="100%" fo:font-size="10pt" fo:letter-spacing="-0.011cm" style:font-size-asian="10pt" style:text-scale="115%"/>
    </style:style>
    <style:style style:name="T75" style:family="text">
      <style:text-properties fo:color="#212121" loext:opacity="100%" fo:font-size="10pt" fo:letter-spacing="-0.011cm" fo:background-color="#bf819e" loext:char-shading-value="0" style:font-size-asian="10pt" style:text-scale="115%"/>
    </style:style>
    <style:style style:name="T76" style:family="text">
      <style:text-properties fo:color="#212121" loext:opacity="100%" fo:font-size="10pt" fo:background-color="#81d41a" loext:char-shading-value="0" style:font-size-asian="10pt" style:text-scale="115%"/>
    </style:style>
    <style:style style:name="T77" style:family="text">
      <style:text-properties fo:color="#212121" loext:opacity="100%" fo:font-size="10pt" fo:background-color="#bf819e" loext:char-shading-value="0" style:font-size-asian="10pt" style:text-scale="110%"/>
    </style:style>
    <style:style style:name="T78" style:family="text">
      <style:text-properties fo:color="#212121" loext:opacity="100%" fo:font-size="10pt" fo:background-color="#bf819e" loext:char-shading-value="0" style:font-size-asian="10pt" style:text-scale="115%"/>
    </style:style>
    <style:style style:name="T79" style:family="text">
      <style:text-properties fo:color="#212121" loext:opacity="100%" style:font-name="Courier New"/>
    </style:style>
    <style:style style:name="T80" style:family="text">
      <style:text-properties fo:color="#212121" loext:opacity="100%" style:font-name="Courier New" fo:font-size="10pt" fo:letter-spacing="-0.004cm" fo:font-weight="bold" style:font-size-asian="10pt" style:font-weight-asian="bold" style:text-scale="120%"/>
    </style:style>
    <style:style style:name="T81" style:family="text">
      <style:text-properties fo:color="#212121" loext:opacity="100%" style:font-name="Courier New" fo:font-size="10pt" fo:letter-spacing="-0.004cm" fo:font-style="italic" style:font-size-asian="10pt" style:font-style-asian="italic" style:text-scale="110%"/>
    </style:style>
    <style:style style:name="T82" style:family="text">
      <style:text-properties fo:color="#212121" loext:opacity="100%" style:font-name="Courier New" fo:font-size="10pt" style:font-size-asian="10pt"/>
    </style:style>
    <style:style style:name="T83" style:family="text">
      <style:text-properties fo:color="#212121" loext:opacity="100%" style:font-name="Courier New" fo:font-size="10pt" style:font-size-asian="10pt" style:text-scale="115%"/>
    </style:style>
    <style:style style:name="T84" style:family="text">
      <style:text-properties fo:color="#212121" loext:opacity="100%" style:font-name="Courier New" fo:font-size="10pt" style:font-size-asian="10pt" style:text-scale="110%"/>
    </style:style>
    <style:style style:name="T85" style:family="text">
      <style:text-properties fo:color="#212121" loext:opacity="100%" style:font-name="Courier New" fo:font-size="10pt" fo:letter-spacing="-0.009cm" style:font-size-asian="10pt"/>
    </style:style>
    <style:style style:name="T86" style:family="text">
      <style:text-properties fo:color="#212121" loext:opacity="100%" style:font-name="Courier New" fo:font-size="10pt" fo:letter-spacing="-0.009cm" fo:background-color="#bf819e" loext:char-shading-value="0" style:font-size-asian="10pt" style:text-scale="115%"/>
    </style:style>
    <style:style style:name="T87" style:family="text">
      <style:text-properties fo:color="#212121" loext:opacity="100%" style:font-name="Courier New" fo:font-size="10pt" fo:letter-spacing="-0.122cm" style:font-size-asian="10pt" style:text-scale="110%"/>
    </style:style>
    <style:style style:name="T88" style:family="text">
      <style:text-properties fo:color="#212121" loext:opacity="100%" style:font-name="Courier New" fo:font-size="10pt" fo:letter-spacing="-0.032cm" style:font-size-asian="10pt" style:text-scale="110%"/>
    </style:style>
    <style:style style:name="T89" style:family="text">
      <style:text-properties fo:color="#212121" loext:opacity="100%" style:font-name="Courier New" fo:font-size="10pt" fo:letter-spacing="-0.132cm" fo:background-color="#bf819e" loext:char-shading-value="0" style:font-size-asian="10pt" style:text-scale="115%"/>
    </style:style>
    <style:style style:name="T90" style:family="text">
      <style:text-properties fo:color="#212121" loext:opacity="100%" style:font-name="Courier New" fo:font-size="10pt" fo:letter-spacing="-0.115cm" style:font-size-asian="10pt" style:text-scale="110%"/>
    </style:style>
    <style:style style:name="T91" style:family="text">
      <style:text-properties fo:color="#212121" loext:opacity="100%" style:font-name="Courier New" fo:font-size="10pt" fo:background-color="#bf819e" loext:char-shading-value="0" style:font-size-asian="10pt" style:text-scale="110%"/>
    </style:style>
    <style:style style:name="T92" style:family="text">
      <style:text-properties fo:color="#212121" loext:opacity="100%" style:font-name="Courier New" fo:font-size="10pt" fo:background-color="#bf819e" loext:char-shading-value="0" style:font-size-asian="10pt" style:text-scale="115%"/>
    </style:style>
    <style:style style:name="T93" style:family="text">
      <style:text-properties fo:color="#212121" loext:opacity="100%" style:font-name="Courier New" style:text-scale="110%"/>
    </style:style>
    <style:style style:name="T94" style:family="text">
      <style:text-properties fo:color="#212121" loext:opacity="100%" style:font-name="Courier New" fo:letter-spacing="-0.079cm" style:text-scale="110%"/>
    </style:style>
    <style:style style:name="T95" style:family="text">
      <style:text-properties fo:color="#212121" loext:opacity="100%" style:font-name="Courier New" fo:letter-spacing="-0.004cm"/>
    </style:style>
    <style:style style:name="T96" style:family="text">
      <style:text-properties fo:color="#212121" loext:opacity="100%" style:font-name="Courier New" fo:letter-spacing="-0.004cm" style:text-scale="110%"/>
    </style:style>
    <style:style style:name="T97" style:family="text">
      <style:text-properties fo:color="#212121" loext:opacity="100%" style:font-name="Courier New" style:text-scale="115%"/>
    </style:style>
    <style:style style:name="T98" style:family="text">
      <style:text-properties fo:color="#212121" loext:opacity="100%" style:font-name="Courier New" fo:letter-spacing="-0.06cm" style:text-scale="115%"/>
    </style:style>
    <style:style style:name="T99" style:family="text">
      <style:text-properties fo:color="#212121" loext:opacity="100%" style:font-name="Courier New" fo:letter-spacing="-0.106cm" style:text-scale="110%"/>
    </style:style>
    <style:style style:name="T100" style:family="text">
      <style:text-properties fo:color="#212121" loext:opacity="100%" style:font-name="Courier New" fo:letter-spacing="0.071cm"/>
    </style:style>
    <style:style style:name="T101" style:family="text">
      <style:text-properties fo:color="#212121" loext:opacity="100%" style:font-name="Courier New" fo:letter-spacing="0.071cm" style:text-scale="105%"/>
    </style:style>
    <style:style style:name="T102" style:family="text">
      <style:text-properties fo:color="#212121" loext:opacity="100%" style:font-name="Courier New" fo:letter-spacing="-0.042cm"/>
    </style:style>
    <style:style style:name="T103" style:family="text">
      <style:text-properties fo:color="#212121" loext:opacity="100%" style:font-name="Courier New" fo:letter-spacing="-0.041cm"/>
    </style:style>
    <style:style style:name="T104" style:family="text">
      <style:text-properties fo:color="#212121" loext:opacity="100%" style:font-name="Courier New" fo:letter-spacing="0.141cm"/>
    </style:style>
    <style:style style:name="T105" style:family="text">
      <style:text-properties fo:color="#212121" loext:opacity="100%" style:font-name="Courier New" fo:letter-spacing="-0.021cm"/>
    </style:style>
    <style:style style:name="T106" style:family="text">
      <style:text-properties fo:color="#212121" loext:opacity="100%" style:font-name="Courier New" fo:letter-spacing="0.102cm"/>
    </style:style>
    <style:style style:name="T107" style:family="text">
      <style:text-properties fo:color="#212121" loext:opacity="100%" style:font-name="Courier New" fo:letter-spacing="-0.046cm"/>
    </style:style>
    <style:style style:name="T108" style:family="text">
      <style:text-properties fo:color="#212121" loext:opacity="100%" style:font-name="Courier New" fo:letter-spacing="-0.09cm"/>
    </style:style>
    <style:style style:name="T109" style:family="text">
      <style:text-properties fo:color="#212121" loext:opacity="100%" style:font-name="Courier New" fo:letter-spacing="-0.064cm" style:text-scale="110%"/>
    </style:style>
    <style:style style:name="T110" style:family="text">
      <style:text-properties fo:color="#212121" loext:opacity="100%" style:font-name="Courier New" style:text-scale="105%"/>
    </style:style>
    <style:style style:name="T111" style:family="text">
      <style:text-properties fo:color="#212121" loext:opacity="100%" style:font-name="Courier New" fo:letter-spacing="-0.056cm" style:text-scale="105%"/>
    </style:style>
    <style:style style:name="T112" style:family="text">
      <style:text-properties fo:color="#212121" loext:opacity="100%" style:font-name="Courier New" fo:letter-spacing="-0.055cm" style:text-scale="105%"/>
    </style:style>
    <style:style style:name="T113" style:family="text">
      <style:text-properties fo:color="#212121" loext:opacity="100%" style:font-name="Courier New" fo:letter-spacing="-0.111cm" style:text-scale="105%"/>
    </style:style>
    <style:style style:name="T114" style:family="text">
      <style:text-properties fo:color="#212121" loext:opacity="100%" style:font-name="Courier New" fo:letter-spacing="-0.005cm"/>
    </style:style>
    <style:style style:name="T115" style:family="text">
      <style:text-properties fo:color="#212121" loext:opacity="100%" style:font-name="Courier New" fo:letter-spacing="-0.005cm" style:text-scale="105%"/>
    </style:style>
    <style:style style:name="T116" style:family="text">
      <style:text-properties fo:color="#212121" loext:opacity="100%" style:font-name="Courier New" fo:letter-spacing="-0.109cm" style:text-scale="105%"/>
    </style:style>
    <style:style style:name="T117" style:family="text">
      <style:text-properties fo:color="#212121" loext:opacity="100%" style:font-name="Courier New" fo:letter-spacing="-0.011cm" style:text-scale="105%"/>
    </style:style>
    <style:style style:name="T118" style:family="text">
      <style:text-properties fo:color="#212121" loext:opacity="100%" style:font-name="Courier New" fo:letter-spacing="-0.009cm" style:text-scale="115%"/>
    </style:style>
    <style:style style:name="T119" style:family="text">
      <style:text-properties fo:color="#212121" loext:opacity="100%" style:font-name="Courier New" fo:letter-spacing="-0.018cm" style:text-scale="105%"/>
    </style:style>
    <style:style style:name="T120" style:family="text">
      <style:text-properties fo:color="#212121" loext:opacity="100%" style:font-name="Courier New" fo:letter-spacing="-0.048cm" style:text-scale="105%"/>
    </style:style>
    <style:style style:name="T121" style:family="text">
      <style:text-properties fo:color="#212121" loext:opacity="100%" style:text-scale="115%"/>
    </style:style>
    <style:style style:name="T122" style:family="text">
      <style:text-properties fo:color="#212121" loext:opacity="100%" fo:letter-spacing="-0.018cm" style:text-scale="115%"/>
    </style:style>
    <style:style style:name="T123" style:family="text">
      <style:text-properties fo:color="#212121" loext:opacity="100%" fo:letter-spacing="-0.019cm" style:text-scale="115%"/>
    </style:style>
    <style:style style:name="T124" style:family="text">
      <style:text-properties fo:color="#212121" loext:opacity="100%" fo:letter-spacing="-0.019cm" style:text-scale="120%"/>
    </style:style>
    <style:style style:name="T125" style:family="text">
      <style:text-properties fo:color="#212121" loext:opacity="100%" fo:letter-spacing="-0.014cm" style:text-scale="115%"/>
    </style:style>
    <style:style style:name="T126" style:family="text">
      <style:text-properties fo:color="#212121" loext:opacity="100%" fo:letter-spacing="-0.012cm" style:text-scale="115%"/>
    </style:style>
    <style:style style:name="T127" style:family="text">
      <style:text-properties fo:color="#212121" loext:opacity="100%" fo:letter-spacing="-0.028cm" style:text-scale="120%"/>
    </style:style>
    <style:style style:name="T128" style:family="text">
      <style:text-properties fo:color="#212121" loext:opacity="100%" fo:letter-spacing="-0.028cm" style:text-scale="115%"/>
    </style:style>
    <style:style style:name="T129" style:family="text">
      <style:text-properties fo:color="#212121" loext:opacity="100%" fo:letter-spacing="-0.026cm" style:text-scale="120%"/>
    </style:style>
    <style:style style:name="T130" style:family="text">
      <style:text-properties fo:color="#212121" loext:opacity="100%" fo:letter-spacing="-0.026cm" style:text-scale="115%"/>
    </style:style>
    <style:style style:name="T131" style:family="text">
      <style:text-properties fo:color="#212121" loext:opacity="100%" style:text-scale="110%"/>
    </style:style>
    <style:style style:name="T132" style:family="text">
      <style:text-properties fo:color="#212121" loext:opacity="100%" fo:letter-spacing="0.037cm" style:text-scale="110%"/>
    </style:style>
    <style:style style:name="T133" style:family="text">
      <style:text-properties fo:color="#212121" loext:opacity="100%" fo:letter-spacing="0.035cm" style:text-scale="110%"/>
    </style:style>
    <style:style style:name="T134" style:family="text">
      <style:text-properties fo:color="#212121" loext:opacity="100%" fo:letter-spacing="-0.005cm" style:text-scale="115%"/>
    </style:style>
    <style:style style:name="T135" style:family="text">
      <style:text-properties fo:color="#212121" loext:opacity="100%" fo:letter-spacing="-0.005cm" style:text-scale="105%"/>
    </style:style>
    <style:style style:name="T136" style:family="text">
      <style:text-properties fo:color="#212121" loext:opacity="100%" fo:letter-spacing="-0.002cm" style:text-scale="115%"/>
    </style:style>
    <style:style style:name="T137" style:family="text">
      <style:text-properties fo:color="#212121" loext:opacity="100%" fo:letter-spacing="-0.009cm" style:text-scale="115%"/>
    </style:style>
    <style:style style:name="T138" style:family="text">
      <style:text-properties fo:color="#212121" loext:opacity="100%" fo:letter-spacing="-0.011cm" style:text-scale="115%"/>
    </style:style>
    <style:style style:name="T139" style:family="text">
      <style:text-properties fo:color="#212121" loext:opacity="100%" fo:letter-spacing="0.141cm" style:text-scale="110%"/>
    </style:style>
    <style:style style:name="T140" style:family="text">
      <style:text-properties fo:color="#212121" loext:opacity="100%" fo:letter-spacing="0.071cm"/>
    </style:style>
    <style:style style:name="T141" style:family="text">
      <style:text-properties fo:color="#212121" loext:opacity="100%" fo:letter-spacing="0.071cm" style:text-scale="105%"/>
    </style:style>
    <style:style style:name="T142" style:family="text">
      <style:text-properties fo:color="#212121" loext:opacity="100%" fo:letter-spacing="0.071cm" style:text-scale="110%"/>
    </style:style>
    <style:style style:name="T143" style:family="text">
      <style:text-properties fo:color="#212121" loext:opacity="100%" fo:letter-spacing="0.064cm"/>
    </style:style>
    <style:style style:name="T144" style:family="text">
      <style:text-properties fo:color="#212121" loext:opacity="100%" fo:letter-spacing="0.064cm" style:text-scale="105%"/>
    </style:style>
    <style:style style:name="T145" style:family="text">
      <style:text-properties fo:color="#212121" loext:opacity="100%" fo:letter-spacing="0.064cm" style:text-scale="110%"/>
    </style:style>
    <style:style style:name="T146" style:family="text">
      <style:text-properties fo:color="#212121" loext:opacity="100%" fo:letter-spacing="0.067cm" style:text-scale="110%"/>
    </style:style>
    <style:style style:name="T147" style:family="text">
      <style:text-properties fo:color="#212121" loext:opacity="100%" fo:letter-spacing="-0.016cm" style:text-scale="120%"/>
    </style:style>
    <style:style style:name="T148" style:family="text">
      <style:text-properties fo:color="#212121" loext:opacity="100%" fo:letter-spacing="-0.007cm" style:text-scale="120%"/>
    </style:style>
    <style:style style:name="T149" style:family="text">
      <style:text-properties fo:color="#212121" loext:opacity="100%" fo:letter-spacing="-0.007cm" style:text-scale="105%"/>
    </style:style>
    <style:style style:name="T150" style:family="text">
      <style:text-properties fo:color="#212121" loext:opacity="100%" fo:letter-spacing="0.06cm"/>
    </style:style>
    <style:style style:name="T151" style:family="text">
      <style:text-properties fo:color="#212121" loext:opacity="100%" fo:letter-spacing="0.065cm"/>
    </style:style>
    <style:style style:name="T152" style:family="text">
      <style:text-properties fo:color="#212121" loext:opacity="100%" fo:letter-spacing="0.062cm"/>
    </style:style>
    <style:style style:name="T153" style:family="text">
      <style:text-properties fo:color="#212121" loext:opacity="100%" fo:letter-spacing="0.062cm" style:text-scale="105%"/>
    </style:style>
    <style:style style:name="T154" style:family="text">
      <style:text-properties fo:color="#212121" loext:opacity="100%" fo:letter-spacing="-0.025cm" style:text-scale="120%"/>
    </style:style>
    <style:style style:name="T155" style:family="text">
      <style:text-properties fo:color="#212121" loext:opacity="100%" fo:letter-spacing="-0.025cm" style:text-scale="115%"/>
    </style:style>
    <style:style style:name="T156" style:family="text">
      <style:text-properties fo:color="#212121" loext:opacity="100%" fo:letter-spacing="-0.023cm" style:text-scale="120%"/>
    </style:style>
    <style:style style:name="T157" style:family="text">
      <style:text-properties fo:color="#212121" loext:opacity="100%" fo:letter-spacing="-0.023cm" style:text-scale="115%"/>
    </style:style>
    <style:style style:name="T158" style:family="text">
      <style:text-properties fo:color="#212121" loext:opacity="100%" fo:letter-spacing="0.056cm"/>
    </style:style>
    <style:style style:name="T159" style:family="text">
      <style:text-properties fo:color="#212121" loext:opacity="100%" fo:letter-spacing="0.058cm"/>
    </style:style>
    <style:style style:name="T160" style:family="text">
      <style:text-properties fo:color="#212121" loext:opacity="100%" fo:letter-spacing="0.007cm" style:text-scale="120%"/>
    </style:style>
    <style:style style:name="T161" style:family="text">
      <style:text-properties fo:color="#212121" loext:opacity="100%" fo:letter-spacing="0.005cm" style:text-scale="120%"/>
    </style:style>
    <style:style style:name="T162" style:family="text">
      <style:text-properties fo:color="#212121" loext:opacity="100%" style:text-scale="105%"/>
    </style:style>
    <style:style style:name="T163" style:family="text">
      <style:text-properties fo:color="#212121" loext:opacity="100%" fo:letter-spacing="-0.021cm" style:text-scale="115%"/>
    </style:style>
    <style:style style:name="T164" style:family="text">
      <style:text-properties fo:font-size="10pt" style:font-size-asian="10pt"/>
    </style:style>
    <style:style style:name="T165" style:family="text">
      <style:text-properties fo:font-size="10pt" style:font-size-asian="10pt" style:text-scale="110%"/>
    </style:style>
    <style:style style:name="T166" style:family="text">
      <style:text-properties fo:font-size="10pt" style:font-size-asian="10pt" style:text-scale="115%"/>
    </style:style>
    <style:style style:name="T167" style:family="text">
      <style:text-properties fo:font-size="10pt" fo:letter-spacing="-0.007cm" style:font-size-asian="10pt" style:text-scale="110%"/>
    </style:style>
    <style:style style:name="T168" style:family="text">
      <style:text-properties fo:font-size="10pt" fo:letter-spacing="-0.007cm" style:font-size-asian="10pt" style:text-scale="115%"/>
    </style:style>
    <style:style style:name="T169" style:family="text">
      <style:text-properties fo:font-size="10pt" fo:letter-spacing="0.055cm" style:font-size-asian="10pt" style:text-scale="110%"/>
    </style:style>
    <style:style style:name="T170" style:family="text">
      <style:text-properties fo:font-size="10pt" fo:letter-spacing="0.056cm" style:font-size-asian="10pt" style:text-scale="110%"/>
    </style:style>
    <style:style style:name="T171" style:family="text">
      <style:text-properties fo:font-size="10pt" fo:font-weight="bold" style:font-size-asian="10pt" style:font-weight-asian="bold" style:text-scale="115%"/>
    </style:style>
    <style:style style:name="T172" style:family="text">
      <style:text-properties fo:font-size="10pt" fo:letter-spacing="-0.004cm" style:font-size-asian="10pt" style:text-scale="115%"/>
    </style:style>
    <style:style style:name="T173" style:family="text">
      <style:text-properties fo:font-size="10pt" fo:letter-spacing="-0.005cm" style:font-size-asian="10pt" style:text-scale="115%"/>
    </style:style>
    <style:style style:name="T174" style:family="text">
      <style:text-properties fo:font-size="10pt" fo:letter-spacing="0.071cm" style:font-size-asian="10pt" style:text-scale="115%"/>
    </style:style>
    <style:style style:name="T175" style:family="text">
      <style:text-properties style:font-name="Times New Roman" fo:letter-spacing="0.136cm" style:text-scale="110%"/>
    </style:style>
    <style:style style:name="T176" style:family="text">
      <style:text-properties style:font-name="Times New Roman" fo:letter-spacing="0.099cm" style:text-scale="115%"/>
    </style:style>
    <style:style style:name="T177" style:family="text">
      <style:text-properties style:font-name="Times New Roman" fo:letter-spacing="0.141cm"/>
    </style:style>
    <style:style style:name="T178" style:family="text">
      <style:text-properties style:font-name="Times New Roman" fo:letter-spacing="0.141cm" style:text-scale="150%"/>
    </style:style>
    <style:style style:name="T179" style:family="text">
      <style:text-properties style:font-name="Times New Roman" fo:letter-spacing="0.071cm"/>
    </style:style>
    <style:style style:name="T180" style:family="text">
      <style:text-properties style:font-name="Times New Roman" fo:letter-spacing="0.125cm" style:text-scale="105%"/>
    </style:style>
    <style:style style:name="T181" style:family="text">
      <style:text-properties style:font-name="Courier New" fo:font-size="10pt" style:font-size-asian="10pt"/>
    </style:style>
    <style:style style:name="T182" style:family="text">
      <style:text-properties fo:color="#ffffff" loext:opacity="100%" officeooo:rsid="00173a21" style:text-scale="110%"/>
    </style:style>
    <style:style style:name="T183" style:family="text">
      <style:text-properties fo:color="#ffffff" loext:opacity="100%" officeooo:rsid="00173a21" fo:background-color="#ff0000" loext:char-shading-value="0" style:text-scale="110%"/>
    </style:style>
    <style:style style:name="T184" style:family="text">
      <style:text-properties fo:color="#ffffff" loext:opacity="100%" officeooo:rsid="001b3d6c" fo:background-color="#ff0000" loext:char-shading-value="0" style:text-scale="110%"/>
    </style:style>
    <style:style style:name="T185" style:family="text">
      <style:text-properties style:text-scale="115%"/>
    </style:style>
    <style:style style:name="T186" style:family="text">
      <style:text-properties fo:letter-spacing="0.093cm" style:text-scale="115%"/>
    </style:style>
    <style:style style:name="T187" style:family="text">
      <style:text-properties fo:letter-spacing="-0.004cm" style:text-scale="115%"/>
    </style:style>
    <style:style style:name="T188" style:family="text">
      <style:text-properties fo:letter-spacing="-0.007cm" style:text-scale="115%"/>
    </style:style>
    <style:style style:name="T189" style:family="text">
      <style:text-properties fo:letter-spacing="-0.009cm" style:text-scale="115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37" text:outline-level="2"><text:span text:style-name="T2">Курсовая</text:span><text:span text:style-name="T3"> </text:span><text:span text:style-name="T2">работа</text:span><text:span text:style-name="T3"> </text:span><text:span text:style-name="T2">(проект)</text:span><text:span text:style-name="T3"> </text:span><text:span text:style-name="T2">по</text:span><text:span text:style-name="T3"> </text:span><text:span text:style-name="T2">системному программированию (2025-2026 уч.г.)</text:span></text:h>
        <text:h text:style-name="P33" text:outline-level="3"><text:span text:style-name="T168"/></text:h>
        <text:list text:style-name="WWNum1">
          <text:list-header>
            <text:p text:style-name="P40"><text:span text:style-name="T165">Используемый</text:span><text:span text:style-name="T169"> </text:span><text:span text:style-name="T165">индекс:</text:span><text:span text:style-name="T170"> </text:span><text:span text:style-name="T165">B*-</text:span><text:span text:style-name="T167">tree</text:span></text:p>
          </text:list-header>
        </text:list>
        <text:p text:style-name="P34"><text:span text:style-name="T167"/></text:p>
        <text:p text:style-name="P41">________ - Сысуев Павел</text:p>
        <text:p text:style-name="P42">________ - Стальной Иван</text:p>
        <text:p text:style-name="P43">________ - Горбачёв Фёдор</text:p>
        <text:p text:style-name="P34"><text:span text:style-name="T167"/></text:p>
        <text:list text:continue-numbering="true" text:style-name="WWNum1">
          <text:list-header>
            <text:p text:style-name="P45"/>
          </text:list-header>
        </text:list>
        <text:list text:style-name="WWNum2">
          <text:list-item>
            <text:p text:style-name="P46"><text:span text:style-name="T22">На языке программирования C++ (стандарт C++14 и выше) реализуйте систему управления базами данных (СУБД), поддерживающую работу с </text:span><text:span text:style-name="T28">целочисленными</text:span><text:span text:style-name="T34"> </text:span><text:span text:style-name="T28">(</text:span><text:span text:style-name="T80">int</text:span><text:span text:style-name="T28">)</text:span><text:span text:style-name="T34"> </text:span><text:span text:style-name="T28">и</text:span><text:span text:style-name="T34"> </text:span><text:span text:style-name="T28">строковыми</text:span><text:span text:style-name="T34"> </text:span><text:span text:style-name="T28">(</text:span><text:span text:style-name="T80">string</text:span><text:span text:style-name="T28">)</text:span><text:span text:style-name="T34"> </text:span><text:span text:style-name="T28">типами</text:span><text:span text:style-name="T34"> </text:span><text:span text:style-name="T28">данных.</text:span></text:p>
          </text:list-item>
        </text:list>
        <text:p text:style-name="P30"><text:span text:style-name="T121">Система</text:span><text:span text:style-name="T122"> </text:span><text:span text:style-name="T121">хранения</text:span><text:span text:style-name="T122"> </text:span><text:span text:style-name="T121">данных</text:span><text:span text:style-name="T122"> </text:span><text:span text:style-name="T121">должна</text:span><text:span text:style-name="T122"> </text:span><text:span text:style-name="T121">иметь</text:span><text:span text:style-name="T122"> </text:span><text:span text:style-name="T121">двухуровневую</text:span><text:span text:style-name="T122"> </text:span><text:span text:style-name="T121">иерархическую</text:span><text:span text:style-name="T123"> </text:span><text:span text:style-name="T6">структуру:</text:span></text:p>
        <text:p text:style-name="P31"/>
        <text:list text:continue-numbering="true" text:style-name="WWNum2">
          <text:list-item>
            <text:list>
              <text:list-item>
                <text:p text:style-name="P49"><text:span text:style-name="T23">Уровень</text:span><text:span text:style-name="T37"> </text:span><text:span text:style-name="T23">систем:</text:span><text:span text:style-name="T13"> </text:span><text:span text:style-name="T11">содержит</text:span><text:span text:style-name="T12"> </text:span><text:span text:style-name="T11">коллекцию</text:span><text:span text:style-name="T39"> </text:span><text:span text:style-name="T11">баз</text:span><text:span text:style-name="T39"> </text:span><text:span text:style-name="T30">данных.</text:span></text:p>
              </text:list-item>
              <text:list-item>
                <text:p text:style-name="P50"><text:span text:style-name="T23">Уровень</text:span><text:span text:style-name="T42"> </text:span><text:span text:style-name="T23">базы</text:span><text:span text:style-name="T42"> </text:span><text:span text:style-name="T23">данных:</text:span><text:span text:style-name="T43"> </text:span><text:span text:style-name="T11">содержит</text:span><text:span text:style-name="T44"> </text:span><text:span text:style-name="T11">коллекцию</text:span><text:span text:style-name="T44"> </text:span><text:span text:style-name="T30">таблиц.</text:span></text:p>
              </text:list-item>
              <text:list-item>
                <text:p text:style-name="P50"><text:span text:style-name="T23">Уровень</text:span><text:span text:style-name="T45"> </text:span><text:span text:style-name="T23">таблицы:</text:span><text:span text:style-name="T46"> </text:span><text:span text:style-name="T11">содержит</text:span><text:span text:style-name="T47"> </text:span><text:span text:style-name="T11">типизированные</text:span><text:span text:style-name="T47"> </text:span><text:span text:style-name="T11">данные</text:span><text:span text:style-name="T47"> </text:span><text:span text:style-name="T30">(записи).</text:span></text:p>
              </text:list-item>
            </text:list>
          </text:list-item>
        </text:list>
        <text:p text:style-name="P31"/>
        <text:p text:style-name="P32"><text:span text:style-name="T121">Взаимодействие</text:span><text:span text:style-name="T125"> </text:span><text:span text:style-name="T121">с</text:span><text:span text:style-name="T125"> </text:span><text:span text:style-name="T121">СУБД</text:span><text:span text:style-name="T126"> </text:span><text:span text:style-name="T121">осуществляется</text:span><text:span text:style-name="T126"> </text:span><text:span text:style-name="T121">посредством</text:span><text:span text:style-name="T125"> </text:span><text:span text:style-name="T121">SQL-подобного</text:span><text:span text:style-name="T126"> </text:span><text:span text:style-name="T121">языка</text:span><text:span text:style-name="T126"> </text:span><text:span text:style-name="T121">запросов (синтаксис описан ниже). Приложение должно поддерживать два режима работы, переключаемых через аргументы командной строки:</text:span></text:p>
        <text:list text:continue-numbering="true" text:style-name="WWNum2">
          <text:list-item>
            <text:p text:style-name="P51"><text:span text:style-name="T23">Интерактивный</text:span><text:span text:style-name="T20"> </text:span><text:span text:style-name="T23">режим</text:span><text:span text:style-name="T35"> </text:span><text:span text:style-name="T11">(запуск</text:span><text:span text:style-name="T36"> </text:span><text:span text:style-name="T11">без</text:span><text:span text:style-name="T36"> </text:span><text:span text:style-name="T11">аргументов</text:span><text:span text:style-name="T36"> </text:span><text:span text:style-name="T83">./prog</text:span><text:span text:style-name="T11">):</text:span><text:span text:style-name="T48"> </text:span><text:span text:style-name="T11">команды</text:span><text:span text:style-name="T36"> </text:span><text:span text:style-name="T11">вводятся пользователем в терминал, результат выводится немедленно.</text:span></text:p>
          </text:list-item>
          <text:list-item>
            <text:p text:style-name="P52"><text:span text:style-name="T26">Пакетный режим </text:span><text:span text:style-name="T77">(запуск вида </text:span><text:span text:style-name="T91">./prog script.txt</text:span><text:span text:style-name="T77">): выполнение </text:span><text:span text:style-name="T78">последовательности команд, считанных из указанного файла.</text:span></text:p>
          </text:list-item>
        </text:list>
        <text:h text:style-name="P28" text:outline-level="4"><text:span text:style-name="T2">Требования</text:span><text:span text:style-name="T127"> </text:span><text:span text:style-name="T2">к</text:span><text:span text:style-name="T129"> </text:span><text:span text:style-name="T2">хранению</text:span><text:span text:style-name="T129"> </text:span><text:span text:style-name="T2">и</text:span><text:span text:style-name="T129"> </text:span><text:span text:style-name="T2">обработке</text:span><text:span text:style-name="T129"> </text:span><text:span text:style-name="T5">данных:</text:span></text:h>
        <text:p text:style-name="P5"/>
        <text:list text:continue-numbering="true" text:style-name="WWNum2">
          <text:list-item>
            <text:list>
              <text:list-item>
                <text:p text:style-name="P53"><text:span text:style-name="T23">Надежность:</text:span><text:span text:style-name="T29"> </text:span><text:span text:style-name="T11">Все</text:span><text:span text:style-name="T30"> </text:span><text:span text:style-name="T11">данные</text:span><text:span text:style-name="T30"> </text:span><text:span text:style-name="T11">должны</text:span><text:span text:style-name="T49"> </text:span><text:span text:style-name="T11">храниться</text:span><text:span text:style-name="T49"> </text:span><text:span text:style-name="T11">в</text:span><text:span text:style-name="T49"> </text:span><text:span text:style-name="T11">файловой</text:span><text:span text:style-name="T30"> </text:span><text:span text:style-name="T11">системе.</text:span><text:span text:style-name="T49"> </text:span><text:span text:style-name="T11">Потеря данных недопустима.</text:span></text:p>
              </text:list-item>
              <text:list-item>
                <text:p text:style-name="P54"><text:span text:style-name="T23">Ограничения целостности (Constraints): </text:span><text:span text:style-name="T11">Таблицы должны поддерживать типизацию столбцов и следующие модификаторы:</text:span></text:p>
              </text:list-item>
            </text:list>
          </text:list-item>
        </text:list>
        <text:p text:style-name="P24"><draw:frame draw:style-name="fr1" draw:name="Image 1" text:anchor-type="as-char" svg:width="0.141cm" svg:height="0.141cm" draw:z-index="0"><draw:image xlink:href="Pictures/100000010000000B0000000A2721EAA1.png" xlink:type="simple" xlink:show="embed" xlink:actuate="onLoad" draw:mime-type="image/png"/></draw:frame><text:span text:style-name="T175"><text:s text:c="2"/></text:span><text:span text:style-name="T93">NOT_NULL</text:span><text:span text:style-name="T94"> </text:span><text:span text:style-name="T131">—</text:span><text:span text:style-name="T132"> </text:span><text:span text:style-name="T131">запрет</text:span><text:span text:style-name="T133"> </text:span><text:span text:style-name="T131">на</text:span><text:span text:style-name="T132"> </text:span><text:span text:style-name="T131">хранение</text:span><text:span text:style-name="T133"> </text:span><text:span text:style-name="T131">пустых</text:span><text:span text:style-name="T133"> </text:span><text:span text:style-name="T131">значений</text:span><text:span text:style-name="T133"> </text:span><text:span text:style-name="T131">(по</text:span><text:span text:style-name="T132"> </text:span><text:span text:style-name="T131">умолчанию</text:span><text:span text:style-name="T133"> </text:span><text:span text:style-name="T131">поля</text:span></text:p>
        <text:p text:style-name="P25"><text:span text:style-name="T95">nullable</text:span><text:span text:style-name="T4">).</text:span></text:p>
        <text:p text:style-name="P27"><draw:frame draw:style-name="fr1" draw:name="Image 2" text:anchor-type="as-char" svg:width="0.141cm" svg:height="0.141cm" draw:z-index="1"><draw:image xlink:href="Pictures/100000010000000B0000000BEEBD0F60.png" xlink:type="simple" xlink:show="embed" xlink:actuate="onLoad" draw:mime-type="image/png"/></draw:frame><text:span text:style-name="T176"><text:s/></text:span><text:span text:style-name="T97">INDEXED</text:span><text:span text:style-name="T98"> </text:span><text:span text:style-name="T121">—</text:span><text:span text:style-name="T130"> </text:span><text:span text:style-name="T121">поле</text:span><text:span text:style-name="T128"> </text:span><text:span text:style-name="T121">уникально,</text:span><text:span text:style-name="T130"> </text:span><text:span text:style-name="T121">не</text:span><text:span text:style-name="T128"> </text:span><text:span text:style-name="T121">может</text:span><text:span text:style-name="T128"> </text:span><text:span text:style-name="T121">быть</text:span><text:span text:style-name="T130"> </text:span><text:span text:style-name="T121">NULL.</text:span><text:span text:style-name="T130"> </text:span><text:span text:style-name="T121">Для</text:span><text:span text:style-name="T130"> </text:span><text:span text:style-name="T121">таких</text:span><text:span text:style-name="T128"> </text:span><text:span text:style-name="T121">полей</text:span><text:span text:style-name="T128"> </text:span><text:span text:style-name="T121">должен автоматически</text:span><text:span text:style-name="T134"> </text:span><text:span text:style-name="T121">создаваться</text:span><text:span text:style-name="T136"> </text:span><text:span text:style-name="T121">индекс</text:span><text:span text:style-name="T134"> </text:span><text:span text:style-name="T121">на</text:span><text:span text:style-name="T136"> </text:span><text:span text:style-name="T121">основе</text:span><text:span text:style-name="T134"> </text:span><text:span text:style-name="T121">структуры</text:span><text:span text:style-name="T136"> </text:span><text:soft-page-break/><text:span text:style-name="T121">данных</text:span><text:span text:style-name="T134"> </text:span><text:span text:style-name="T121">согласно выданному варианту.</text:span></text:p>
        <text:list text:continue-numbering="true" text:style-name="WWNum2">
          <text:list-item>
            <text:list>
              <text:list-item>
                <text:p text:style-name="P63"><text:span text:style-name="T24">Оптимизация: </text:span><text:span text:style-name="T10">При выполнении запросов выборки (</text:span><text:span text:style-name="T84">condition</text:span><text:span text:style-name="T10">) необходимо </text:span><text:span text:style-name="T11">использовать имеющиеся индексы для оптимизации поиска.</text:span></text:p>
              </text:list-item>
              <text:list-item>
                <text:p text:style-name="P55"><text:span text:style-name="T23">Хранение индексов: </text:span><text:span text:style-name="T11">Дублирование самих данных записей для построения индексов запрещено (индекс должен ссылаться на данные).</text:span></text:p>
              </text:list-item>
              <text:list-item>
                <text:p text:style-name="P56"><text:span text:style-name="T23">Валидация: </text:span><text:span text:style-name="T11">Все запросы должны проходить синтаксическую и семантическую валидацию. В случае ошибки система должна возвращать информативное описание проблемы.</text:span></text:p>
              </text:list-item>
              <text:list-item>
                <text:p text:style-name="P57"><text:span text:style-name="T23">Формат вывода: </text:span><text:span text:style-name="T11">Результатом успешного запроса выборки в терминал является массив объектов в формате JSON.</text:span></text:p>
              </text:list-item>
            </text:list>
          </text:list-item>
        </text:list>
        <text:p text:style-name="P29"><text:span text:style-name="T11"/></text:p>
        <text:list text:continue-numbering="true" text:style-name="WWNum2">
          <text:list-item>
            <text:list>
              <text:list-header>
                <text:p text:style-name="P58"><text:span text:style-name="T11"/></text:p>
                <text:p text:style-name="P58"><text:span text:style-name="T121">Программа</text:span><text:span text:style-name="T137"> </text:span><text:span text:style-name="T121">не</text:span><text:span text:style-name="T138"> </text:span><text:span text:style-name="T121">должна</text:span><text:span text:style-name="T137"> </text:span><text:span text:style-name="T121">завершаться</text:span><text:span text:style-name="T137"> </text:span><text:span text:style-name="T6">аварийно.</text:span></text:p>
              </text:list-header>
            </text:list>
          </text:list-item>
        </text:list>
      </text:section>
      <text:p text:style-name="P2"/>
      <text:h text:style-name="P22" text:outline-level="4"><text:span text:style-name="T2">Синтаксис</text:span><text:span text:style-name="T127"> </text:span><text:span text:style-name="T2">языка</text:span><text:span text:style-name="T127"> </text:span><text:span text:style-name="T5">запросов:</text:span></text:h>
      <text:p text:style-name="P11"><text:span text:style-name="T131">Команды могут занимать несколько строк и завершаются символом </text:span><text:span text:style-name="T93">;</text:span><text:span text:style-name="T131">. Ключевые слова</text:span><text:span text:style-name="T139"> </text:span><text:span text:style-name="T131">регистронезависимы (смешение регистров в одном слове не допускается). Строковые</text:span><text:span text:style-name="T139"> </text:span><text:span text:style-name="T131">литералы заключаются в двойные кавычки (</text:span><text:span text:style-name="T93">"</text:span><text:span text:style-name="T131">). Имена сущностей (БД, таблиц, колонок)</text:span><text:span text:style-name="T142"> </text:span><text:span text:style-name="T131">могут</text:span><text:span text:style-name="T145"> </text:span><text:span text:style-name="T131">содержать</text:span><text:span text:style-name="T146"> </text:span><text:span text:style-name="T131">латинские</text:span><text:span text:style-name="T145"> </text:span><text:span text:style-name="T131">буквы,</text:span><text:span text:style-name="T146"> </text:span><text:span text:style-name="T131">цифры</text:span><text:span text:style-name="T146"> </text:span><text:span text:style-name="T131">и</text:span><text:span text:style-name="T145"> </text:span><text:span text:style-name="T131">подчеркивания,</text:span><text:span text:style-name="T146"> </text:span><text:span text:style-name="T131">но</text:span><text:span text:style-name="T146"> </text:span><text:span text:style-name="T131">не</text:span><text:span text:style-name="T145"> </text:span><text:span text:style-name="T131">могут</text:span><text:span text:style-name="T145"> </text:span><text:span text:style-name="T131">начинаться</text:span><text:span text:style-name="T146"> </text:span><text:span text:style-name="T131">с цифры. </text:span><text:span text:style-name="T182">(</text:span><text:span text:style-name="T183">ЕСЛИ ВВОЖУ ЦИФРУ ПЕРВ</text:span><text:span text:style-name="T184">ЫМ СИМВОЛОМ, ТО ЗАВИСАЕТ</text:span><text:span text:style-name="T183"> ПРОГРАММА ! )</text:span><text:span text:style-name="T182"> </text:span><text:span text:style-name="T131">Обращение к таблицам возможно в формате </text:span><text:span text:style-name="T93">database_name.table_name</text:span><text:span text:style-name="T99"> </text:span><text:span text:style-name="T131">либо через предварительный выбор контекста (</text:span><text:span text:style-name="T93">USE</text:span><text:span text:style-name="T131">).</text:span></text:p>
      <text:p text:style-name="P19"><text:span text:style-name="T31">Список</text:span><text:span text:style-name="T38"> </text:span><text:span text:style-name="T31">поддерживаемых</text:span><text:span text:style-name="T38"> </text:span><text:span text:style-name="T31">операций:</text:span></text:p>
      <text:p text:style-name="P23"/>
      <text:list text:style-name="WWNum3">
        <text:list-item>
          <text:h text:style-name="P38" text:outline-level="4"><text:span text:style-name="T2">Работа</text:span><text:span text:style-name="T124"> </text:span><text:span text:style-name="T2">с</text:span><text:span text:style-name="T147"> </text:span><text:span text:style-name="T2">метаданными</text:span><text:span text:style-name="T124"> </text:span><text:span text:style-name="T148">СУБД:</text:span></text:h>
        </text:list-item>
      </text:list>
      <text:p text:style-name="P3"/>
      <text:p text:style-name="P6"><draw:frame draw:style-name="fr1" draw:name="Image 3" text:anchor-type="as-char" svg:width="0.141cm" svg:height="0.141cm" draw:z-index="2"><draw:image xlink:href="Pictures/100000010000000B0000000BEEBD0F60.png" xlink:type="simple" xlink:show="embed" xlink:actuate="onLoad" draw:mime-type="image/png"/></draw:frame><text:span text:style-name="T177"><text:s text:c="2"/></text:span><text:span text:style-name="T79">CREATE</text:span><text:span text:style-name="T100"> </text:span><text:span text:style-name="T79">DATABASE</text:span><text:span text:style-name="T100"> </text:span><text:span text:style-name="T79">[database_name];</text:span><text:span text:style-name="T102"> </text:span><text:span text:style-name="T1">—</text:span><text:span text:style-name="T143"> </text:span><text:span text:style-name="T1">создание</text:span><text:span text:style-name="T150"> </text:span><text:span text:style-name="T1">базы</text:span><text:span text:style-name="T143"> </text:span><text:span text:style-name="T1">данных.</text:span></text:p>
      <text:p text:style-name="P7"><draw:frame draw:style-name="fr1" draw:name="Image 4" text:anchor-type="as-char" svg:width="0.141cm" svg:height="0.141cm" draw:z-index="3"><draw:image xlink:href="Pictures/100000010000000B0000000A2721EAA1.png" xlink:type="simple" xlink:show="embed" xlink:actuate="onLoad" draw:mime-type="image/png"/></draw:frame><text:span text:style-name="T177"><text:s text:c="2"/></text:span><text:span text:style-name="T79">DROP</text:span><text:span text:style-name="T100"> </text:span><text:span text:style-name="T79">DATABASE</text:span><text:span text:style-name="T100"> </text:span><text:span text:style-name="T79">[database_name];</text:span><text:span text:style-name="T103"> </text:span><text:span text:style-name="T1">—</text:span><text:span text:style-name="T151"> </text:span><text:span text:style-name="T1">удаление</text:span><text:span text:style-name="T152"> </text:span><text:span text:style-name="T1">базы</text:span><text:span text:style-name="T151"> </text:span><text:span text:style-name="T1">данных.</text:span></text:p>
      <text:p text:style-name="P7"><draw:frame draw:style-name="fr1" draw:name="Image 5" text:anchor-type="as-char" svg:width="0.141cm" svg:height="0.141cm" draw:z-index="4"><draw:image xlink:href="Pictures/100000010000000B0000000BEEBD0F60.png" xlink:type="simple" xlink:show="embed" xlink:actuate="onLoad" draw:mime-type="image/png"/></draw:frame><text:span text:style-name="T178"><text:s text:c="2"/></text:span><text:span text:style-name="T79">USE</text:span><text:span text:style-name="T104"> </text:span><text:span text:style-name="T79">[database_name];</text:span><text:span text:style-name="T105"> </text:span><text:span text:style-name="T1">—</text:span><text:span text:style-name="T140"> </text:span><text:span text:style-name="T1">выбор</text:span><text:span text:style-name="T140"> </text:span><text:span text:style-name="T1">активной</text:span><text:span text:style-name="T140"> </text:span><text:span text:style-name="T1">базы</text:span><text:span text:style-name="T140"> </text:span><text:span text:style-name="T1">данных.</text:span></text:p>
      <text:p text:style-name="P10"/>
      <text:list text:continue-numbering="true" text:style-name="WWNum3">
        <text:list-item>
          <text:h text:style-name="P38" text:outline-level="4"><text:span text:style-name="T2">Работа</text:span><text:span text:style-name="T154"> </text:span><text:span text:style-name="T2">со</text:span><text:span text:style-name="T156"> </text:span><text:span text:style-name="T2">схемами</text:span><text:span text:style-name="T154"> </text:span><text:span text:style-name="T2">данных</text:span><text:span text:style-name="T156"> </text:span><text:span text:style-name="T5">(DDL):</text:span></text:h>
        </text:list-item>
      </text:list>
      <text:p text:style-name="P4"/>
      <text:p text:style-name="P6"><draw:frame draw:style-name="fr1" draw:name="Image 6" text:anchor-type="as-char" svg:width="0.141cm" svg:height="0.141cm" draw:z-index="5"><draw:image xlink:href="Pictures/100000010000000B0000000BEEBD0F60.png" xlink:type="simple" xlink:show="embed" xlink:actuate="onLoad" draw:mime-type="image/png"/></draw:frame><text:span text:style-name="T179"><text:s text:c="2"/></text:span><text:span text:style-name="T79">CREATE TABLE [table_name] (col_name_1 col_type_1</text:span></text:p>
      <text:p text:style-name="P9"><text:span text:style-name="T79">&lt;NOT_NULL|INDEXED&gt;,</text:span><text:span text:style-name="T106"> </text:span><text:span text:style-name="T79">...);</text:span><text:span text:style-name="T107"> </text:span><text:span text:style-name="T1">—</text:span><text:span text:style-name="T150"> </text:span><text:span text:style-name="T1">создание</text:span><text:span text:style-name="T158"> </text:span><text:span text:style-name="T4">таблицы.</text:span></text:p>
      <text:p text:style-name="P7"><draw:frame draw:style-name="fr1" draw:name="Image 7" text:anchor-type="as-char" svg:width="0.141cm" svg:height="0.141cm" draw:z-index="6"><draw:image xlink:href="Pictures/100000010000000B0000000A2721EAA1.png" xlink:type="simple" xlink:show="embed" xlink:actuate="onLoad" draw:mime-type="image/png"/></draw:frame><text:span text:style-name="T177"><text:s text:c="2"/></text:span><text:span text:style-name="T79">DROP</text:span><text:span text:style-name="T100"> </text:span><text:span text:style-name="T79">TABLE</text:span><text:span text:style-name="T100"> </text:span><text:span text:style-name="T79">[table_name];</text:span><text:span text:style-name="T107"> </text:span><text:span text:style-name="T1">—</text:span><text:span text:style-name="T150"> </text:span><text:span text:style-name="T1">удаление</text:span><text:span text:style-name="T159"> </text:span><text:span text:style-name="T1">таблицы.</text:span></text:p>
      <text:p text:style-name="P10"/>
      <text:list text:continue-numbering="true" text:style-name="WWNum3">
        <text:list-item>
          <text:h text:style-name="P38" text:outline-level="4"><text:span text:style-name="T5">Манипулирование</text:span><text:span text:style-name="T160"> </text:span><text:span text:style-name="T5">данными</text:span><text:span text:style-name="T161"> </text:span><text:span text:style-name="T5">(DML):</text:span></text:h>
        </text:list-item>
      </text:list>
      <text:p text:style-name="P3"/>
      <text:p text:style-name="P12"><draw:frame draw:style-name="fr1" draw:name="Image 8" text:anchor-type="as-char" svg:width="0.141cm" svg:height="0.141cm" draw:z-index="7"><draw:image xlink:href="Pictures/100000010000000B0000000A2721EAA1.png" xlink:type="simple" xlink:show="embed" xlink:actuate="onLoad" draw:mime-type="image/png"/></draw:frame><text:span text:style-name="T178"><text:s/></text:span><text:span text:style-name="T79">INSERT INTO [table_name] (col_1, ...) VALUE (val_1, ...), ...;</text:span><text:span text:style-name="T108"> </text:span><text:span text:style-name="T1">— </text:span><text:span text:style-name="T131">вставка данных. Пропущенные столбцы без </text:span><text:span text:style-name="T93">NOT_NULL</text:span><text:span text:style-name="T109"> </text:span><text:span text:style-name="T131">инициализируются </text:span><text:span text:style-name="T96">NULL</text:span><text:span text:style-name="T7">.</text:span></text:p>
      <text:p text:style-name="P13"><draw:frame draw:style-name="fr1" draw:name="Image 9" text:anchor-type="as-char" svg:width="0.141cm" svg:height="0.141cm" draw:z-index="8"><draw:image xlink:href="Pictures/100000010000000B0000000A2721EAA1.png" xlink:type="simple" xlink:show="embed" xlink:actuate="onLoad" draw:mime-type="image/png"/></draw:frame><text:span text:style-name="T180"><text:s/></text:span><text:span text:style-name="T110">UPDATE</text:span><text:span text:style-name="T111"> </text:span><text:span text:style-name="T110">[table_name]</text:span><text:span text:style-name="T111"> </text:span><text:span text:style-name="T110">SET</text:span><text:span text:style-name="T112"> </text:span><text:span text:style-name="T110">col_1</text:span><text:span text:style-name="T111"> </text:span><text:span text:style-name="T110">=</text:span><text:span text:style-name="T112"> </text:span><text:span text:style-name="T110">val_1,</text:span><text:span text:style-name="T111"> </text:span><text:span text:style-name="T110">...</text:span><text:span text:style-name="T112"> </text:span><text:span text:style-name="T110">WHERE</text:span><text:span text:style-name="T111"> </text:span><text:span text:style-name="T110">condition;</text:span><text:span text:style-name="T113"> </text:span><text:span text:style-name="T162">— обновление записей.</text:span></text:p>
      <text:p text:style-name="P8"><draw:frame draw:style-name="fr1" draw:name="Image 10" text:anchor-type="as-char" svg:width="0.141cm" svg:height="0.141cm" draw:z-index="9"><draw:image xlink:href="Pictures/100000010000000B0000000BEEBD0F60.png" xlink:type="simple" xlink:show="embed" xlink:actuate="onLoad" draw:mime-type="image/png"/></draw:frame><text:span text:style-name="T178"><text:s/></text:span><text:span text:style-name="T110">DELETE</text:span><text:span text:style-name="T115"> </text:span><text:span text:style-name="T110">FROM</text:span><text:span text:style-name="T115"> </text:span><text:span text:style-name="T110">[table_name]</text:span><text:span text:style-name="T115"> </text:span><text:span text:style-name="T110">WHERE</text:span><text:span text:style-name="T115"> </text:span><text:span text:style-name="T110">condition;</text:span><text:span text:style-name="T116"> </text:span><text:span text:style-name="T162">— удаление записей.</text:span></text:p>
      <text:p text:style-name="P14"><draw:frame draw:style-name="fr1" draw:name="Image 11" text:anchor-type="as-char" svg:width="0.141cm" svg:height="0.141cm" draw:z-index="10"><draw:image xlink:href="Pictures/100000010000000B0000000A2721EAA1.png" xlink:type="simple" xlink:show="embed" xlink:actuate="onLoad" draw:mime-type="image/png"/></draw:frame><text:span text:style-name="T178"><text:s/></text:span><text:span text:style-name="T79">SELECT</text:span><text:span text:style-name="T114"> </text:span><text:span text:style-name="T79">*|([col_1]</text:span><text:span text:style-name="T114"> </text:span><text:span text:style-name="T79">&lt;AS</text:span><text:span text:style-name="T114"> </text:span><text:span text:style-name="T79">[alias]&gt;,</text:span><text:span text:style-name="T114"> </text:span><text:span text:style-name="T79">...)</text:span><text:span text:style-name="T114"> </text:span><text:span text:style-name="T79">FROM</text:span><text:span text:style-name="T114"> </text:span><text:span text:style-name="T79">[table_name]</text:span><text:span text:style-name="T114"> </text:span><text:span text:style-name="T79">&lt;WHERE </text:span><text:soft-page-break/><text:span text:style-name="T110">condition&gt;;</text:span><text:span text:style-name="T117"> </text:span><text:span text:style-name="T162">—</text:span><text:span text:style-name="T141"> </text:span><text:span text:style-name="T162">выборка</text:span><text:span text:style-name="T141"> </text:span><text:span text:style-name="T162">данных</text:span><text:span text:style-name="T141"> </text:span><text:span text:style-name="T162">с</text:span><text:span text:style-name="T141"> </text:span><text:span text:style-name="T162">возможностью</text:span><text:span text:style-name="T141"> </text:span><text:span text:style-name="T162">задания</text:span><text:span text:style-name="T141"> </text:span><text:span text:style-name="T162">алиасов.</text:span></text:p>
      <text:p text:style-name="P20"><text:span text:style-name="T53">Условия</text:span><text:span text:style-name="T54"> </text:span><text:span text:style-name="T53">выборки </text:span><text:span text:style-name="T32">(</text:span><text:span text:style-name="T81">condition</text:span><text:span text:style-name="T32">):</text:span></text:p>
      <text:p text:style-name="P16"><text:span text:style-name="T121">Допускаются</text:span><text:span text:style-name="T155"> </text:span><text:span text:style-name="T121">логические</text:span><text:span text:style-name="T130"> </text:span><text:span text:style-name="T121">операции</text:span><text:span text:style-name="T130"> </text:span><text:span text:style-name="T121">сравнения</text:span><text:span text:style-name="T155"> </text:span><text:span text:style-name="T121">над</text:span><text:span text:style-name="T155"> </text:span><text:span text:style-name="T121">именами</text:span><text:span text:style-name="T130"> </text:span><text:span text:style-name="T121">столбцов</text:span><text:span text:style-name="T155"> </text:span><text:span text:style-name="T121">и</text:span><text:span text:style-name="T130"> </text:span><text:span text:style-name="T121">константами:</text:span><text:span text:style-name="T130"> </text:span><text:span text:style-name="T118">==</text:span><text:span text:style-name="T137">,</text:span></text:p>
      <text:p text:style-name="P21"><text:span text:style-name="T82">!=</text:span><text:span text:style-name="T9">,</text:span><text:span text:style-name="T55"> </text:span><text:span text:style-name="T82">&lt;</text:span><text:span text:style-name="T9">,</text:span><text:span text:style-name="T55"> </text:span><text:span text:style-name="T82">&gt;</text:span><text:span text:style-name="T9">,</text:span><text:span text:style-name="T55"> </text:span><text:span text:style-name="T82">&lt;=</text:span><text:span text:style-name="T9">,</text:span><text:span text:style-name="T55"> </text:span><text:span text:style-name="T85">&gt;=</text:span><text:span text:style-name="T58">.</text:span></text:p>
      <text:p text:style-name="P18"><text:span text:style-name="T121">При</text:span><text:span text:style-name="T155"> </text:span><text:span text:style-name="T121">работе</text:span><text:span text:style-name="T155"> </text:span><text:span text:style-name="T121">со</text:span><text:span text:style-name="T157"> </text:span><text:span text:style-name="T121">строками</text:span><text:span text:style-name="T155"> </text:span><text:span text:style-name="T121">сравнение</text:span><text:span text:style-name="T155"> </text:span><text:span text:style-name="T121">необходимо</text:span><text:span text:style-name="T157"> </text:span><text:span text:style-name="T121">осуществлять</text:span><text:span text:style-name="T157"> </text:span><text:span text:style-name="T121">лексикографическое </text:span><text:span text:style-name="T6">сравнение.</text:span></text:p>
      <text:p text:style-name="P15"><text:span text:style-name="T162">Для</text:span><text:span text:style-name="T149"> </text:span><text:span text:style-name="T162">диапазонов:</text:span><text:span text:style-name="T135"> </text:span><text:span text:style-name="T110">val_1</text:span><text:span text:style-name="T119"> </text:span><text:span text:style-name="T110">BETWEEN</text:span><text:span text:style-name="T119"> </text:span><text:span text:style-name="T110">val_2</text:span><text:span text:style-name="T119"> </text:span><text:span text:style-name="T110">AND</text:span><text:span text:style-name="T119"> </text:span><text:span text:style-name="T110">val_3</text:span><text:span text:style-name="T113"> </text:span><text:span text:style-name="T162">(интервал</text:span><text:span text:style-name="T8"> </text:span><text:span text:style-name="T110">[val_2,</text:span><text:span text:style-name="T119"> </text:span><text:span text:style-name="T110">val_3)</text:span><text:span text:style-name="T162">). Для</text:span><text:span text:style-name="T144"> </text:span><text:span text:style-name="T162">строк</text:span><text:span text:style-name="T144"> </text:span><text:span text:style-name="T162">(RegEx):</text:span><text:span text:style-name="T153"> </text:span><text:span text:style-name="T110">val_1</text:span><text:span text:style-name="T101"> </text:span><text:span text:style-name="T110">LIKE</text:span><text:span text:style-name="T101"> </text:span><text:span text:style-name="T110">val_2</text:span><text:span text:style-name="T162">,</text:span><text:span text:style-name="T144"> </text:span><text:span text:style-name="T162">где</text:span><text:span text:style-name="T153"> </text:span><text:span text:style-name="T110">val_2</text:span><text:span text:style-name="T120"> </text:span><text:span text:style-name="T162">—</text:span><text:span text:style-name="T144"> </text:span><text:span text:style-name="T162">регулярное</text:span><text:span text:style-name="T153"> </text:span><text:span text:style-name="T162">выражение.</text:span></text:p>
      <text:p text:style-name="P17"><text:span text:style-name="T121">Допустимо</text:span><text:span text:style-name="T123"> </text:span><text:span text:style-name="T121">использование</text:span><text:span text:style-name="T163"> </text:span><text:span text:style-name="T121">как</text:span><text:span text:style-name="T123"> </text:span><text:span text:style-name="T121">переменных,</text:span><text:span text:style-name="T123"> </text:span><text:span text:style-name="T121">так</text:span><text:span text:style-name="T123"> </text:span><text:span text:style-name="T121">и</text:span><text:span text:style-name="T163"> </text:span><text:span text:style-name="T121">констант</text:span><text:span text:style-name="T163"> </text:span><text:span text:style-name="T121">в</text:span><text:span text:style-name="T123"> </text:span><text:span text:style-name="T121">качестве</text:span><text:span text:style-name="T163"> </text:span><text:span text:style-name="T121">любого</text:span><text:span text:style-name="T123"> </text:span><text:span text:style-name="T6">значения.</text:span></text:p>
      <text:p text:style-name="P2"/>
      <text:h text:style-name="P39" text:outline-level="4"><text:span text:style-name="T185">Дополнительные</text:span><text:span text:style-name="T186"> </text:span><text:span text:style-name="T187">задания:</text:span></text:h>
      <text:p text:style-name="P35"/>
      <text:p text:style-name="P36"><text:span text:style-name="T185">Перед</text:span><text:span text:style-name="T188"> </text:span><text:span text:style-name="T185">описанием</text:span><text:span text:style-name="T189"> </text:span><text:span text:style-name="T185">задания</text:span><text:span text:style-name="T188"> </text:span><text:span text:style-name="T185">в</text:span><text:span text:style-name="T188"> </text:span><text:span text:style-name="T185">квадратных</text:span><text:span text:style-name="T189"> </text:span><text:span text:style-name="T185">скобках</text:span><text:span text:style-name="T189"> </text:span><text:span text:style-name="T185">указываются</text:span><text:span text:style-name="T188"> </text:span><text:span text:style-name="T185">номера</text:span><text:span text:style-name="T188"> </text:span><text:span text:style-name="T185">заданий,</text:span><text:span text:style-name="T188"> </text:span><text:span text:style-name="T185">которые необходимо выполнить для выполнения текущего.</text:span></text:p>
      <text:list text:style-name="WWNum4">
        <text:list-item>
          <text:p text:style-name="P44"><text:span text:style-name="T171">[0] </text:span><text:span text:style-name="T166">Реализуйте механизм темпоральной персистентности, позволяющий откатывать</text:span><text:span text:style-name="T172"> </text:span><text:span text:style-name="T166">состояние</text:span><text:span text:style-name="T173"> </text:span><text:span text:style-name="T166">всей</text:span><text:span text:style-name="T173"> </text:span><text:span text:style-name="T166">базы</text:span><text:span text:style-name="T172"> </text:span><text:span text:style-name="T166">данных</text:span><text:span text:style-name="T173"> </text:span><text:span text:style-name="T166">к</text:span><text:span text:style-name="T172"> </text:span><text:span text:style-name="T166">определенному</text:span><text:span text:style-name="T173"> </text:span><text:span text:style-name="T166">моменту</text:span><text:span text:style-name="T173"> </text:span><text:span text:style-name="T166">времени. </text:span><text:span text:style-name="T164">Команда: </text:span><text:span text:style-name="T181">REVERT [table_name] [yyyy.mm.dd-hh:mm:ss.msmsms];</text:span><text:span text:style-name="T164">. Реализация</text:span><text:span text:style-name="T174"> </text:span><text:span text:style-name="T166">через полное копирование (snapshot) файлов БД запрещена.</text:span></text:p>
        </text:list-item>
        <text:list-item>
          <text:p text:style-name="P65"><text:span text:style-name="T23">[</text:span><text:span text:style-name="T27">0]</text:span><text:span text:style-name="T51"> </text:span><text:span text:style-name="T78">Обеспечьте</text:span><text:span text:style-name="T33"> </text:span><text:span text:style-name="T78">оптимизацию</text:span><text:span text:style-name="T33"> </text:span><text:span text:style-name="T78">хранения</text:span><text:span text:style-name="T52"> </text:span><text:span text:style-name="T78">строковых</text:span><text:span text:style-name="T33"> </text:span><text:span text:style-name="T78">данных</text:span><text:span text:style-name="T33"> </text:span><text:span text:style-name="T78">в</text:span><text:span text:style-name="T52"> </text:span><text:span text:style-name="T78">оперативной</text:span><text:span text:style-name="T33"> </text:span><text:span text:style-name="T78">памяти (String</text:span><text:span text:style-name="T57"> </text:span><text:span text:style-name="T78">Interning/Deduplication).</text:span><text:span text:style-name="T57"> </text:span><text:span text:style-name="T78">Уникальные</text:span><text:span text:style-name="T64"> </text:span><text:span text:style-name="T78">строки</text:span><text:span text:style-name="T64"> </text:span><text:span text:style-name="T78">должны</text:span><text:span text:style-name="T57"> </text:span><text:span text:style-name="T78">храниться</text:span><text:span text:style-name="T57"> </text:span><text:span text:style-name="T78">в единственном экземпляре, а все использования в таблицах должны быть заменены ссылками.</text:span></text:p>
        </text:list-item>
        <text:list-item>
          <text:p text:style-name="P66"><text:span text:style-name="T23">[</text:span><text:span text:style-name="T25">0] </text:span><text:span text:style-name="T76">Реализуйте архитектуру "Клиент-Сервер". Основной функционал СУБД должен быть вынесен в серверное приложение. Клиентское приложение (терминал)</text:span><text:span text:style-name="T14"> </text:span><text:span text:style-name="T76">должно</text:span><text:span text:style-name="T40"> </text:span><text:span text:style-name="T76">отправлять</text:span><text:span text:style-name="T40"> </text:span><text:span text:style-name="T76">запросы</text:span><text:span text:style-name="T40"> </text:span><text:span text:style-name="T76">и</text:span><text:span text:style-name="T14"> </text:span><text:span text:style-name="T76">получать</text:span><text:span text:style-name="T40"> </text:span><text:span text:style-name="T76">ответы,</text:span><text:span text:style-name="T40"> </text:span><text:span text:style-name="T76">используя</text:span><text:span text:style-name="T40"> </text:span><text:span text:style-name="T76">средства межпроцессного взаимодействия (IPC) или сетевые сокеты.</text:span></text:p>
        </text:list-item>
        <text:list-item>
          <text:p text:style-name="P70"><text:span text:style-name="T23">[0, 3] </text:span><text:span text:style-name="T11">Реализуйте кластерную архитектуру серверной части. Кластер должен состоять из многопоточного узла-балансировщика (Entrypoint) и произвольного количества</text:span><text:span text:style-name="T15"> </text:span><text:span text:style-name="T11">узлов</text:span><text:span text:style-name="T15"> </text:span><text:span text:style-name="T11">хранения</text:span><text:span text:style-name="T15"> </text:span><text:span text:style-name="T11">(Storage).</text:span><text:span text:style-name="T15"> </text:span><text:span text:style-name="T11">Entrypoint</text:span><text:span text:style-name="T65"> </text:span><text:span text:style-name="T11">принимает</text:span><text:span text:style-name="T65"> </text:span><text:span text:style-name="T11">запросы</text:span><text:span text:style-name="T15"> </text:span><text:span text:style-name="T11">и</text:span><text:span text:style-name="T65"> </text:span><text:span text:style-name="T11">делегирует их Storage-серверам, обеспечивая равномерное распределение данных (шардирование). Поддержите динамическое добавление/удаление узлов хранения без остановки системы.</text:span></text:p>
        </text:list-item>
        <text:list-item>
          <text:p text:style-name="P59"><text:span text:style-name="T23">[0,</text:span><text:span text:style-name="T66"> </text:span><text:span text:style-name="T23">3]</text:span><text:span text:style-name="T69"> </text:span><text:span text:style-name="T11">Реализуйте</text:span><text:span text:style-name="T70"> </text:span><text:span text:style-name="T11">механизм</text:span><text:span text:style-name="T67"> </text:span><text:span text:style-name="T11">проверки</text:span><text:span text:style-name="T70"> </text:span><text:span text:style-name="T11">доступности</text:span><text:span text:style-name="T70"> </text:span><text:span text:style-name="T11">узлов</text:span><text:span text:style-name="T67"> </text:span><text:span text:style-name="T11">(Heartbeat).</text:span><text:span text:style-name="T70"> </text:span><text:span text:style-name="T11">Entrypoint должен периодически опрашивать Storage-серверы; при отсутствии ответа целевой сервер должен быть принудительно перезапущен.</text:span></text:p>
        </text:list-item>
        <text:list-item>
          <text:p text:style-name="P71"><text:span text:style-name="T23">[0, 3] </text:span><text:span text:style-name="T11">Реализуйте асинхронную модель обработки запросов на основе очереди запросов. При отправке длительной операции сервер сразу возвращает идентификатор</text:span><text:span text:style-name="T72"> </text:span><text:span text:style-name="T11">запроса</text:span><text:span text:style-name="T72"> </text:span><text:span text:style-name="T11">(GUID</text:span><text:span text:style-name="T36"> </text:span><text:span text:style-name="T11">v4).</text:span><text:span text:style-name="T72"> </text:span><text:span text:style-name="T11">Должен</text:span><text:span text:style-name="T72"> </text:span><text:span text:style-name="T11">быть</text:span><text:span text:style-name="T72"> </text:span><text:span text:style-name="T11">реализован</text:span><text:span text:style-name="T72"> </text:span><text:span text:style-name="T11">механизм</text:span><text:span text:style-name="T36"> </text:span><text:span text:style-name="T11">(API)</text:span><text:span text:style-name="T36"> </text:span><text:span text:style-name="T11">для последующего получения статуса и результата выполнения по этому </text:span><text:span text:style-name="T30">идентификатору.</text:span></text:p>
        </text:list-item>
        <text:list-item>
          <text:p text:style-name="P47"><text:span text:style-name="T23">[0]</text:span><text:span text:style-name="T50"> </text:span><text:span text:style-name="T11">Реализуйте</text:span><text:span text:style-name="T30"> </text:span><text:span text:style-name="T11">подсистему</text:span><text:span text:style-name="T30"> </text:span><text:span text:style-name="T11">логирования</text:span><text:span text:style-name="T49"> </text:span><text:span text:style-name="T11">активности</text:span><text:span text:style-name="T30"> </text:span><text:span text:style-name="T11">(Access</text:span><text:span text:style-name="T49"> </text:span><text:span text:style-name="T11">Logs).</text:span><text:span text:style-name="T49"> </text:span><text:span text:style-name="T11">Серверное приложение</text:span><text:span text:style-name="T18"> </text:span><text:span text:style-name="T11">должно</text:span><text:span text:style-name="T74"> </text:span><text:span text:style-name="T11">записывать</text:span><text:span text:style-name="T74"> </text:span><text:span text:style-name="T11">в</text:span><text:span text:style-name="T74"> </text:span><text:span text:style-name="T11">файл</text:span><text:span text:style-name="T74"> </text:span><text:span text:style-name="T11">информацию</text:span><text:span text:style-name="T18"> </text:span><text:span text:style-name="T11">о</text:span><text:span text:style-name="T74"> </text:span><text:span text:style-name="T11">каждом</text:span><text:span text:style-name="T18"> </text:span><text:span text:style-name="T11">запросе:</text:span><text:span text:style-name="T18"> </text:span><text:span text:style-name="T11">тело запроса, ID клиента, ID обработчика, время начала и завершения обработки, статус/код возврата.</text:span></text:p>
        </text:list-item>
        <text:list-item>
          <text:p text:style-name="P48"><text:span text:style-name="T23">[0]</text:span><text:span text:style-name="T17"> </text:span><text:span text:style-name="T11">Реализуйте</text:span><text:span text:style-name="T56"> </text:span><text:span text:style-name="T11">децентрализованную</text:span><text:span text:style-name="T56"> </text:span><text:span text:style-name="T11">подсистему</text:span><text:span text:style-name="T56"> </text:span><text:span text:style-name="T11">сбора</text:span><text:span text:style-name="T16"> </text:span><text:span text:style-name="T11">телеметрии.</text:span><text:span text:style-name="T16"> </text:span><text:span text:style-name="T11">Система должна вычислять и отображать в реальном времени метрики производительности: текущий RPS (запросов в секунду), средний и максимальный RPS за 10 минут, среднее время обработки за 10 секунд, количество ошибок (Error Rate) за последнюю минуту.</text:span></text:p>
        </text:list-item>
        <text:list-item>
          <text:p text:style-name="P64"><text:span text:style-name="T23">[0,</text:span><text:span text:style-name="T60"> </text:span><text:span text:style-name="T23">3]</text:span><text:span text:style-name="T63"> </text:span><text:span text:style-name="T11">Реализуйте</text:span><text:span text:style-name="T72"> </text:span><text:span text:style-name="T11">подсистему</text:span><text:span text:style-name="T72"> </text:span><text:span text:style-name="T11">разграничения</text:span><text:span text:style-name="T61"> </text:span><text:span text:style-name="T11">доступа</text:span><text:span text:style-name="T61"> </text:span><text:span text:style-name="T11">(RBAC)</text:span><text:span text:style-name="T72"> </text:span><text:span text:style-name="T11">и</text:span><text:span text:style-name="T72"> </text:span><text:span text:style-name="T30">аутентификации.</text:span></text:p>
        </text:list-item>
      </text:list>
      <text:p text:style-name="P26"/>
      <text:list text:continue-numbering="true" text:style-name="WWNum4">
        <text:list-item>
          <text:list>
            <text:list-item>
              <text:p text:style-name="P60"><text:span text:style-name="T11">Для каждой базы данных настраиваются права по умолчанию для пользователей и групп. Необходимо разграничать доступ к чтению, записи</text:span><text:span text:style-name="T16"> </text:span><text:span text:style-name="T11">данных</text:span><text:span text:style-name="T16"> </text:span><text:span text:style-name="T11">в</text:span><text:span text:style-name="T18"> </text:span><text:span text:style-name="T11">таблицу,</text:span><text:span text:style-name="T18"> </text:span><text:span text:style-name="T11">созданию,</text:span><text:span text:style-name="T18"> </text:span><text:span text:style-name="T11">удалению</text:span><text:span text:style-name="T16"> </text:span><text:span text:style-name="T11">таблиц,</text:span><text:span text:style-name="T18"> </text:span><text:span text:style-name="T11">удалению</text:span><text:span text:style-name="T16"> </text:span><text:span text:style-name="T11">базы данных.</text:span><text:span text:style-name="T12"> </text:span><text:span text:style-name="T11">Пользователь</text:span><text:span text:style-name="T12"> </text:span><text:span text:style-name="T11">имеет</text:span><text:span text:style-name="T59"> </text:span><text:span text:style-name="T11">право</text:span><text:span text:style-name="T12"> </text:span><text:span text:style-name="T11">на</text:span><text:span text:style-name="T12"> </text:span><text:span text:style-name="T11">выполнение</text:span><text:span text:style-name="T59"> </text:span><text:span text:style-name="T11">операции,</text:span><text:span text:style-name="T12"> </text:span><text:span text:style-name="T11">если</text:span><text:span text:style-name="T59"> </text:span><text:span text:style-name="T11">это разрешают</text:span><text:span text:style-name="T30"> </text:span><text:span text:style-name="T11">доступа</text:span><text:span text:style-name="T49"> </text:span><text:span text:style-name="T11">по</text:span><text:span text:style-name="T49"> </text:span><text:span text:style-name="T11">умолчанию,</text:span><text:span text:style-name="T49"> </text:span><text:span text:style-name="T11">он</text:span><text:span text:style-name="T49"> </text:span><text:span text:style-name="T11">состоит</text:span><text:span text:style-name="T30"> </text:span><text:span text:style-name="T11">хотя</text:span><text:span text:style-name="T49"> </text:span><text:span text:style-name="T11">бы</text:span><text:span text:style-name="T49"> </text:span><text:span text:style-name="T11">в</text:span><text:span text:style-name="T49"> </text:span><text:span text:style-name="T11">одной</text:span><text:span text:style-name="T30"> </text:span><text:span text:style-name="T11">группе, имеющей доступ, или если доступ выделен лично для него.</text:span></text:p>
            </text:list-item>
            <text:list-item>
              <text:p text:style-name="P61"><text:span text:style-name="T11">Реализуйте</text:span><text:span text:style-name="T30"> </text:span><text:span text:style-name="T11">хранилище</text:span><text:span text:style-name="T30"> </text:span><text:span text:style-name="T11">аккаунтов.</text:span><text:span text:style-name="T49"> </text:span><text:span text:style-name="T11">Пароли</text:span><text:span text:style-name="T30"> </text:span><text:span text:style-name="T11">запрещено</text:span><text:span text:style-name="T49"> </text:span><text:span text:style-name="T11">хранить</text:span><text:span text:style-name="T49"> </text:span><text:span text:style-name="T11">в</text:span><text:span text:style-name="T49"> </text:span><text:soft-page-break/><text:span text:style-name="T11">открытом виде (использовать хэширование с солью).</text:span></text:p>
            </text:list-item>
            <text:list-item>
              <text:p text:style-name="P62"><text:span text:style-name="T11">Аутентификация</text:span><text:span text:style-name="T65"> </text:span><text:span text:style-name="T11">должна</text:span><text:span text:style-name="T65"> </text:span><text:span text:style-name="T11">производиться</text:span><text:span text:style-name="T65"> </text:span><text:span text:style-name="T11">с</text:span><text:span text:style-name="T70"> </text:span><text:span text:style-name="T11">выдачей</text:span><text:span text:style-name="T70"> </text:span><text:span text:style-name="T11">JWT-токена,</text:span><text:span text:style-name="T65"> </text:span><text:span text:style-name="T11">который</text:span><text:span text:style-name="T70"> </text:span><text:span text:style-name="T11">в дальнейшем используется для авторизации запросов.</text:span></text:p>
            </text:list-item>
          </text:list>
        </text:list-item>
        <text:list-item>
          <text:p text:style-name="P67"><text:span text:style-name="T23">[0]</text:span><text:span text:style-name="T66"> </text:span><text:span text:style-name="T11">Реализуйте</text:span><text:span text:style-name="T70"> </text:span><text:span text:style-name="T11">поддержку</text:span><text:span text:style-name="T70"> </text:span><text:span text:style-name="T11">значений</text:span><text:span text:style-name="T67"> </text:span><text:span text:style-name="T11">по</text:span><text:span text:style-name="T70"> </text:span><text:span text:style-name="T11">умолчанию.</text:span><text:span text:style-name="T70"> </text:span><text:span text:style-name="T11">Расширьте</text:span><text:span text:style-name="T67"> </text:span><text:span text:style-name="T11">синтаксис</text:span><text:span text:style-name="T70"> </text:span><text:span text:style-name="T83">CREATE </text:span><text:span text:style-name="T84">TABLE</text:span><text:span text:style-name="T87"> </text:span><text:span text:style-name="T10">модификатором</text:span><text:span text:style-name="T62"> </text:span><text:span text:style-name="T84">DEFAULT</text:span><text:span text:style-name="T88"> </text:span><text:span text:style-name="T84">[value]</text:span><text:span text:style-name="T10">.</text:span><text:span text:style-name="T73"> </text:span><text:span text:style-name="T10">При</text:span><text:span text:style-name="T19"> </text:span><text:span text:style-name="T10">вставке</text:span><text:span text:style-name="T19"> </text:span><text:span text:style-name="T10">данных</text:span><text:span text:style-name="T19"> </text:span><text:span text:style-name="T10">(</text:span><text:span text:style-name="T84">INSERT</text:span><text:span text:style-name="T10">),</text:span><text:span text:style-name="T73"> </text:span><text:span text:style-name="T10">если </text:span><text:span text:style-name="T11">значение для столбца не передано, должно использоваться значение по </text:span><text:span text:style-name="T7">умолчанию.</text:span></text:p>
        </text:list-item>
      </text:list>
      <text:p text:style-name="P2"/>
      <text:list text:continue-numbering="true" text:style-name="WWNum4">
        <text:list-item>
          <text:p text:style-name="P69" loext:marker-style-name="T164"><text:span text:style-name="T23">[</text:span><text:span text:style-name="T27">0] </text:span><text:span text:style-name="T78">Реализуйте поддержку составных логических выражений в условных конструкциях</text:span><text:span text:style-name="T41"> </text:span><text:span text:style-name="T78">(</text:span><text:span text:style-name="T92">WHERE</text:span><text:span text:style-name="T78">).</text:span><text:span text:style-name="T33"> </text:span><text:span text:style-name="T78">Расширьте</text:span><text:span text:style-name="T41"> </text:span><text:span text:style-name="T78">синтаксис</text:span><text:span text:style-name="T41"> </text:span><text:span text:style-name="T78">запросов</text:span><text:span text:style-name="T33"> </text:span><text:span text:style-name="T78">операторами</text:span><text:span text:style-name="T41"> </text:span><text:span text:style-name="T78">булевой алгебры</text:span><text:span text:style-name="T68"> </text:span><text:span text:style-name="T92">AND</text:span><text:span text:style-name="T89"> </text:span><text:span text:style-name="T78">и</text:span><text:span text:style-name="T71"> </text:span><text:span text:style-name="T92">OR</text:span><text:span text:style-name="T89"> </text:span><text:span text:style-name="T78">для</text:span><text:span text:style-name="T71"> </text:span><text:span text:style-name="T78">объединения</text:span><text:span text:style-name="T68"> </text:span><text:span text:style-name="T78">предикатов.</text:span><text:span text:style-name="T71"> </text:span><text:span text:style-name="T78">Обеспечьте</text:span><text:span text:style-name="T71"> </text:span><text:span text:style-name="T78">корректный</text:span><text:span text:style-name="T68"> </text:span><text:span text:style-name="T78">парсинг и</text:span><text:span text:style-name="T21"> </text:span><text:span text:style-name="T78">вычисление</text:span><text:span text:style-name="T21"> </text:span><text:span text:style-name="T78">приоритета</text:span><text:span text:style-name="T75"> </text:span><text:span text:style-name="T78">операций,</text:span><text:span text:style-name="T75"> </text:span><text:span text:style-name="T78">включая</text:span><text:span text:style-name="T75"> </text:span><text:span text:style-name="T78">поддержку</text:span><text:span text:style-name="T21"> </text:span><text:span text:style-name="T78">группировки</text:span><text:span text:style-name="T21"> </text:span><text:span text:style-name="T78">условий</text:span><text:span text:style-name="T21"> </text:span><text:span text:style-name="T78">с помощью</text:span><text:span text:style-name="T52"> </text:span><text:span text:style-name="T78">круглых</text:span><text:span text:style-name="T52"> </text:span><text:span text:style-name="T78">скобок </text:span><text:span text:style-name="T92">(</text:span><text:span text:style-name="T86"> </text:span><text:span text:style-name="T92">...</text:span><text:span text:style-name="T86"> </text:span><text:span text:style-name="T92">)</text:span><text:span text:style-name="T76">.</text:span></text:p>
        </text:list-item>
        <text:list-item>
          <text:p text:style-name="P68"><text:span text:style-name="T24">[0] </text:span><text:span text:style-name="T10">Реализуйте поддержку агрегатных функций </text:span><text:span text:style-name="T84">SUM</text:span><text:span text:style-name="T10">, </text:span><text:span text:style-name="T84">COUNT</text:span><text:span text:style-name="T10">, </text:span><text:span text:style-name="T84">AVG</text:span><text:span text:style-name="T90"> </text:span><text:span text:style-name="T10">в команде </text:span><text:span text:style-name="T84">SELECT</text:span><text:span text:style-name="T10">, </text:span><text:span text:style-name="T11">которые должны осуществлять расчет суммы, количества строк, среднего среди всех подходящих значений выбранного столбца соответственно.</text:span></text:p>
        </text:list-item>
      </text:list>
      <text:p text:style-name="P1"><text:span text:style-name="T1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rebuchet MS" fo:font-family="'Trebuchet MS'" style:font-family-generic="roman" style:font-pitch="variable" fo:language="ru" fo:country="RU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23cm"/>
      <style:text-properties style:font-name="Trebuchet MS" fo:font-family="'Trebuchet MS'" style:font-family-generic="roman" style:font-pitch="variable" fo:font-size="10pt" fo:language="ru" fo:country="RU" style:font-name-asian="Trebuchet MS1" style:font-family-asian="'Trebuchet MS'" style:font-family-generic-asian="system" style:font-pitch-asian="variable" style:font-size-asian="10pt" style:language-asian="en" style:country-asian="US" style:font-name-complex="Trebuchet MS1" style:font-family-complex="'Trebuchet MS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12cm" fo:margin-top="0.148cm" fo:margin-bottom="0cm" style:contextual-spacing="false"/>
      <style:text-properties style:font-name="Trebuchet MS" fo:font-family="'Trebuchet MS'" style:font-family-generic="roman" style:font-pitch="variable" fo:font-size="20pt" fo:language="ru" fo:country="RU" fo:font-weight="bold" style:font-name-asian="Trebuchet MS1" style:font-family-asian="'Trebuchet MS'" style:font-family-generic-asian="system" style:font-pitch-asian="variable" style:font-size-asian="20pt" style:language-asian="en" style:country-asian="US" style:font-weight-asian="bold" style:font-name-complex="Trebuchet MS1" style:font-family-complex="'Trebuchet MS'" style:font-family-generic-complex="system" style:font-pitch-complex="variable" style:font-size-complex="20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12cm" fo:margin-top="0.434cm" fo:margin-bottom="0cm" style:contextual-spacing="false"/>
      <style:text-properties style:font-name="Trebuchet MS" fo:font-family="'Trebuchet MS'" style:font-family-generic="roman" style:font-pitch="variable" fo:font-size="12pt" fo:language="ru" fo:country="RU" fo:font-weight="bold" style:font-name-asian="Trebuchet MS1" style:font-family-asian="'Trebuchet MS'" style:font-family-generic-asian="system" style:font-pitch-asian="variable" style:font-size-asian="12pt" style:language-asian="en" style:country-asian="US" style:font-weight-asian="bold" style:font-name-complex="Trebuchet MS1" style:font-family-complex="'Trebuchet MS'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012cm"/>
      <style:text-properties style:font-name="Trebuchet MS" fo:font-family="'Trebuchet MS'" style:font-family-generic="roman" style:font-pitch="variable" fo:font-size="10pt" fo:language="ru" fo:country="RU" fo:font-weight="bold" style:font-name-asian="Trebuchet MS1" style:font-family-asian="'Trebuchet MS'" style:font-family-generic-asian="system" style:font-pitch-asian="variable" style:font-size-asian="10pt" style:language-asian="en" style:country-asian="US" style:font-weight-asian="bold" style:font-name-complex="Trebuchet MS1" style:font-family-complex="'Trebuchet MS'" style:font-family-generic-complex="system" style:font-pitch-complex="variable" style:font-size-complex="10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23cm" fo:text-indent="-0.476cm" style:auto-text-indent="false"/>
      <style:text-properties style:font-name="Trebuchet MS" fo:font-family="'Trebuchet MS'" style:font-family-generic="roman" style:font-pitch="variable" fo:language="ru" fo:country="RU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ru" fo:country="R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fo:font-size="6pt" fo:language="ru" fo:country="RU" fo:font-style="normal" fo:font-weight="normal" style:font-name-asian="Times New Roman1" style:font-family-asian="'Times New Roman'" style:font-family-generic-asian="system" style:font-pitch-asian="variable" style:font-size-asian="6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6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fo:color="#212121" loext:opacity="100%" style:font-name="Trebuchet MS" fo:font-family="'Trebuchet MS'" style:font-family-generic="roman" style:font-pitch="variable" fo:font-size="10pt" fo:letter-spacing="-0.014cm" fo:language="ru" fo:country="RU" fo:font-style="normal" fo:font-weight="normal" style:font-name-asian="Trebuchet MS1" style:font-family-asian="'Trebuchet MS'" style:font-family-generic-asian="system" style:font-pitch-asian="variable" style:font-size-asian="10pt" style:language-asian="en" style:country-asian="US" style:font-style-asian="normal" style:font-weight-asian="normal" style:font-name-complex="Trebuchet MS1" style:font-family-complex="'Trebuchet MS'" style:font-family-generic-complex="system" style:font-pitch-complex="variable" style:font-size-complex="10pt" style:language-complex="ar" style:country-complex="SA" style:font-style-complex="normal" style:font-weight-complex="normal" style:text-scale="86%"/>
    </style:style>
    <style:style style:name="ListLabel_20_11" style:display-name="ListLabel 11" style:family="text">
      <style:text-properties style:text-position="super 58%" fo:font-size="6pt" fo:language="ru" fo:country="RU" fo:font-style="normal" fo:font-weight="normal" style:font-name-asian="Times New Roman1" style:font-family-asian="'Times New Roman'" style:font-family-generic-asian="system" style:font-pitch-asian="variable" style:font-size-asian="6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6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fo:color="#212121" loext:opacity="100%" style:font-name="Trebuchet MS" fo:font-family="'Trebuchet MS'" style:font-family-generic="roman" style:font-pitch="variable" fo:font-size="10pt" fo:letter-spacing="-0.014cm" fo:language="ru" fo:country="RU" fo:font-style="normal" fo:font-weight="normal" style:font-name-asian="Trebuchet MS1" style:font-family-asian="'Trebuchet MS'" style:font-family-generic-asian="system" style:font-pitch-asian="variable" style:font-size-asian="10pt" style:language-asian="en" style:country-asian="US" style:font-style-asian="normal" style:font-weight-asian="normal" style:font-name-complex="Trebuchet MS1" style:font-family-complex="'Trebuchet MS'" style:font-family-generic-complex="system" style:font-pitch-complex="variable" style:font-size-complex="10pt" style:language-complex="ar" style:country-complex="SA" style:font-style-complex="normal" style:font-weight-complex="normal" style:text-scale="86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etter-spacing="-0.002cm" fo:language="ru" fo:country="RU" style:language-asian="en" style:country-asian="US" style:language-complex="ar" style:country-complex="SA" style:text-scale="103%"/>
    </style:style>
    <style:style style:name="ListLabel_20_29" style:display-name="ListLabel 29" style:family="text">
      <style:text-properties style:text-position="super 58%" fo:font-size="6pt" fo:language="ru" fo:country="RU" fo:font-style="normal" fo:font-weight="normal" style:font-name-asian="Times New Roman1" style:font-family-asian="'Times New Roman'" style:font-family-generic-asian="system" style:font-pitch-asian="variable" style:font-size-asian="6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6pt" style:language-complex="ar" style:country-complex="SA" style:font-style-complex="normal" style:font-weight-complex="normal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fo:color="#212121" loext:opacity="100%" style:font-name="Trebuchet MS" fo:font-family="'Trebuchet MS'" style:font-family-generic="roman" style:font-pitch="variable" fo:font-size="10pt" fo:letter-spacing="-0.014cm" fo:language="ru" fo:country="RU" fo:font-style="normal" fo:font-weight="normal" style:font-name-asian="Trebuchet MS1" style:font-family-asian="'Trebuchet MS'" style:font-family-generic-asian="system" style:font-pitch-asian="variable" style:font-size-asian="10pt" style:language-asian="en" style:country-asian="US" style:font-style-asian="normal" style:font-weight-asian="normal" style:font-name-complex="Trebuchet MS1" style:font-family-complex="'Trebuchet MS'" style:font-family-generic-complex="system" style:font-pitch-complex="variable" style:font-size-complex="10pt" style:language-complex="ar" style:country-complex="SA" style:font-style-complex="normal" style:font-weight-complex="normal" style:text-scale="86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0010000000A0000000BBCEEB7AD.png" xlink:type="simple" xlink:show="embed" xlink:actuate="onLoad">
        <style:list-level-properties text:list-level-position-and-space-mode="label-alignment" style:vertical-pos="middle" style:vertical-rel="line" fo:width="0.252cm" fo:height="0.279cm">
          <style:list-level-label-alignment text:label-followed-by="listtab" fo:text-indent="-0.476cm" fo:margin-left="1.423cm"/>
        </style:list-level-properties>
      </text:list-level-style-image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2.96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4.52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6.08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7.64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9.20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10.7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12.31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13.8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564cm" fo:margin-left="1.423cm"/>
        </style:list-level-properties>
      </text:list-level-style-number>
      <text:list-level-style-image text:level="2" xlink:href="Pictures/100000010000000B0000000BEEBD0F60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476cm" fo:margin-left="2.835cm"/>
        </style:list-level-properties>
      </text:list-level-style-image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4.396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5.97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7.54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9.11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10.69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12.2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13.8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564cm" fo:margin-left="1.423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2.969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4.526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6.085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7.643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9.202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0.76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2.317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3.8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503cm" fo:margin-left="0.012cm"/>
        </style:list-level-properties>
      </text:list-level-style-number>
      <text:list-level-style-image text:level="2" xlink:href="Pictures/100000010000000A0000000BBCEEB7AD.png" xlink:type="simple" xlink:show="embed" xlink:actuate="onLoad">
        <style:list-level-properties text:list-level-position-and-space-mode="label-alignment" style:vertical-pos="middle" style:vertical-rel="line" fo:width="0.252cm" fo:height="0.279cm">
          <style:list-level-label-alignment text:label-followed-by="listtab" fo:text-indent="-0.476cm" fo:margin-left="1.423cm"/>
        </style:list-level-properties>
      </text:list-level-style-image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3.141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4.874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6.604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8.336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10.067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11.79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476cm" fo:margin-left="13.52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564cm" fo:margin-left="1.423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2.969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4.526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6.085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7.643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9.202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0.76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2.317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3.8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399cm" fo:margin-bottom="0.494cm" fo:margin-left="1.998cm" fo:margin-right="1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998cm" fo:margin-right="1.998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5:18:20</meta:creation-date>
    <dc:date>2026-05-28T22:52:38.068354108</dc:date>
    <meta:editing-duration>PT31M23S</meta:editing-duration>
    <meta:generator>LibreOffice/24.2.7.2$Linux_X86_64 LibreOffice_project/420$Build-2</meta:generator>
    <meta:editing-cycles>4</meta:editing-cycles>
    <meta:document-statistic meta:table-count="0" meta:image-count="11" meta:object-count="0" meta:page-count="5" meta:paragraph-count="64" meta:word-count="958" meta:character-count="7671" meta:non-whitespace-character-count="6779"/>
    <meta:user-defined meta:name="AppVersion">12.0000</meta:user-defined>
    <meta:user-defined meta:name="Converter">SolidFramework v10.0.19910.1</meta:user-defined>
    <meta:user-defined meta:name="Created" meta:value-type="date">2026-02-20T00:00:00</meta:user-defined>
    <meta:user-defined meta:name="LastSaved" meta:value-type="date">2026-02-20T00:00:00</meta:user-defined>
    <meta:user-defined meta:name="Producer" meta:value-type="string">Qt 5.5.1</meta:user-defined>
    <meta:template xlink:type="simple" xlink:actuate="onRequest" xlink:title="Normal" xlink:href=""/>
  </office:meta>
</office:document-meta>
</file>