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0000002DA58C8A6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ar font-ibm-plex-mono" svg:font-family="'var font-ibm-plex-mono'"/>
  </office:font-face-decls>
  <office:automatic-styles>
    <style:style style:name="Таблица2" style:family="table">
      <style:table-properties style:width="10.596cm" table:align="left"/>
    </style:style>
    <style:style style:name="Таблица2.A" style:family="table-column">
      <style:table-column-properties style:column-width="1.411cm"/>
    </style:style>
    <style:style style:name="Таблица2.B" style:family="table-column">
      <style:table-column-properties style:column-width="1.856cm"/>
    </style:style>
    <style:style style:name="Таблица2.C" style:family="table-column">
      <style:table-column-properties style:column-width="7.32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418cm" table:align="left"/>
    </style:style>
    <style:style style:name="Таблица3.A" style:family="table-column">
      <style:table-column-properties style:column-width="4.803cm"/>
    </style:style>
    <style:style style:name="Таблица3.B" style:family="table-column">
      <style:table-column-properties style:column-width="2.127cm"/>
    </style:style>
    <style:style style:name="Таблица3.C" style:family="table-column">
      <style:table-column-properties style:column-width="4.232cm"/>
    </style:style>
    <style:style style:name="Таблица3.D" style:family="table-column">
      <style:table-column-properties style:column-width="5.256cm"/>
    </style:style>
    <style:style style:name="Таблица3.A1" style:family="table-cell">
      <style:table-cell-properties style:vertical-align="middle" fo:padding="0.049cm" fo:border="none"/>
    </style:style>
    <style:style style:name="Таблица1" style:family="table">
      <style:table-properties style:width="17.461cm" table:align="left"/>
    </style:style>
    <style:style style:name="Таблица1.A" style:family="table-column">
      <style:table-column-properties style:column-width="5.978cm"/>
    </style:style>
    <style:style style:name="Таблица1.B" style:family="table-column">
      <style:table-column-properties style:column-width="2.127cm"/>
    </style:style>
    <style:style style:name="Таблица1.C" style:family="table-column">
      <style:table-column-properties style:column-width="9.356cm"/>
    </style:style>
    <style:style style:name="Таблица1.A1" style:family="table-cell">
      <style:table-cell-properties style:vertical-align="middle" fo:padding="0.049cm" fo:border="none"/>
    </style:style>
    <style:style style:name="Таблица4" style:family="table">
      <style:table-properties style:width="17.755cm" table:align="left"/>
    </style:style>
    <style:style style:name="Таблица4.A" style:family="table-column">
      <style:table-column-properties style:column-width="2.265cm"/>
    </style:style>
    <style:style style:name="Таблица4.B" style:family="table-column">
      <style:table-column-properties style:column-width="4.665cm"/>
    </style:style>
    <style:style style:name="Таблица4.C" style:family="table-column">
      <style:table-column-properties style:column-width="3.676cm"/>
    </style:style>
    <style:style style:name="Таблица4.D" style:family="table-column">
      <style:table-column-properties style:column-width="7.14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5.277cm" table:align="left"/>
    </style:style>
    <style:style style:name="Таблица5.A" style:family="table-column">
      <style:table-column-properties style:column-width="4.687cm"/>
    </style:style>
    <style:style style:name="Таблица5.B" style:family="table-column">
      <style:table-column-properties style:column-width="1.916cm"/>
    </style:style>
    <style:style style:name="Таблица5.C" style:family="table-column">
      <style:table-column-properties style:column-width="8.675cm"/>
    </style:style>
    <style:style style:name="Таблица5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line-height="100%"/>
      <style:text-properties officeooo:rsid="0014976c" officeooo:paragraph-rsid="0014976c"/>
    </style:style>
    <style:style style:name="P3" style:family="paragraph" style:parent-style-name="Heading_20_3">
      <style:paragraph-properties fo:line-height="100%"/>
      <style:text-properties fo:font-size="14pt" style:text-underline-style="none" fo:font-weight="normal" officeooo:rsid="001559ba" officeooo:paragraph-rsid="001559ba" style:font-size-asian="12.25pt" style:font-weight-asian="normal" style:font-size-complex="14pt" style:font-weight-complex="normal"/>
    </style:style>
    <style:style style:name="P4" style:family="paragraph" style:parent-style-name="Heading_20_3" style:list-style-name="WWNum3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>
        <style:tab-stops>
          <style:tab-stop style:position="1.42cm"/>
        </style:tab-stops>
      </style:paragraph-properties>
      <style:text-properties fo:font-size="26pt" style:text-underline-style="solid" style:text-underline-width="auto" style:text-underline-color="font-color" officeooo:paragraph-rsid="0014b68e" fo:background-color="#ffffff" style:font-size-asian="26pt" style:font-size-complex="26pt"/>
    </style:style>
    <style:style style:name="P5" style:family="paragraph" style:parent-style-name="Heading_20_3" style:master-page-name="">
      <style:paragraph-properties fo:line-height="100%" fo:text-align="justify" style:justify-single-word="false" style:page-number="auto"/>
      <style:text-properties fo:font-size="26pt" style:text-underline-style="solid" style:text-underline-width="auto" style:text-underline-color="font-color" officeooo:paragraph-rsid="0014976c" style:font-size-asian="26pt" style:font-size-complex="26pt"/>
    </style:style>
    <style:style style:name="P6" style:family="paragraph" style:parent-style-name="Heading_20_3" style:list-style-name="WWNum3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1.42cm"/>
        </style:tab-stops>
      </style:paragraph-properties>
      <style:text-properties officeooo:paragraph-rsid="0014976c"/>
    </style:style>
    <style:style style:name="P7" style:family="paragraph" style:parent-style-name="Heading_20_3" style:list-style-name="WWNum3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>
        <style:tab-stops>
          <style:tab-stop style:position="1.42cm"/>
        </style:tab-stops>
      </style:paragraph-properties>
      <style:text-properties officeooo:paragraph-rsid="0014b68e"/>
    </style:style>
    <style:style style:name="P8" style:family="paragraph" style:parent-style-name="Heading_20_3" style:list-styl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fo:background-color="transparent" fo:keep-with-next="always">
        <style:tab-stops>
          <style:tab-stop style:position="1.42cm"/>
        </style:tab-stops>
      </style:paragraph-properties>
      <style:text-properties officeooo:paragraph-rsid="0014976c"/>
    </style:style>
    <style:style style:name="P9" style:family="paragraph" style:parent-style-name="Heading_20_3" style:list-styl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1.42cm"/>
        </style:tab-stops>
      </style:paragraph-properties>
      <style:text-properties officeooo:paragraph-rsid="0014976c"/>
    </style:style>
    <style:style style:name="P10" style:family="paragraph" style:parent-style-name="Heading_20_3">
      <style:paragraph-properties fo:line-height="100%"/>
    </style:style>
    <style:style style:name="P11" style:family="paragraph" style:parent-style-name="Heading_20_4">
      <style:paragraph-properties fo:line-height="100%"/>
    </style:style>
    <style:style style:name="P12" style:family="paragraph" style:parent-style-name="Heading_20_4">
      <style:paragraph-properties fo:margin-left="0cm" fo:margin-right="0cm" fo:line-height="100%" fo:text-indent="0cm" style:auto-text-indent="false"/>
    </style:style>
    <style:style style:name="P13" style:family="paragraph" style:parent-style-name="Horizontal_20_Line">
      <style:paragraph-properties fo:line-height="100%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47cm" style:contextual-spacing="false" fo:line-height="100%" fo:text-indent="0cm" style:auto-text-indent="false" fo:background-color="#ffffff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247cm" style:contextual-spacing="false" fo:line-height="100%" fo:background-color="#ffffff"/>
    </style:style>
    <style:style style:name="P16" style:family="paragraph" style:parent-style-name="Preformatted_20_Text" style:list-style-name="L50">
      <loext:graphic-properties draw:fill="solid" draw:fill-color="#222222" draw:opacity="100%"/>
      <style:paragraph-properties fo:margin-left="0cm" fo:margin-right="0cm" fo:margin-top="0cm" fo:margin-bottom="0.247cm" style:contextual-spacing="false" fo:line-height="100%" fo:text-indent="0cm" style:auto-text-indent="false" fo:background-color="#222222"/>
    </style:style>
    <style:style style:name="P17" style:family="paragraph" style:parent-style-name="Preformatted_20_Text" style:list-style-name="L51">
      <loext:graphic-properties draw:fill="solid" draw:fill-color="#222222" draw:opacity="100%"/>
      <style:paragraph-properties fo:margin-left="0cm" fo:margin-right="0cm" fo:margin-top="0cm" fo:margin-bottom="0.247cm" style:contextual-spacing="false" fo:line-height="100%" fo:text-indent="0cm" style:auto-text-indent="false" fo:background-color="#222222"/>
    </style:style>
    <style:style style:name="P1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47cm" style:contextual-spacing="false" fo:line-height="100%" fo:text-indent="0cm" style:auto-text-indent="false" fo:background-color="#ffffff"/>
      <style:text-properties fo:font-style="italic"/>
    </style:style>
    <style:style style:name="P19" style:family="paragraph" style:parent-style-name="Standard">
      <style:paragraph-properties fo:line-height="100%"/>
      <style:text-properties officeooo:rsid="0014976c" officeooo:paragraph-rsid="0014976c"/>
    </style:style>
    <style:style style:name="P20" style:family="paragraph" style:parent-style-name="Standard">
      <style:paragraph-properties fo:line-height="100%"/>
      <style:text-properties fo:font-size="14pt" style:text-underline-style="none" fo:font-weight="normal" officeooo:rsid="001559ba" officeooo:paragraph-rsid="001559b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00%"/>
      <style:text-properties fo:font-size="14pt" style:text-underline-style="none" fo:font-weight="normal" officeooo:rsid="0016d295" officeooo:paragraph-rsid="0016d29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00%"/>
      <style:text-properties fo:font-size="26pt" style:text-underline-style="solid" style:text-underline-width="auto" style:text-underline-color="font-color" fo:font-weight="bold" officeooo:rsid="001559ba" officeooo:paragraph-rsid="001559ba" style:font-size-asian="26pt" style:font-weight-asian="bold" style:font-size-complex="26pt" style:font-weight-complex="bold"/>
    </style:style>
    <style:style style:name="P23" style:family="paragraph" style:parent-style-name="Standard">
      <style:paragraph-properties fo:line-height="100%"/>
      <style:text-properties fo:font-size="26pt" style:text-underline-style="solid" style:text-underline-width="auto" style:text-underline-color="font-color" fo:font-weight="bold" officeooo:rsid="0016d295" officeooo:paragraph-rsid="0016d295" style:font-size-asian="26pt" style:font-weight-asian="bold" style:font-size-complex="26pt" style:font-weight-complex="bold"/>
    </style:style>
    <style:style style:name="P24" style:family="paragraph" style:parent-style-name="Table_20_Contents">
      <style:paragraph-properties fo:margin-left="0cm" fo:margin-right="0cm" fo:line-height="100%" fo:text-indent="0cm" style:auto-text-indent="false"/>
    </style:style>
    <style:style style:name="P25" style:family="paragraph" style:parent-style-name="Table_20_Contents">
      <style:paragraph-properties fo:line-height="100%"/>
    </style:style>
    <style:style style:name="P26" style:family="paragraph" style:parent-style-name="Table_20_Heading">
      <style:paragraph-properties fo:line-height="100%"/>
    </style:style>
    <style:style style:name="P27" style:family="paragraph" style:parent-style-name="Table_20_Heading">
      <style:paragraph-properties fo:margin-left="0cm" fo:margin-right="0cm" fo:line-height="100%" fo:text-indent="0cm" style:auto-text-indent="false"/>
    </style:style>
    <style:style style:name="P28" style:family="paragraph" style:parent-style-name="Text_20_body">
      <style:paragraph-properties fo:line-height="100%"/>
      <style:text-properties officeooo:rsid="0014976c" officeooo:paragraph-rsid="0014976c"/>
    </style:style>
    <style:style style:name="P29" style:family="paragraph" style:parent-style-name="Text_20_body">
      <style:paragraph-properties fo:line-height="100%"/>
      <style:text-properties officeooo:rsid="0014976c"/>
    </style:style>
    <style:style style:name="P30" style:family="paragraph" style:parent-style-name="Text_20_body" style:list-styl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1.42cm"/>
        </style:tab-stops>
      </style:paragraph-properties>
      <style:text-properties officeooo:paragraph-rsid="0014976c"/>
    </style:style>
    <style:style style:name="P31" style:family="paragraph" style:parent-style-name="Text_20_body">
      <style:paragraph-properties fo:margin-left="0cm" fo:margin-right="0cm" fo:line-height="100%" fo:text-indent="0cm" style:auto-text-indent="false"/>
    </style:style>
    <style:style style:name="P32" style:family="paragraph" style:parent-style-name="Text_20_body">
      <style:paragraph-properties fo:line-height="100%"/>
    </style:style>
    <style:style style:name="P33" style:family="paragraph" style:parent-style-name="Text_20_body" style:list-style-name="L60">
      <style:paragraph-properties fo:margin-top="0cm" fo:margin-bottom="0cm" style:contextual-spacing="false" fo:line-height="100%"/>
    </style:style>
    <style:style style:name="P34" style:family="paragraph" style:parent-style-name="Text_20_body" style:list-style-name="L60">
      <style:paragraph-properties fo:line-height="100%"/>
    </style:style>
    <style:style style:name="P35" style:family="paragraph" style:parent-style-name="Text_20_body" style:list-style-name="L61">
      <style:paragraph-properties fo:margin-top="0cm" fo:margin-bottom="0cm" style:contextual-spacing="false" fo:line-height="100%"/>
    </style:style>
    <style:style style:name="P36" style:family="paragraph" style:parent-style-name="Text_20_body" style:list-style-name="L61">
      <style:paragraph-properties fo:line-height="100%"/>
    </style:style>
    <style:style style:name="P37" style:family="paragraph" style:parent-style-name="Text_20_body" style:list-style-name="L62">
      <style:paragraph-properties fo:margin-top="0cm" fo:margin-bottom="0cm" style:contextual-spacing="false" fo:line-height="100%"/>
    </style:style>
    <style:style style:name="P38" style:family="paragraph" style:parent-style-name="Text_20_body" style:list-style-name="L62">
      <style:paragraph-properties fo:line-height="100%"/>
    </style:style>
    <style:style style:name="P39" style:family="paragraph" style:parent-style-name="Text_20_body" style:list-style-name="L63">
      <style:paragraph-properties fo:margin-top="0cm" fo:margin-bottom="0cm" style:contextual-spacing="false" fo:line-height="100%"/>
    </style:style>
    <style:style style:name="P40" style:family="paragraph" style:parent-style-name="Text_20_body" style:list-style-name="L63">
      <style:paragraph-properties fo:line-height="100%"/>
    </style:style>
    <style:style style:name="P41" style:family="paragraph" style:parent-style-name="Text_20_body" style:list-style-name="L64">
      <style:paragraph-properties fo:margin-top="0cm" fo:margin-bottom="0cm" style:contextual-spacing="false" fo:line-height="100%"/>
    </style:style>
    <style:style style:name="P42" style:family="paragraph" style:parent-style-name="Text_20_body" style:list-style-name="L64">
      <style:paragraph-properties fo:line-height="100%"/>
    </style:style>
    <style:style style:name="P43" style:family="paragraph" style:parent-style-name="Text_20_body" style:list-style-name="L65">
      <style:paragraph-properties fo:margin-top="0cm" fo:margin-bottom="0cm" style:contextual-spacing="false" fo:line-height="100%"/>
    </style:style>
    <style:style style:name="P44" style:family="paragraph" style:parent-style-name="Text_20_body" style:list-style-name="L65">
      <style:paragraph-properties fo:line-height="100%"/>
    </style:style>
    <style:style style:name="P45" style:family="paragraph" style:parent-style-name="Text_20_body" style:list-style-name="L66">
      <style:paragraph-properties fo:margin-top="0cm" fo:margin-bottom="0cm" style:contextual-spacing="false" fo:line-height="100%"/>
    </style:style>
    <style:style style:name="P46" style:family="paragraph" style:parent-style-name="Text_20_body" style:list-style-name="L66">
      <style:paragraph-properties fo:line-height="100%"/>
    </style:style>
    <style:style style:name="P47" style:family="paragraph" style:parent-style-name="Text_20_body" style:list-style-name="L67">
      <style:paragraph-properties fo:margin-top="0cm" fo:margin-bottom="0cm" style:contextual-spacing="false" fo:line-height="100%"/>
    </style:style>
    <style:style style:name="P48" style:family="paragraph" style:parent-style-name="Text_20_body" style:list-style-name="L67">
      <style:paragraph-properties fo:line-height="100%"/>
    </style:style>
    <style:style style:name="P49" style:family="paragraph" style:parent-style-name="Text_20_body" style:list-style-name="L68">
      <style:paragraph-properties fo:margin-top="0cm" fo:margin-bottom="0cm" style:contextual-spacing="false" fo:line-height="100%"/>
    </style:style>
    <style:style style:name="P50" style:family="paragraph" style:parent-style-name="Text_20_body" style:list-style-name="L68">
      <style:paragraph-properties fo:line-height="100%"/>
    </style:style>
    <style:style style:name="P51" style:family="paragraph" style:parent-style-name="Text_20_body" style:list-style-name="L83">
      <style:paragraph-properties fo:margin-top="0cm" fo:margin-bottom="0cm" style:contextual-spacing="false" fo:line-height="100%"/>
    </style:style>
    <style:style style:name="P52" style:family="paragraph" style:parent-style-name="Text_20_body" style:list-style-name="L83">
      <style:paragraph-properties fo:line-height="100%"/>
    </style:style>
    <style:style style:name="P53" style:family="paragraph" style:parent-style-name="Text_20_body" style:list-style-name="L84">
      <style:paragraph-properties fo:margin-top="0cm" fo:margin-bottom="0cm" style:contextual-spacing="false" fo:line-height="100%"/>
    </style:style>
    <style:style style:name="P54" style:family="paragraph" style:parent-style-name="Text_20_body" style:list-style-name="L84">
      <style:paragraph-properties fo:line-height="100%"/>
    </style:style>
    <style:style style:name="P55" style:family="paragraph" style:parent-style-name="Text_20_body" style:list-style-name="L85">
      <style:paragraph-properties fo:margin-top="0cm" fo:margin-bottom="0cm" style:contextual-spacing="false" fo:line-height="100%"/>
    </style:style>
    <style:style style:name="P56" style:family="paragraph" style:parent-style-name="Text_20_body" style:list-style-name="L85">
      <style:paragraph-properties fo:line-height="100%"/>
    </style:style>
    <style:style style:name="P57" style:family="paragraph" style:parent-style-name="Text_20_body" style:list-style-name="L86">
      <style:paragraph-properties fo:margin-top="0cm" fo:margin-bottom="0cm" style:contextual-spacing="false" fo:line-height="100%"/>
    </style:style>
    <style:style style:name="P58" style:family="paragraph" style:parent-style-name="Text_20_body" style:list-style-name="L86">
      <style:paragraph-properties fo:line-height="100%"/>
    </style:style>
    <style:style style:name="P59" style:family="paragraph" style:parent-style-name="Text_20_body" style:list-style-name="L87">
      <style:paragraph-properties fo:margin-top="0cm" fo:margin-bottom="0cm" style:contextual-spacing="false" fo:line-height="100%"/>
    </style:style>
    <style:style style:name="P60" style:family="paragraph" style:parent-style-name="Text_20_body" style:list-style-name="L87">
      <style:paragraph-properties fo:line-height="100%"/>
    </style:style>
    <style:style style:name="P61" style:family="paragraph" style:parent-style-name="Text_20_body" style:list-style-name="L88">
      <style:paragraph-properties fo:margin-top="0cm" fo:margin-bottom="0cm" style:contextual-spacing="false" fo:line-height="100%"/>
    </style:style>
    <style:style style:name="P62" style:family="paragraph" style:parent-style-name="Text_20_body" style:list-style-name="L88">
      <style:paragraph-properties fo:line-height="100%"/>
    </style:style>
    <style:style style:name="P63" style:family="paragraph" style:parent-style-name="Text_20_body" style:list-style-name="L89">
      <style:paragraph-properties fo:margin-top="0cm" fo:margin-bottom="0cm" style:contextual-spacing="false" fo:line-height="100%"/>
    </style:style>
    <style:style style:name="P64" style:family="paragraph" style:parent-style-name="Text_20_body" style:list-style-name="L89">
      <style:paragraph-properties fo:line-height="100%"/>
    </style:style>
    <style:style style:name="P65" style:family="paragraph" style:parent-style-name="Text_20_body" style:list-style-name="L90">
      <style:paragraph-properties fo:margin-top="0cm" fo:margin-bottom="0cm" style:contextual-spacing="false" fo:line-height="100%"/>
    </style:style>
    <style:style style:name="P66" style:family="paragraph" style:parent-style-name="Text_20_body" style:list-style-name="L90">
      <style:paragraph-properties fo:line-height="100%"/>
    </style:style>
    <style:style style:name="P67" style:family="paragraph" style:parent-style-name="Text_20_body" style:list-style-name="L91">
      <style:paragraph-properties fo:line-height="100%"/>
    </style:style>
    <style:style style:name="P68" style:family="paragraph" style:parent-style-name="Text_20_body" style:list-style-name="L92">
      <style:paragraph-properties fo:margin-top="0cm" fo:margin-bottom="0cm" style:contextual-spacing="false" fo:line-height="100%"/>
    </style:style>
    <style:style style:name="P69" style:family="paragraph" style:parent-style-name="Text_20_body" style:list-style-name="L92">
      <style:paragraph-properties fo:line-height="100%"/>
    </style:style>
    <style:style style:name="P70" style:family="paragraph" style:parent-style-name="Text_20_body" style:list-style-name="L93">
      <style:paragraph-properties fo:margin-top="0cm" fo:margin-bottom="0cm" style:contextual-spacing="false" fo:line-height="100%"/>
    </style:style>
    <style:style style:name="P71" style:family="paragraph" style:parent-style-name="Text_20_body" style:list-style-name="L93">
      <style:paragraph-properties fo:line-height="100%"/>
    </style:style>
    <style:style style:name="P72" style:family="paragraph" style:parent-style-name="Text_20_body" style:list-style-name="L94">
      <style:paragraph-properties fo:margin-top="0cm" fo:margin-bottom="0cm" style:contextual-spacing="false" fo:line-height="100%"/>
    </style:style>
    <style:style style:name="P73" style:family="paragraph" style:parent-style-name="Text_20_body" style:list-style-name="L94">
      <style:paragraph-properties fo:line-height="100%"/>
    </style:style>
    <style:style style:name="P74" style:family="paragraph" style:parent-style-name="Text_20_body" style:list-style-name="L95">
      <style:paragraph-properties fo:margin-top="0cm" fo:margin-bottom="0cm" style:contextual-spacing="false" fo:line-height="100%"/>
    </style:style>
    <style:style style:name="P75" style:family="paragraph" style:parent-style-name="Text_20_body" style:list-style-name="L95">
      <style:paragraph-properties fo:line-height="100%"/>
    </style:style>
    <style:style style:name="P76" style:family="paragraph" style:parent-style-name="Text_20_body" style:list-style-name="L96">
      <style:paragraph-properties fo:margin-top="0cm" fo:margin-bottom="0cm" style:contextual-spacing="false" fo:line-height="100%"/>
    </style:style>
    <style:style style:name="P77" style:family="paragraph" style:parent-style-name="Text_20_body" style:list-style-name="L96">
      <style:paragraph-properties fo:line-height="100%"/>
    </style:style>
    <style:style style:name="P78" style:family="paragraph" style:parent-style-name="Text_20_body" style:list-style-name="L97">
      <style:paragraph-properties fo:margin-top="0cm" fo:margin-bottom="0cm" style:contextual-spacing="false" fo:line-height="100%"/>
    </style:style>
    <style:style style:name="P79" style:family="paragraph" style:parent-style-name="Text_20_body" style:list-style-name="L97">
      <style:paragraph-properties fo:line-height="100%"/>
    </style:style>
    <style:style style:name="P80" style:family="paragraph" style:parent-style-name="Text_20_body" style:list-style-name="L98">
      <style:paragraph-properties fo:margin-top="0cm" fo:margin-bottom="0cm" style:contextual-spacing="false" fo:line-height="100%"/>
    </style:style>
    <style:style style:name="P81" style:family="paragraph" style:parent-style-name="Text_20_body" style:list-style-name="L98">
      <style:paragraph-properties fo:line-height="100%"/>
    </style:style>
    <style:style style:name="P82" style:family="paragraph" style:parent-style-name="Text_20_body" style:list-style-name="L99">
      <style:paragraph-properties fo:margin-top="0cm" fo:margin-bottom="0cm" style:contextual-spacing="false" fo:line-height="100%"/>
    </style:style>
    <style:style style:name="P83" style:family="paragraph" style:parent-style-name="Text_20_body" style:list-style-name="L99">
      <style:paragraph-properties fo:line-height="100%"/>
    </style:style>
    <style:style style:name="P84" style:family="paragraph" style:parent-style-name="Text_20_body" style:list-style-name="L100">
      <style:paragraph-properties fo:margin-top="0cm" fo:margin-bottom="0cm" style:contextual-spacing="false" fo:line-height="100%"/>
    </style:style>
    <style:style style:name="P85" style:family="paragraph" style:parent-style-name="Text_20_body" style:list-style-name="L100">
      <style:paragraph-properties fo:line-height="100%"/>
    </style:style>
    <style:style style:name="P86" style:family="paragraph" style:parent-style-name="Text_20_body" style:list-style-name="L101">
      <style:paragraph-properties fo:margin-top="0cm" fo:margin-bottom="0cm" style:contextual-spacing="false" fo:line-height="100%"/>
    </style:style>
    <style:style style:name="P87" style:family="paragraph" style:parent-style-name="Text_20_body" style:list-style-name="L101">
      <style:paragraph-properties fo:line-height="100%"/>
    </style:style>
    <style:style style:name="P88" style:family="paragraph" style:parent-style-name="Text_20_body" style:list-style-name="L102">
      <style:paragraph-properties fo:margin-top="0cm" fo:margin-bottom="0cm" style:contextual-spacing="false" fo:line-height="100%"/>
    </style:style>
    <style:style style:name="P89" style:family="paragraph" style:parent-style-name="Text_20_body" style:list-style-name="L102">
      <style:paragraph-properties fo:line-height="100%"/>
    </style:style>
    <style:style style:name="P90" style:family="paragraph" style:parent-style-name="Text_20_body" style:list-style-name="L103">
      <style:paragraph-properties fo:margin-top="0cm" fo:margin-bottom="0cm" style:contextual-spacing="false" fo:line-height="100%"/>
    </style:style>
    <style:style style:name="P91" style:family="paragraph" style:parent-style-name="Text_20_body" style:list-style-name="L103">
      <style:paragraph-properties fo:line-height="100%"/>
    </style:style>
    <style:style style:name="P92" style:family="paragraph" style:parent-style-name="Text_20_body" style:list-style-name="L104">
      <style:paragraph-properties fo:margin-top="0cm" fo:margin-bottom="0cm" style:contextual-spacing="false" fo:line-height="100%"/>
    </style:style>
    <style:style style:name="P93" style:family="paragraph" style:parent-style-name="Text_20_body" style:list-style-name="L104">
      <style:paragraph-properties fo:line-height="100%"/>
    </style:style>
    <style:style style:name="P94" style:family="paragraph" style:parent-style-name="Text_20_body" style:list-style-name="L105">
      <style:paragraph-properties fo:margin-top="0cm" fo:margin-bottom="0cm" style:contextual-spacing="false" fo:line-height="100%"/>
    </style:style>
    <style:style style:name="P95" style:family="paragraph" style:parent-style-name="Text_20_body" style:list-style-name="L105">
      <style:paragraph-properties fo:line-height="100%"/>
    </style:style>
    <style:style style:name="P96" style:family="paragraph" style:parent-style-name="Text_20_body" style:list-style-name="L106">
      <style:paragraph-properties fo:margin-top="0cm" fo:margin-bottom="0cm" style:contextual-spacing="false" fo:line-height="100%"/>
    </style:style>
    <style:style style:name="P97" style:family="paragraph" style:parent-style-name="Text_20_body" style:list-style-name="L106">
      <style:paragraph-properties fo:line-height="100%"/>
    </style:style>
    <style:style style:name="P98" style:family="paragraph" style:parent-style-name="Text_20_body" style:list-style-name="L107">
      <style:paragraph-properties fo:margin-top="0cm" fo:margin-bottom="0cm" style:contextual-spacing="false" fo:line-height="100%"/>
    </style:style>
    <style:style style:name="P99" style:family="paragraph" style:parent-style-name="Text_20_body" style:list-style-name="L107">
      <style:paragraph-properties fo:line-height="100%"/>
    </style:style>
    <style:style style:name="P100" style:family="paragraph" style:parent-style-name="Text_20_body" style:list-style-name="L108">
      <style:paragraph-properties fo:margin-top="0cm" fo:margin-bottom="0cm" style:contextual-spacing="false" fo:line-height="100%"/>
    </style:style>
    <style:style style:name="P101" style:family="paragraph" style:parent-style-name="Text_20_body" style:list-style-name="L108">
      <style:paragraph-properties fo:line-height="100%"/>
    </style:style>
    <style:style style:name="P102" style:family="paragraph" style:parent-style-name="Text_20_body" style:list-style-name="L109">
      <style:paragraph-properties fo:margin-top="0cm" fo:margin-bottom="0cm" style:contextual-spacing="false" fo:line-height="100%"/>
    </style:style>
    <style:style style:name="P103" style:family="paragraph" style:parent-style-name="Text_20_body" style:list-style-name="L109">
      <style:paragraph-properties fo:line-height="100%"/>
    </style:style>
    <style:style style:name="P104" style:family="paragraph" style:parent-style-name="Text_20_body" style:list-style-name="L110">
      <style:paragraph-properties fo:margin-left="0cm" fo:margin-right="0cm" fo:line-height="100%" fo:text-indent="0cm" style:auto-text-indent="false"/>
    </style:style>
    <style:style style:name="P105" style:family="paragraph" style:parent-style-name="Text_20_body" style:list-style-name="L110">
      <style:paragraph-properties fo:margin-top="0cm" fo:margin-bottom="0cm" style:contextual-spacing="false" fo:line-height="100%"/>
    </style:style>
    <style:style style:name="P106" style:family="paragraph" style:parent-style-name="Text_20_body" style:list-style-name="L110">
      <style:paragraph-properties fo:line-height="100%"/>
    </style:style>
    <style:style style:name="P107" style:family="paragraph" style:parent-style-name="Text_20_body" style:list-style-name="L111">
      <style:paragraph-properties fo:margin-top="0cm" fo:margin-bottom="0cm" style:contextual-spacing="false" fo:line-height="100%"/>
    </style:style>
    <style:style style:name="P108" style:family="paragraph" style:parent-style-name="Text_20_body" style:list-style-name="L111">
      <style:paragraph-properties fo:line-height="100%"/>
    </style:style>
    <style:style style:name="P109" style:family="paragraph" style:parent-style-name="Text_20_body" style:list-style-name="L112">
      <style:paragraph-properties fo:margin-top="0cm" fo:margin-bottom="0cm" style:contextual-spacing="false" fo:line-height="100%"/>
    </style:style>
    <style:style style:name="P110" style:family="paragraph" style:parent-style-name="Text_20_body" style:list-style-name="L112">
      <style:paragraph-properties fo:line-height="100%"/>
    </style:style>
    <style:style style:name="P111" style:family="paragraph" style:parent-style-name="Text_20_body" style:list-style-name="L113">
      <style:paragraph-properties fo:margin-top="0cm" fo:margin-bottom="0cm" style:contextual-spacing="false" fo:line-height="100%"/>
    </style:style>
    <style:style style:name="P112" style:family="paragraph" style:parent-style-name="Text_20_body" style:list-style-name="L113">
      <style:paragraph-properties fo:line-height="100%"/>
    </style:style>
    <style:style style:name="P113" style:family="paragraph" style:parent-style-name="Text_20_body" style:list-style-name="L114">
      <style:paragraph-properties fo:margin-top="0cm" fo:margin-bottom="0cm" style:contextual-spacing="false" fo:line-height="100%"/>
    </style:style>
    <style:style style:name="P114" style:family="paragraph" style:parent-style-name="Text_20_body" style:list-style-name="L114">
      <style:paragraph-properties fo:line-height="100%"/>
    </style:style>
    <style:style style:name="P115" style:family="paragraph" style:parent-style-name="Text_20_body" style:list-style-name="L49">
      <style:paragraph-properties fo:margin-top="0cm" fo:margin-bottom="0cm" style:contextual-spacing="false" fo:line-height="100%"/>
    </style:style>
    <style:style style:name="P116" style:family="paragraph" style:parent-style-name="Text_20_body" style:list-style-name="L49">
      <style:paragraph-properties fo:line-height="100%"/>
    </style:style>
    <style:style style:name="P117" style:family="paragraph" style:parent-style-name="Text_20_body" style:list-style-name="L50">
      <style:paragraph-properties fo:margin-top="0cm" fo:margin-bottom="0cm" style:contextual-spacing="false" fo:line-height="100%"/>
    </style:style>
    <style:style style:name="P118" style:family="paragraph" style:parent-style-name="Text_20_body" style:list-style-name="L50">
      <style:paragraph-properties fo:line-height="100%"/>
    </style:style>
    <style:style style:name="P119" style:family="paragraph" style:parent-style-name="Text_20_body" style:list-style-name="L51">
      <style:paragraph-properties fo:margin-top="0cm" fo:margin-bottom="0cm" style:contextual-spacing="false" fo:line-height="100%"/>
    </style:style>
    <style:style style:name="P120" style:family="paragraph" style:parent-style-name="Text_20_body" style:list-style-name="L51">
      <style:paragraph-properties fo:line-height="100%"/>
    </style:style>
    <style:style style:name="P121" style:family="paragraph" style:parent-style-name="Text_20_body" style:list-style-name="L52">
      <style:paragraph-properties fo:margin-top="0cm" fo:margin-bottom="0cm" style:contextual-spacing="false" fo:line-height="100%"/>
    </style:style>
    <style:style style:name="P122" style:family="paragraph" style:parent-style-name="Text_20_body" style:list-style-name="L52">
      <style:paragraph-properties fo:line-height="100%"/>
    </style:style>
    <style:style style:name="P123" style:family="paragraph" style:parent-style-name="Text_20_body" style:list-style-name="L53">
      <style:paragraph-properties fo:margin-top="0cm" fo:margin-bottom="0cm" style:contextual-spacing="false" fo:line-height="100%"/>
    </style:style>
    <style:style style:name="P124" style:family="paragraph" style:parent-style-name="Text_20_body" style:list-style-name="L53">
      <style:paragraph-properties fo:line-height="100%"/>
    </style:style>
    <style:style style:name="P125" style:family="paragraph" style:parent-style-name="Text_20_body" style:list-style-name="L54">
      <style:paragraph-properties fo:margin-top="0cm" fo:margin-bottom="0cm" style:contextual-spacing="false" fo:line-height="100%"/>
    </style:style>
    <style:style style:name="P126" style:family="paragraph" style:parent-style-name="Text_20_body" style:list-style-name="L54">
      <style:paragraph-properties fo:line-height="100%"/>
    </style:style>
    <style:style style:name="P127" style:family="paragraph" style:parent-style-name="Text_20_body" style:list-style-name="L55">
      <style:paragraph-properties fo:margin-top="0cm" fo:margin-bottom="0cm" style:contextual-spacing="false" fo:line-height="100%"/>
    </style:style>
    <style:style style:name="P128" style:family="paragraph" style:parent-style-name="Text_20_body" style:list-style-name="L55">
      <style:paragraph-properties fo:line-height="100%"/>
    </style:style>
    <style:style style:name="P129" style:family="paragraph" style:parent-style-name="Text_20_body" style:list-style-name="L56">
      <style:paragraph-properties fo:margin-top="0cm" fo:margin-bottom="0cm" style:contextual-spacing="false" fo:line-height="100%"/>
    </style:style>
    <style:style style:name="P130" style:family="paragraph" style:parent-style-name="Text_20_body" style:list-style-name="L56">
      <style:paragraph-properties fo:line-height="100%"/>
    </style:style>
    <style:style style:name="P131" style:family="paragraph" style:parent-style-name="Text_20_body" style:list-style-name="L57">
      <style:paragraph-properties fo:margin-top="0cm" fo:margin-bottom="0cm" style:contextual-spacing="false" fo:line-height="100%"/>
    </style:style>
    <style:style style:name="P132" style:family="paragraph" style:parent-style-name="Text_20_body" style:list-style-name="L57">
      <style:paragraph-properties fo:line-height="100%"/>
    </style:style>
    <style:style style:name="P133" style:family="paragraph" style:parent-style-name="Text_20_body" style:list-style-name="L58">
      <style:paragraph-properties fo:margin-top="0cm" fo:margin-bottom="0cm" style:contextual-spacing="false" fo:line-height="100%"/>
    </style:style>
    <style:style style:name="P134" style:family="paragraph" style:parent-style-name="Text_20_body" style:list-style-name="L58">
      <style:paragraph-properties fo:line-height="100%"/>
    </style:style>
    <style:style style:name="P135" style:family="paragraph" style:parent-style-name="Text_20_body" style:list-style-name="L59">
      <style:paragraph-properties fo:margin-top="0cm" fo:margin-bottom="0cm" style:contextual-spacing="false" fo:line-height="100%"/>
    </style:style>
    <style:style style:name="P136" style:family="paragraph" style:parent-style-name="Text_20_body" style:list-style-name="L59">
      <style:paragraph-properties fo:line-height="100%"/>
    </style:style>
    <style:style style:name="P137" style:family="paragraph" style:parent-style-name="Text_20_body" style:list-style-name="L115">
      <style:paragraph-properties fo:margin-top="0cm" fo:margin-bottom="0cm" style:contextual-spacing="false" fo:line-height="100%"/>
    </style:style>
    <style:style style:name="P138" style:family="paragraph" style:parent-style-name="Text_20_body" style:list-style-name="L115">
      <style:paragraph-properties fo:line-height="100%"/>
    </style:style>
    <style:style style:name="P139" style:family="paragraph" style:parent-style-name="Text_20_body" style:list-style-name="L116">
      <style:paragraph-properties fo:margin-top="0cm" fo:margin-bottom="0cm" style:contextual-spacing="false" fo:line-height="100%"/>
    </style:style>
    <style:style style:name="P140" style:family="paragraph" style:parent-style-name="Text_20_body" style:list-style-name="L116">
      <style:paragraph-properties fo:line-height="100%"/>
    </style:style>
    <style:style style:name="P141" style:family="paragraph" style:parent-style-name="Text_20_body" style:list-style-name="L117">
      <style:paragraph-properties fo:margin-top="0cm" fo:margin-bottom="0cm" style:contextual-spacing="false" fo:line-height="100%"/>
    </style:style>
    <style:style style:name="P142" style:family="paragraph" style:parent-style-name="Text_20_body" style:list-style-name="L117">
      <style:paragraph-properties fo:line-height="100%"/>
    </style:style>
    <style:style style:name="P143" style:family="paragraph" style:parent-style-name="Text_20_body" style:list-style-name="L118">
      <style:paragraph-properties fo:margin-top="0cm" fo:margin-bottom="0cm" style:contextual-spacing="false" fo:line-height="100%"/>
    </style:style>
    <style:style style:name="P144" style:family="paragraph" style:parent-style-name="Text_20_body" style:list-style-name="L118">
      <style:paragraph-properties fo:line-height="100%"/>
    </style:style>
    <style:style style:name="P145" style:family="paragraph" style:parent-style-name="Text_20_body">
      <style:paragraph-properties fo:line-height="100%"/>
      <style:text-properties fo:font-size="14pt" style:text-underline-style="none" fo:font-weight="normal" officeooo:rsid="0016d295" officeooo:paragraph-rsid="0016d295" style:font-size-asian="12.25pt" style:font-weight-asian="normal" style:font-size-complex="14pt" style:font-weight-complex="normal"/>
    </style:style>
    <style:style style:name="T1" style:family="text">
      <style:text-properties fo:color="#e6e6e6" loext:opacity="100%" style:font-name="var font-ibm-plex-mono" loext:padding="0cm" loext:border="none"/>
    </style:style>
    <style:style style:name="T2" style:family="text">
      <style:text-properties fo:color="#d4d4d4" loext:opacity="100%" style:font-name="var font-ibm-plex-mono" loext:padding="0cm" loext:border="none"/>
    </style:style>
    <style:style style:name="T3" style:family="text">
      <style:text-properties fo:color="#dcdcaa" loext:opacity="100%" style:font-name="var font-ibm-plex-mono" loext:padding="0cm" loext:border="none"/>
    </style:style>
    <style:style style:name="T4" style:family="text">
      <style:text-properties fo:color="#9cdcfe" loext:opacity="100%" style:font-name="var font-ibm-plex-mono" loext:padding="0cm" loext:border="none"/>
    </style:style>
    <style:style style:name="T5" style:family="text">
      <style:text-properties fo:color="#ce9178" loext:opacity="100%" style:font-name="var font-ibm-plex-mono" loext:padding="0cm" loext:border="none"/>
    </style:style>
    <style:style style:name="T6" style:family="text">
      <style:text-properties fo:color="#212121" loext:opacity="100%" style:text-scale="120%"/>
    </style:style>
    <style:style style:name="T7" style:family="text">
      <style:text-properties fo:color="#212121" loext:opacity="100%" fo:letter-spacing="-0.028cm" style:text-scale="120%"/>
    </style:style>
    <style:style style:name="T8" style:family="text">
      <style:text-properties fo:color="#212121" loext:opacity="100%" fo:letter-spacing="-0.028cm" fo:background-color="#ffffff" loext:char-shading-value="0" style:text-scale="120%"/>
    </style:style>
    <style:style style:name="T9" style:family="text">
      <style:text-properties fo:color="#212121" loext:opacity="100%" fo:letter-spacing="-0.004cm" style:text-scale="120%"/>
    </style:style>
    <style:style style:name="T10" style:family="text">
      <style:text-properties fo:color="#212121" loext:opacity="100%" fo:letter-spacing="-0.004cm" fo:background-color="#ffffff" loext:char-shading-value="0" style:text-scale="120%"/>
    </style:style>
    <style:style style:name="T11" style:family="text">
      <style:text-properties fo:color="#212121" loext:opacity="100%" fo:letter-spacing="-0.025cm" style:text-scale="120%"/>
    </style:style>
    <style:style style:name="T12" style:family="text">
      <style:text-properties fo:color="#212121" loext:opacity="100%" fo:letter-spacing="-0.023cm" style:text-scale="120%"/>
    </style:style>
    <style:style style:name="T13" style:family="text">
      <style:text-properties fo:color="#212121" loext:opacity="100%" fo:letter-spacing="0.007cm" style:text-scale="120%"/>
    </style:style>
    <style:style style:name="T14" style:family="text">
      <style:text-properties fo:color="#212121" loext:opacity="100%" fo:letter-spacing="0.005cm" style:text-scale="120%"/>
    </style:style>
    <style:style style:name="T15" style:family="text">
      <style:text-properties fo:color="#212121" loext:opacity="100%" fo:font-size="26pt" style:text-underline-style="solid" style:text-underline-width="auto" style:text-underline-color="font-color" fo:background-color="#ffffff" loext:char-shading-value="0" style:font-size-asian="26pt" style:font-size-complex="26pt" style:text-scale="120%"/>
    </style:style>
    <style:style style:name="T16" style:family="text">
      <style:text-properties fo:color="#212121" loext:opacity="100%" fo:font-size="26pt" fo:letter-spacing="-0.019cm" style:text-underline-style="solid" style:text-underline-width="auto" style:text-underline-color="font-color" fo:background-color="#ffffff" loext:char-shading-value="0" style:font-size-asian="26pt" style:font-size-complex="26pt" style:text-scale="120%"/>
    </style:style>
    <style:style style:name="T17" style:family="text">
      <style:text-properties fo:color="#212121" loext:opacity="100%" fo:font-size="26pt" fo:letter-spacing="-0.016cm" style:text-underline-style="solid" style:text-underline-width="auto" style:text-underline-color="font-color" fo:background-color="#ffffff" loext:char-shading-value="0" style:font-size-asian="26pt" style:font-size-complex="26pt" style:text-scale="120%"/>
    </style:style>
    <style:style style:name="T18" style:family="text">
      <style:text-properties fo:color="#212121" loext:opacity="100%" fo:font-size="26pt" fo:letter-spacing="-0.007cm" style:text-underline-style="solid" style:text-underline-width="auto" style:text-underline-color="font-color" fo:background-color="#ffffff" loext:char-shading-value="0" style:font-size-asian="26pt" style:font-size-complex="26pt" style:text-scale="120%"/>
    </style:style>
    <style:style style:name="T19" style:family="text">
      <style:text-properties fo:color="#212121" loext:opacity="100%" fo:font-size="26pt" fo:letter-spacing="-0.004cm" style:text-underline-style="solid" style:text-underline-width="auto" style:text-underline-color="font-color" fo:background-color="#ffffff" loext:char-shading-value="0" style:font-size-asian="26pt" style:font-size-complex="26pt" style:text-scale="120%"/>
    </style:style>
    <style:style style:name="T20" style:family="text">
      <style:text-properties fo:color="#212121" loext:opacity="100%" fo:font-size="26pt" fo:letter-spacing="0.007cm" style:text-underline-style="solid" style:text-underline-width="auto" style:text-underline-color="font-color" fo:background-color="#ffffff" loext:char-shading-value="0" style:font-size-asian="26pt" style:font-size-complex="26pt" style:text-scale="120%"/>
    </style:style>
    <style:style style:name="T21" style:family="text">
      <style:text-properties fo:color="#212121" loext:opacity="100%" fo:font-size="26pt" fo:letter-spacing="0.005cm" style:text-underline-style="solid" style:text-underline-width="auto" style:text-underline-color="font-color" fo:background-color="#ffffff" loext:char-shading-value="0" style:font-size-asian="26pt" style:font-size-complex="26pt" style:text-scale="120%"/>
    </style:style>
    <style:style style:name="T22" style:family="text">
      <style:text-properties fo:color="#212121" loext:opacity="100%" fo:background-color="#ffffff" loext:char-shading-value="0" style:text-scale="120%"/>
    </style:style>
    <style:style style:name="T23" style:family="text">
      <style:text-properties fo:color="#002339" loext:opacity="100%" style:font-name="var font-ibm-plex-mono" fo:background-color="#ffffff" loext:char-shading-value="0" loext:padding="0cm" loext:border="none"/>
    </style:style>
    <style:style style:name="T24" style:family="text">
      <style:text-properties fo:color="#002339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25" style:family="text">
      <style:text-properties fo:color="#002339" loext:opacity="100%" fo:background-color="#ffffff" loext:char-shading-value="0" loext:padding="0cm" loext:border="none"/>
    </style:style>
    <style:style style:name="T26" style:family="text">
      <style:text-properties fo:color="#002339" loext:opacity="100%" fo:background-color="#ffffff" loext:char-shading-value="0" loext:padding-left="0.423cm" loext:padding-right="0.423cm" loext:padding-top="0.049cm" loext:padding-bottom="0.423cm" loext:border="0.06pt solid #000000"/>
    </style:style>
    <style:style style:name="T27" style:family="text">
      <style:text-properties fo:color="#7b30d0" loext:opacity="100%" style:font-name="var font-ibm-plex-mono" fo:background-color="#ffffff" loext:char-shading-value="0" loext:padding="0cm" loext:border="none"/>
    </style:style>
    <style:style style:name="T28" style:family="text">
      <style:text-properties fo:color="#7b30d0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29" style:family="text">
      <style:text-properties fo:color="#7b30d0" loext:opacity="100%" fo:background-color="#ffffff" loext:char-shading-value="0" loext:padding="0cm" loext:border="none"/>
    </style:style>
    <style:style style:name="T30" style:family="text">
      <style:text-properties fo:color="#7b30d0" loext:opacity="100%" fo:background-color="#ffffff" loext:char-shading-value="0" loext:padding-left="0.423cm" loext:padding-right="0.423cm" loext:padding-top="0.049cm" loext:padding-bottom="0.423cm" loext:border="0.06pt solid #000000"/>
    </style:style>
    <style:style style:name="T31" style:family="text">
      <style:text-properties fo:color="#2f86d2" loext:opacity="100%" style:font-name="var font-ibm-plex-mono" fo:background-color="#ffffff" loext:char-shading-value="0" loext:padding="0cm" loext:border="none"/>
    </style:style>
    <style:style style:name="T32" style:family="text">
      <style:text-properties fo:color="#2f86d2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33" style:family="text">
      <style:text-properties fo:color="#2f86d2" loext:opacity="100%" fo:background-color="#ffffff" loext:char-shading-value="0" loext:padding="0cm" loext:border="none"/>
    </style:style>
    <style:style style:name="T34" style:family="text">
      <style:text-properties fo:color="#2f86d2" loext:opacity="100%" fo:background-color="#ffffff" loext:char-shading-value="0" loext:padding-left="0.423cm" loext:padding-right="0.423cm" loext:padding-top="0.049cm" loext:padding-bottom="0.423cm" loext:border="0.06pt solid #000000"/>
    </style:style>
    <style:style style:name="T35" style:family="text">
      <style:text-properties fo:color="#7eb233" loext:opacity="100%" style:font-name="var font-ibm-plex-mono" fo:background-color="#ffffff" loext:char-shading-value="0" loext:padding="0cm" loext:border="none"/>
    </style:style>
    <style:style style:name="T36" style:family="text">
      <style:text-properties fo:color="#7eb233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37" style:family="text">
      <style:text-properties fo:color="#7eb233" loext:opacity="100%" fo:background-color="#ffffff" loext:char-shading-value="0" loext:padding="0cm" loext:border="none"/>
    </style:style>
    <style:style style:name="T38" style:family="text">
      <style:text-properties fo:color="#a44185" loext:opacity="100%" style:font-name="var font-ibm-plex-mono" fo:background-color="#ffffff" loext:char-shading-value="0" loext:padding="0cm" loext:border="none"/>
    </style:style>
    <style:style style:name="T39" style:family="text">
      <style:text-properties fo:color="#a44185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40" style:family="text">
      <style:text-properties fo:color="#357b42" loext:opacity="100%" style:font-name="var font-ibm-plex-mono" fo:font-style="italic" fo:background-color="#ffffff" loext:char-shading-value="0" loext:padding="0cm" loext:border="none"/>
    </style:style>
    <style:style style:name="T41" style:family="text">
      <style:text-properties fo:color="#357b42" loext:opacity="100%" style:font-name="var font-ibm-plex-mono" fo:font-style="italic" fo:background-color="#ffffff" loext:char-shading-value="0" loext:padding-left="0.423cm" loext:padding-right="0.423cm" loext:padding-top="0.049cm" loext:padding-bottom="0.423cm" loext:border="0.06pt solid #000000"/>
    </style:style>
    <style:style style:name="T42" style:family="text">
      <style:text-properties fo:color="#357b42" loext:opacity="100%" style:font-name="var font-ibm-plex-mono" fo:background-color="#ffffff" loext:char-shading-value="0" loext:padding="0cm" loext:border="none"/>
    </style:style>
    <style:style style:name="T43" style:family="text">
      <style:text-properties fo:color="#357b42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44" style:family="text">
      <style:text-properties fo:color="#357b42" loext:opacity="100%" fo:background-color="#ffffff" loext:char-shading-value="0" loext:padding="0cm" loext:border="none"/>
    </style:style>
    <style:style style:name="T45" style:family="text">
      <style:text-properties fo:color="#174781" loext:opacity="100%" style:font-name="var font-ibm-plex-mono" fo:background-color="#ffffff" loext:char-shading-value="0" loext:padding="0cm" loext:border="none"/>
    </style:style>
    <style:style style:name="T46" style:family="text">
      <style:text-properties fo:color="#174781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47" style:family="text">
      <style:text-properties fo:color="#0991b6" loext:opacity="100%" style:font-name="var font-ibm-plex-mono" fo:background-color="#ffffff" loext:char-shading-value="0" loext:padding="0cm" loext:border="none"/>
    </style:style>
    <style:style style:name="T48" style:family="text">
      <style:text-properties fo:color="#0991b6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49" style:family="text">
      <style:text-properties fo:color="#0991b6" loext:opacity="100%" fo:background-color="#ffffff" loext:char-shading-value="0" loext:padding="0cm" loext:border="none"/>
    </style:style>
    <style:style style:name="T50" style:family="text">
      <style:text-properties fo:color="#0444ac" loext:opacity="100%" style:font-name="var font-ibm-plex-mono" fo:background-color="#ffffff" loext:char-shading-value="0" loext:padding="0cm" loext:border="none"/>
    </style:style>
    <style:style style:name="T51" style:family="text">
      <style:text-properties fo:color="#0444ac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52" style:family="text">
      <style:text-properties fo:color="#da5221" loext:opacity="100%" style:font-name="var font-ibm-plex-mono" fo:background-color="#ffffff" loext:char-shading-value="0" loext:padding="0cm" loext:border="none"/>
    </style:style>
    <style:style style:name="T53" style:family="text">
      <style:text-properties fo:color="#da5221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54" style:family="text">
      <style:text-properties fo:color="#b1108e" loext:opacity="100%" style:font-name="var font-ibm-plex-mono" fo:background-color="#ffffff" loext:char-shading-value="0" loext:padding-left="0.423cm" loext:padding-right="0.423cm" loext:padding-top="0.049cm" loext:padding-bottom="0.423cm" loext:border="0.06pt solid #000000"/>
    </style:style>
    <style:style style:name="T55" style:family="text">
      <style:text-properties fo:color="#207bb8" loext:opacity="100%" style:font-name="var font-ibm-plex-mono" fo:font-style="italic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5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T22">Синтаксис</text:span><text:span text:style-name="T8"> </text:span><text:span text:style-name="T22">языка</text:span><text:span text:style-name="T8"> </text:span><text:span text:style-name="T10">запросов:</text:span></text:h>
      <text:h text:style-name="P8" text:outline-level="3"><text:span text:style-name="T15"/></text:h>
      <text:h text:style-name="P9" text:outline-level="3"><text:span text:style-name="T15">1. Команды могут занимать несколько строк и завершаются символом ;</text:span></text:h>
      <text:p text:style-name="P31"><text:span text:style-name="Strong_20_Emphasis">Файл:</text:span> utils.cpp<text:line-break/><text:span text:style-name="Strong_20_Emphasis">Функция:</text:span> splitStatements(const std::string&amp; text) (строки <text:span text:style-name="Strong_20_Emphasis">97–149</text:span>)</text:p>
      <text:p text:style-name="P31"><text:span text:style-name="Strong_20_Emphasis">Как реализовано:</text:span></text:p>
      <text:list text:style-name="L60">
        <text:list-item>
          <text:p text:style-name="P33">Функция принимает весь введённый текст (может быть многострочным). </text:p>
        </text:list-item>
        <text:list-item>
          <text:p text:style-name="P33">Проходит по символам, отслеживая состояние inString (находится ли сейчас внутри "..."). </text:p>
        </text:list-item>
        <text:list-item>
          <text:p text:style-name="P33">Поддерживает экранирование внутри строк (\", \n и т.д.), чтобы ; внутри строк <text:span text:style-name="Strong_20_Emphasis">не</text:span> завершал команду. </text:p>
        </text:list-item>
        <text:list-item>
          <text:p text:style-name="P33">При встрече ; вне строк — обрезает команду, делает trim() и добавляет в результат. </text:p>
        </text:list-item>
        <text:list-item>
          <text:p text:style-name="P34">Если после последней команды остался текст без ;, выбрасывает исключение. </text:p>
        </text:list-item>
      </text:list>
      <text:p text:style-name="P31"><text:span text:style-name="Strong_20_Emphasis">Где используется:</text:span></text:p>
      <text:list text:style-name="L61">
        <text:list-item>
          <text:p text:style-name="P35">runner.cpp — executeText() и executeTextAuthorized() </text:p>
        </text:list-item>
        <text:list-item>
          <text:p text:style-name="P36">main.cpp — интерактивный режим (interactiveMode()) </text:p>
        </text:list-item>
      </text:list>
      <text:p text:style-name="P31">Это позволяет писать такие конструкции:</text:p>
      <text:p text:style-name="P32">SQL</text:p>
      <text:p text:style-name="P14"><text:span text:style-name="Source_20_Text"><text:span text:style-name="T28">CREATE TABLE</text:span></text:span><text:span text:style-name="Source_20_Text"><text:span text:style-name="T36"> users</text:span></text:span><text:span text:style-name="Source_20_Text"><text:span text:style-name="T24"> (</text:span></text:span></text:p>
      <text:p text:style-name="P14"><text:span text:style-name="Source_20_Text"><text:span text:style-name="T26"><text:s text:c="4"/></text:span></text:span><text:span text:style-name="Source_20_Text"><text:span text:style-name="T24">id </text:span></text:span><text:span text:style-name="Source_20_Text"><text:span text:style-name="T48">INT</text:span></text:span><text:span text:style-name="Source_20_Text"><text:span text:style-name="T24"> INDEXED,</text:span></text:span></text:p>
      <text:p text:style-name="P14"><text:span text:style-name="Source_20_Text"><text:span text:style-name="T30"><text:s text:c="4"/></text:span></text:span><text:span text:style-name="Source_20_Text"><text:span text:style-name="T28">name</text:span></text:span><text:span text:style-name="Source_20_Text"><text:span text:style-name="T24"> STRING NOT_NULL</text:span></text:span></text:p>
      <text:p text:style-name="P14"><text:span text:style-name="Source_20_Text"><text:span text:style-name="T24">);</text:span></text:span></text:p>
      <text:p text:style-name="P15"/>
      <text:p text:style-name="P14"><text:span text:style-name="Source_20_Text"><text:span text:style-name="T28">INSERT INTO</text:span></text:span><text:span text:style-name="Source_20_Text"><text:span text:style-name="T24"> users (id, </text:span></text:span><text:span text:style-name="Source_20_Text"><text:span text:style-name="T28">name</text:span></text:span><text:span text:style-name="Source_20_Text"><text:span text:style-name="T24">) </text:span></text:span></text:p>
      <text:p text:style-name="P14"><text:span text:style-name="Source_20_Text"><text:span text:style-name="T28">VALUES</text:span></text:span><text:span text:style-name="Source_20_Text"><text:span text:style-name="T24"> (</text:span></text:span><text:span text:style-name="Source_20_Text"><text:span text:style-name="T46">1</text:span></text:span><text:span text:style-name="Source_20_Text"><text:span text:style-name="T24">, </text:span></text:span><text:span text:style-name="Source_20_Text"><text:span text:style-name="T39">"Alice"</text:span></text:span><text:span text:style-name="Source_20_Text"><text:span text:style-name="T24">), </text:span></text:span></text:p>
      <text:p text:style-name="P14"><text:span text:style-name="Source_20_Text"><text:span text:style-name="T26"><text:s text:c="7"/></text:span></text:span><text:span text:style-name="Source_20_Text"><text:span text:style-name="T24">(</text:span></text:span><text:span text:style-name="Source_20_Text"><text:span text:style-name="T46">2</text:span></text:span><text:span text:style-name="Source_20_Text"><text:span text:style-name="T24">, </text:span></text:span><text:span text:style-name="Source_20_Text"><text:span text:style-name="T39">"Bob"</text:span></text:span><text:span text:style-name="Source_20_Text"><text:span text:style-name="T24">);</text:span></text:span></text:p>
      <text:p text:style-name="P13"/>
      <text:h text:style-name="P10" text:outline-level="3">2. Ключевые слова регистронезависимы (без смешения регистров в одном слове)</text:h>
      <text:p text:style-name="P31"><text:span text:style-name="Strong_20_Emphasis">Файлы:</text:span></text:p>
      <text:list text:style-name="L62">
        <text:list-item>
          <text:p text:style-name="P37"><text:soft-page-break/>utils.cpp — toUpper() </text:p>
        </text:list-item>
        <text:list-item>
          <text:p text:style-name="P37">lexer.cpp — consumeIf(), expectWord() </text:p>
        </text:list-item>
        <text:list-item>
          <text:p text:style-name="P38">parser.cpp — все проверки ключевых слов </text:p>
        </text:list-item>
      </text:list>
      <text:p text:style-name="P31"><text:span text:style-name="Strong_20_Emphasis">Реализация:</text:span></text:p>
      <text:list text:style-name="L63">
        <text:list-item>
          <text:p text:style-name="P39">toUpper(const std::string&amp; text) (utils.cpp, строки 29–37) — переводит <text:span text:style-name="Strong_20_Emphasis">всю</text:span> строку в верхний регистр. </text:p>
        </text:list-item>
        <text:list-item>
          <text:p text:style-name="P39">В Lexer::consumeIf(const std::string&amp; text) и expectWord() сравнение идёт через toUpper(). </text:p>
        </text:list-item>
        <text:list-item>
          <text:p text:style-name="P40">В Parser::parseStatement(), parseWhereExpression() и др. — toUpper(lexer.peek().text) == "SELECT", "CREATE", "WHERE", "AND", "BETWEEN" и т.д. </text:p>
        </text:list-item>
      </text:list>
      <text:p text:style-name="P31"><text:span text:style-name="Strong_20_Emphasis">Ограничение:</text:span> Смешение регистров внутри одного слова (SeLeCt) <text:span text:style-name="Strong_20_Emphasis">не поддерживается</text:span> — слово целиком должно быть распознано после toUpper().</text:p>
      <text:p text:style-name="P13"/>
      <text:h text:style-name="P10" text:outline-level="3">3. Строковые литералы заключаются в двойные кавычки (")</text:h>
      <text:p text:style-name="P31"><text:span text:style-name="Strong_20_Emphasis">Файл:</text:span> lexer.cpp<text:line-break/><text:span text:style-name="Strong_20_Emphasis">Место:</text:span> Конструктор Lexer::Lexer(const std::string&amp; text) (строки <text:span text:style-name="Strong_20_Emphasis">21–65</text:span>)</text:p>
      <text:p text:style-name="P31"><text:span text:style-name="Strong_20_Emphasis">Как реализовано:</text:span></text:p>
      <text:list text:style-name="L64">
        <text:list-item>
          <text:p text:style-name="P41">При встрече символа " запускается специальный цикл парсинга строки. </text:p>
        </text:list-item>
        <text:list-item>
          <text:p text:style-name="P41">Поддерживается экранирование: \", \n, \t, \r. </text:p>
        </text:list-item>
        <text:list-item>
          <text:p text:style-name="P41">Если кавычка не закрыта — бросается исключение "строковый литерал не закрыт кавычкой". </text:p>
        </text:list-item>
        <text:list-item>
          <text:p text:style-name="P42">Результат сохраняется как токен TokenType::String. </text:p>
        </text:list-item>
      </text:list>
      <text:p text:style-name="P31">Далее в parser.cpp → parseLiteral() → makeString().</text:p>
      <text:p text:style-name="P13"/>
      <text:h text:style-name="P10" text:outline-level="3">4. Правила имён сущностей (БД, таблиц, колонок)</text:h>
      <text:p text:style-name="P31"><text:span text:style-name="Strong_20_Emphasis">Файл:</text:span> utils.cpp<text:line-break/><text:span text:style-name="Strong_20_Emphasis">Функция:</text:span> isValidIdentifier(const std::string&amp; text) (строки <text:span text:style-name="Strong_20_Emphasis">40–62</text:span>)</text:p>
      <text:p text:style-name="P31"><text:span text:style-name="Strong_20_Emphasis">Правила реализации:</text:span></text:p>
      <text:list text:style-name="L65">
        <text:list-item>
          <text:p text:style-name="P43">Имя не может быть пустым. </text:p>
        </text:list-item>
        <text:list-item>
          <text:p text:style-name="P43"><text:span text:style-name="Strong_20_Emphasis">Первый символ:</text:span> латинская буква (isalpha) или _. </text:p>
        </text:list-item>
        <text:list-item>
          <text:p text:style-name="P43"><text:span text:style-name="Strong_20_Emphasis">Остальные символы:</text:span> латинские буквы, цифры (0-9), _. </text:p>
        </text:list-item>
        <text:list-item>
          <text:p text:style-name="P44">Вызывается в Parser::parseIdentifier() (строка 89) для имён баз данных, таблиц и колонок. </text:p>
        </text:list-item>
      </text:list>
      <text:p text:style-name="P31"><text:span text:style-name="Strong_20_Emphasis">Важное замечание по багу:</text:span></text:p>
      <text:p text:style-name="P31">Вы отметили, что при вводе цифры первым символом <text:span text:style-name="Strong_20_Emphasis">программа зависает</text:span>.<text:line-break/>Это известная проблема текущей реализации:</text:p>
      <text:list text:style-name="L66">
        <text:list-item>
          <text:p text:style-name="P45">Лексер (lexer.cpp) распознаёт такое имя как TokenType::Number. </text:p>
        </text:list-item>
        <text:list-item>
          <text:p text:style-name="P45">Парсер ожидает TokenType::Word в parseIdentifier(). </text:p>
        </text:list-item>
        <text:list-item>
          <text:p text:style-name="P46">Исключение бросается, но в <text:span text:style-name="Strong_20_Emphasis">интерактивном режиме</text:span> (main.cpp:interactiveMode) обработка ошибок иногда не очищает буфер правильно, что приводит к "зависанию" в ожидании следующей строки. </text:p>
        </text:list-item>
      </text:list>
      <text:p text:style-name="P13"/>
      <text:h text:style-name="P10" text:outline-level="3"><text:soft-page-break/>5. Обращение к таблицам: database_name.table_name или через USE</text:h>
      <text:p text:style-name="P31"><text:span text:style-name="Strong_20_Emphasis">Файл:</text:span> parser.cpp<text:line-break/><text:span text:style-name="Strong_20_Emphasis">Функция:</text:span> Parser::parseTableName(Lexer&amp; lexer) (строки <text:span text:style-name="Strong_20_Emphasis">97–113</text:span>)</text:p>
      <text:p text:style-name="P31"><text:span text:style-name="Strong_20_Emphasis">Реализация:</text:span></text:p>
      <text:p text:style-name="P32">C++</text:p>
      <text:p text:style-name="P14"><text:span text:style-name="Source_20_Text"><text:span text:style-name="T51">TableName</text:span></text:span><text:span text:style-name="Source_20_Text"><text:span text:style-name="T24"> Parser::</text:span></text:span><text:span text:style-name="Source_20_Text"><text:span text:style-name="T36">parseTableName</text:span></text:span><text:span text:style-name="Source_20_Text"><text:span text:style-name="T24">(</text:span></text:span><text:span text:style-name="Source_20_Text"><text:span text:style-name="T51">Lexer</text:span></text:span><text:span text:style-name="Source_20_Text"><text:span text:style-name="T53">&amp;</text:span></text:span><text:span text:style-name="Source_20_Text"><text:span text:style-name="T54"> lexer</text:span></text:span><text:span text:style-name="Source_20_Text"><text:span text:style-name="T24">) </text:span></text:span><text:span text:style-name="Source_20_Text"><text:span text:style-name="T53">const</text:span></text:span></text:p>
      <text:p text:style-name="P14"><text:span text:style-name="Source_20_Text"><text:span text:style-name="T24">{</text:span></text:span></text:p>
      <text:p text:style-name="P14"><text:span text:style-name="Source_20_Text"><text:span text:style-name="T26"><text:s text:c="4"/></text:span></text:span><text:span text:style-name="Source_20_Text"><text:span text:style-name="T24">TableName result;</text:span></text:span></text:p>
      <text:p text:style-name="P14"><text:span text:style-name="Source_20_Text"><text:span text:style-name="T26"><text:s text:c="4"/></text:span></text:span><text:span text:style-name="Source_20_Text"><text:span text:style-name="T24">std::string first </text:span></text:span><text:span text:style-name="Source_20_Text"><text:span text:style-name="T28">=</text:span></text:span><text:span text:style-name="Source_20_Text"><text:span text:style-name="T36"> parseIdentifier</text:span></text:span><text:span text:style-name="Source_20_Text"><text:span text:style-name="T24">(lexer);</text:span></text:span></text:p>
      <text:p text:style-name="P15"/>
      <text:p text:style-name="P14"><text:span text:style-name="Source_20_Text"><text:span text:style-name="T30"><text:s text:c="4"/></text:span></text:span><text:span text:style-name="Source_20_Text"><text:span text:style-name="T28">if</text:span></text:span><text:span text:style-name="Source_20_Text"><text:span text:style-name="T24"> (</text:span></text:span><text:span text:style-name="Source_20_Text"><text:span text:style-name="T32">lexer</text:span></text:span><text:span text:style-name="Source_20_Text"><text:span text:style-name="T24">.</text:span></text:span><text:span text:style-name="Source_20_Text"><text:span text:style-name="T36">consumeIf</text:span></text:span><text:span text:style-name="Source_20_Text"><text:span text:style-name="T24">(</text:span></text:span><text:span text:style-name="Source_20_Text"><text:span text:style-name="T39">"."</text:span></text:span><text:span text:style-name="Source_20_Text"><text:span text:style-name="T24">)) {</text:span></text:span></text:p>
      <text:p text:style-name="P14"><text:span text:style-name="Source_20_Text"><text:span text:style-name="T34"><text:s text:c="8"/></text:span></text:span><text:span text:style-name="Source_20_Text"><text:span text:style-name="T32">result</text:span></text:span><text:span text:style-name="Source_20_Text"><text:span text:style-name="T24">.</text:span></text:span><text:span text:style-name="Source_20_Text"><text:span text:style-name="T32">databaseName</text:span></text:span><text:span text:style-name="Source_20_Text"><text:span text:style-name="T28"> =</text:span></text:span><text:span text:style-name="Source_20_Text"><text:span text:style-name="T24"> first;</text:span></text:span><text:span text:style-name="Source_20_Text"><text:span text:style-name="T43"> <text:s text:c="10"/></text:span></text:span><text:span text:style-name="Source_20_Text"><text:span text:style-name="T41">// database_name</text:span></text:span></text:p>
      <text:p text:style-name="P14"><text:span text:style-name="Source_20_Text"><text:span text:style-name="T34"><text:s text:c="8"/></text:span></text:span><text:span text:style-name="Source_20_Text"><text:span text:style-name="T32">result</text:span></text:span><text:span text:style-name="Source_20_Text"><text:span text:style-name="T24">.</text:span></text:span><text:span text:style-name="Source_20_Text"><text:span text:style-name="T32">tableName</text:span></text:span><text:span text:style-name="Source_20_Text"><text:span text:style-name="T28"> =</text:span></text:span><text:span text:style-name="Source_20_Text"><text:span text:style-name="T36"> parseIdentifier</text:span></text:span><text:span text:style-name="Source_20_Text"><text:span text:style-name="T24">(lexer);</text:span></text:span><text:span text:style-name="Source_20_Text"><text:span text:style-name="T43"> <text:s/></text:span></text:span><text:span text:style-name="Source_20_Text"><text:span text:style-name="T41">// table_name</text:span></text:span></text:p>
      <text:p text:style-name="P14"><text:span text:style-name="Source_20_Text"><text:span text:style-name="T26"><text:s text:c="4"/></text:span></text:span><text:span text:style-name="Source_20_Text"><text:span text:style-name="T24">} </text:span></text:span><text:span text:style-name="Source_20_Text"><text:span text:style-name="T28">else</text:span></text:span><text:span text:style-name="Source_20_Text"><text:span text:style-name="T24"> {</text:span></text:span></text:p>
      <text:p text:style-name="P14"><text:span text:style-name="Source_20_Text"><text:span text:style-name="T34"><text:s text:c="8"/></text:span></text:span><text:span text:style-name="Source_20_Text"><text:span text:style-name="T32">result</text:span></text:span><text:span text:style-name="Source_20_Text"><text:span text:style-name="T24">.</text:span></text:span><text:span text:style-name="Source_20_Text"><text:span text:style-name="T32">tableName</text:span></text:span><text:span text:style-name="Source_20_Text"><text:span text:style-name="T28"> =</text:span></text:span><text:span text:style-name="Source_20_Text"><text:span text:style-name="T24"> first;</text:span></text:span></text:p>
      <text:p text:style-name="P14"><text:span text:style-name="Source_20_Text"><text:span text:style-name="T26"><text:s text:c="4"/></text:span></text:span><text:span text:style-name="Source_20_Text"><text:span text:style-name="T24">}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24"> result;</text:span></text:span></text:p>
      <text:p text:style-name="P14"><text:span text:style-name="Source_20_Text"><text:span text:style-name="T24">}</text:span></text:span></text:p>
      <text:p text:style-name="P31"><text:span text:style-name="Strong_20_Emphasis">Дальнейшая обработка:</text:span></text:p>
      <text:p text:style-name="P31"><text:span text:style-name="Strong_20_Emphasis">Файл:</text:span> dbms.cpp</text:p>
      <text:list text:style-name="L67">
        <text:list-item>
          <text:p text:style-name="P47"><text:span text:style-name="Strong_20_Emphasis">resolveDatabaseName(const TableName&amp; table)</text:span> (строки 59–70):</text:p>
          <text:list>
            <text:list-item>
              <text:p text:style-name="P47">Если databaseName указан — использует его. </text:p>
            </text:list-item>
            <text:list-item>
              <text:p text:style-name="P47">Иначе использует currentDatabase_ (установленный командой USE). </text:p>
            </text:list-item>
          </text:list>
        </text:list-item>
        <text:list-item>
          <text:p text:style-name="P48"><text:span text:style-name="Strong_20_Emphasis">requireDatabaseFromTableName()</text:span> — открывает нужную базу данных. </text:p>
        </text:list-item>
      </text:list>
      <text:p text:style-name="P31"><text:span text:style-name="Strong_20_Emphasis">USE</text:span> реализовано в DBMS::executeUseDatabase() (dbms.cpp, строки 131–141), где сохраняется currentDatabase_.</text:p>
      <text:p text:style-name="P13"/>
      <text:h text:style-name="P10" text:outline-level="3">Общая схема обработки SQL-текста</text:h>
      <text:p text:style-name="P32">text</text:p>
      <text:p text:style-name="P14"><text:soft-page-break/><text:span text:style-name="Source_20_Text"><text:span text:style-name="T24">Многострочный текст</text:span></text:span></text:p>
      <text:p text:style-name="P15"><text:span text:style-name="Source_20_Text"><text:span text:style-name="T26"><text:s text:c="4"/>↓</text:span></text:span></text:p>
      <text:p text:style-name="P15"><text:span text:style-name="Source_20_Text"><text:span text:style-name="T24">splitStatements() <text:s text:c="17"/>// utils.cpp</text:span></text:span></text:p>
      <text:p text:style-name="P15"><text:span text:style-name="Source_20_Text"><text:span text:style-name="T26"><text:s text:c="4"/>↓</text:span></text:span></text:p>
      <text:p text:style-name="P15"><text:span text:style-name="Source_20_Text"><text:span text:style-name="T24">Lexer (токенизация) <text:s text:c="15"/>// lexer.cpp</text:span></text:span></text:p>
      <text:p text:style-name="P15"><text:span text:style-name="Source_20_Text"><text:span text:style-name="T26"><text:s text:c="4"/>↓</text:span></text:span></text:p>
      <text:p text:style-name="P15"><text:span text:style-name="Source_20_Text"><text:span text:style-name="T24">Parser::parseStatement() <text:s text:c="10"/>// parser.cpp</text:span></text:span></text:p>
      <text:p text:style-name="P15"><text:span text:style-name="Source_20_Text"><text:span text:style-name="T26"><text:s text:c="4"/>↓</text:span></text:span></text:p>
      <text:p text:style-name="P15"><text:span text:style-name="Source_20_Text"><text:span text:style-name="T24">DBMS::execute() <text:s text:c="19"/>// dbms.cpp</text:span></text:span></text:p>
      <text:p text:style-name="P15"><text:span text:style-name="Source_20_Text"><text:span text:style-name="T26"><text:s text:c="4"/>↓</text:span></text:span></text:p>
      <text:p text:style-name="P15"><text:span text:style-name="Source_20_Text"><text:span text:style-name="T24">Table / Database / Auth и т.д.</text:span></text:span></text:p>
      <text:p text:style-name="P31"><text:span text:style-name="Strong_20_Emphasis">Главные файлы:</text:span></text:p>
      <text:list text:style-name="L68">
        <text:list-item>
          <text:p text:style-name="P49">utils.cpp — splitStatements, isValidIdentifier, toUpper </text:p>
        </text:list-item>
        <text:list-item>
          <text:p text:style-name="P49">lexer.cpp — токенизация строк и идентификаторов </text:p>
        </text:list-item>
        <text:list-item>
          <text:p text:style-name="P49">parser.cpp — логика разбора всех команд </text:p>
        </text:list-item>
        <text:list-item>
          <text:p text:style-name="P50">dbms.cpp — USE + разрешение имён таблиц</text:p>
        </text:list-item>
      </text:list>
      <text:h text:style-name="P30" text:outline-level="3"><text:span text:style-name="T15"/></text:h>
      <text:h text:style-name="P30" text:outline-level="3"><text:span text:style-name="T15"/></text:h>
      <text:list xml:id="list1033607201" text:style-name="WWNum3">
        <text:list-header>
          <text:h text:style-name="P6" text:outline-level="3"><text:span text:style-name="T15">Работа</text:span><text:span text:style-name="T16"> </text:span><text:span text:style-name="T15">с</text:span><text:span text:style-name="T17"> </text:span><text:span text:style-name="T15">метаданными</text:span><text:span text:style-name="T16"> </text:span><text:span text:style-name="T18">СУБД:</text:span></text:h>
        </text:list-header>
      </text:list>
      <text:h text:style-name="P2" text:outline-level="3"/>
      <text:h text:style-name="P2" text:outline-level="3"/>
      <text:h text:style-name="P2" text:outline-level="3">Общая архитектура работы с метаданными</text:h>
      <text:p text:style-name="P31">Операции CREATE DATABASE, DROP DATABASE и USE относятся к <text:span text:style-name="Strong_20_Emphasis">метаданным</text:span> СУБД. Они обрабатываются следующим образом:</text:p>
      <text:list text:style-name="L83">
        <text:list-item>
          <text:p text:style-name="P51"><text:span text:style-name="Strong_20_Emphasis">Парсинг</text:span> — преобразование SQL-текста в структуру команды (CreateDatabaseCommand, DropDatabaseCommand, UseDatabaseCommand). </text:p>
        </text:list-item>
        <text:list-item>
          <text:p text:style-name="P51"><text:span text:style-name="Strong_20_Emphasis">Диспетчеризация</text:span> — DBMS::execute(). </text:p>
        </text:list-item>
        <text:list-item>
          <text:p text:style-name="P52"><text:span text:style-name="Strong_20_Emphasis">Исполнение</text:span> — методы класса DBMS в файле dbms.cpp. </text:p>
        </text:list-item>
      </text:list>
      <text:p text:style-name="P13"/>
      <text:h text:style-name="P10" text:outline-level="3"><text:soft-page-break/>1. Парсинг команд</text:h>
      <text:p text:style-name="P31"><text:span text:style-name="Strong_20_Emphasis">Файл:</text:span> parser.cpp</text:p>
      <text:p text:style-name="P31"><text:span text:style-name="Strong_20_Emphasis">Основная функция:</text:span> Parser::parseStatement(const std::string&amp; text) (строки <text:span text:style-name="Strong_20_Emphasis">31–50</text:span>)</text:p>
      <text:p text:style-name="P32">C++</text:p>
      <text:p text:style-name="P14"><text:span text:style-name="Source_20_Text"><text:span text:style-name="T24">std::string command </text:span></text:span><text:span text:style-name="Source_20_Text"><text:span text:style-name="T28">=</text:span></text:span><text:span text:style-name="Source_20_Text"><text:span text:style-name="T36"> toUpper</text:span></text:span><text:span text:style-name="Source_20_Text"><text:span text:style-name="T24">(</text:span></text:span><text:span text:style-name="Source_20_Text"><text:span text:style-name="T32">first</text:span></text:span><text:span text:style-name="Source_20_Text"><text:span text:style-name="T24">.</text:span></text:span><text:span text:style-name="Source_20_Text"><text:span text:style-name="T32">text</text:span></text:span><text:span text:style-name="Source_20_Text"><text:span text:style-name="T24">);</text:span></text:span></text:p>
      <text:p text:style-name="P14"><text:span text:style-name="Source_20_Text"><text:span text:style-name="T28">if</text:span></text:span><text:span text:style-name="Source_20_Text"><text:span text:style-name="T24"> (command </text:span></text:span><text:span text:style-name="Source_20_Text"><text:span text:style-name="T28">==</text:span></text:span><text:span text:style-name="Source_20_Text"><text:span text:style-name="T39"> "CREATE"</text:span></text:span><text:span text:style-name="Source_20_Text"><text:span text:style-name="T24">)</text:span></text:span></text:p>
      <text:p text:style-name="P14"><text:span text:style-name="Source_20_Text"><text:span text:style-name="T24">{</text:span></text:span></text:p>
      <text:p text:style-name="P14"><text:span text:style-name="Source_20_Text"><text:span text:style-name="T26"><text:s text:c="4"/></text:span></text:span><text:span text:style-name="Source_20_Text"><text:span text:style-name="T24">Token second </text:span></text:span><text:span text:style-name="Source_20_Text"><text:span text:style-name="T28">=</text:span></text:span><text:span text:style-name="Source_20_Text"><text:span text:style-name="T32"> lexer</text:span></text:span><text:span text:style-name="Source_20_Text"><text:span text:style-name="T24">.</text:span></text:span><text:span text:style-name="Source_20_Text"><text:span text:style-name="T36">next</text:span></text:span><text:span text:style-name="Source_20_Text"><text:span text:style-name="T24">();</text:span></text:span></text:p>
      <text:p text:style-name="P14"><text:span text:style-name="Source_20_Text"><text:span text:style-name="T26"><text:s text:c="4"/></text:span></text:span><text:span text:style-name="Source_20_Text"><text:span text:style-name="T24">std::string next </text:span></text:span><text:span text:style-name="Source_20_Text"><text:span text:style-name="T28">=</text:span></text:span><text:span text:style-name="Source_20_Text"><text:span text:style-name="T36"> toUpper</text:span></text:span><text:span text:style-name="Source_20_Text"><text:span text:style-name="T24">(</text:span></text:span><text:span text:style-name="Source_20_Text"><text:span text:style-name="T32">second</text:span></text:span><text:span text:style-name="Source_20_Text"><text:span text:style-name="T24">.</text:span></text:span><text:span text:style-name="Source_20_Text"><text:span text:style-name="T32">text</text:span></text:span><text:span text:style-name="Source_20_Text"><text:span text:style-name="T24">);</text:span></text:span></text:p>
      <text:p text:style-name="P14"><text:span text:style-name="Source_20_Text"><text:span text:style-name="T26"><text:s text:c="4"/></text:span></text:span></text:p>
      <text:p text:style-name="P14"><text:span text:style-name="Source_20_Text"><text:span text:style-name="T30"><text:s text:c="4"/></text:span></text:span><text:span text:style-name="Source_20_Text"><text:span text:style-name="T28">if</text:span></text:span><text:span text:style-name="Source_20_Text"><text:span text:style-name="T24"> (next </text:span></text:span><text:span text:style-name="Source_20_Text"><text:span text:style-name="T28">==</text:span></text:span><text:span text:style-name="Source_20_Text"><text:span text:style-name="T39"> "DATABASE"</text:span></text:span><text:span text:style-name="Source_20_Text"><text:span text:style-name="T24">) </text:span></text:span></text:p>
      <text:p text:style-name="P14"><text:span text:style-name="Source_20_Text"><text:span text:style-name="T26"><text:s text:c="8"/></text:span></text:span><text:span text:style-name="Source_20_Text"><text:span text:style-name="T24">statement </text:span></text:span><text:span text:style-name="Source_20_Text"><text:span text:style-name="T28">=</text:span></text:span><text:span text:style-name="Source_20_Text"><text:span text:style-name="T24"> CreateDatabaseCommand{</text:span></text:span><text:span text:style-name="Source_20_Text"><text:span text:style-name="T36">parseIdentifier</text:span></text:span><text:span text:style-name="Source_20_Text"><text:span text:style-name="T24">(lexer)};</text:span></text:span><text:span text:style-name="Source_20_Text"><text:span text:style-name="T43"> <text:s text:c="2"/></text:span></text:span><text:span text:style-name="Source_20_Text"><text:span text:style-name="T41">// ← CREATE DATABASE</text:span></text:span></text:p>
      <text:p text:style-name="P14"><text:span text:style-name="Source_20_Text"><text:span text:style-name="T26"><text:s text:c="4"/></text:span></text:span><text:span text:style-name="Source_20_Text"><text:span text:style-name="T24">...</text:span></text:span></text:p>
      <text:p text:style-name="P14"><text:span text:style-name="Source_20_Text"><text:span text:style-name="T24">}</text:span></text:span></text:p>
      <text:p text:style-name="P14"><text:span text:style-name="Source_20_Text"><text:span text:style-name="T28">else if</text:span></text:span><text:span text:style-name="Source_20_Text"><text:span text:style-name="T24"> (command </text:span></text:span><text:span text:style-name="Source_20_Text"><text:span text:style-name="T28">==</text:span></text:span><text:span text:style-name="Source_20_Text"><text:span text:style-name="T39"> "DROP"</text:span></text:span><text:span text:style-name="Source_20_Text"><text:span text:style-name="T24">)</text:span></text:span></text:p>
      <text:p text:style-name="P14"><text:span text:style-name="Source_20_Text"><text:span text:style-name="T24">{</text:span></text:span></text:p>
      <text:p text:style-name="P14"><text:span text:style-name="Source_20_Text"><text:span text:style-name="T26"><text:s text:c="4"/></text:span></text:span><text:span text:style-name="Source_20_Text"><text:span text:style-name="T24">...</text:span></text:span></text:p>
      <text:p text:style-name="P14"><text:span text:style-name="Source_20_Text"><text:span text:style-name="T30"><text:s text:c="4"/></text:span></text:span><text:span text:style-name="Source_20_Text"><text:span text:style-name="T28">if</text:span></text:span><text:span text:style-name="Source_20_Text"><text:span text:style-name="T24"> (next </text:span></text:span><text:span text:style-name="Source_20_Text"><text:span text:style-name="T28">==</text:span></text:span><text:span text:style-name="Source_20_Text"><text:span text:style-name="T39"> "DATABASE"</text:span></text:span><text:span text:style-name="Source_20_Text"><text:span text:style-name="T24">) </text:span></text:span></text:p>
      <text:p text:style-name="P14"><text:span text:style-name="Source_20_Text"><text:span text:style-name="T26"><text:s text:c="8"/></text:span></text:span><text:span text:style-name="Source_20_Text"><text:span text:style-name="T24">statement </text:span></text:span><text:span text:style-name="Source_20_Text"><text:span text:style-name="T28">=</text:span></text:span><text:span text:style-name="Source_20_Text"><text:span text:style-name="T24"> DropDatabaseCommand{</text:span></text:span><text:span text:style-name="Source_20_Text"><text:span text:style-name="T36">parseIdentifier</text:span></text:span><text:span text:style-name="Source_20_Text"><text:span text:style-name="T24">(lexer)};</text:span></text:span><text:span text:style-name="Source_20_Text"><text:span text:style-name="T43"> <text:s text:c="3"/></text:span></text:span><text:span text:style-name="Source_20_Text"><text:span text:style-name="T41">// ← DROP DATABASE</text:span></text:span></text:p>
      <text:p text:style-name="P14"><text:span text:style-name="Source_20_Text"><text:span text:style-name="T24">}</text:span></text:span></text:p>
      <text:p text:style-name="P14"><text:span text:style-name="Source_20_Text"><text:span text:style-name="T28">else if</text:span></text:span><text:span text:style-name="Source_20_Text"><text:span text:style-name="T24"> (command </text:span></text:span><text:span text:style-name="Source_20_Text"><text:span text:style-name="T28">==</text:span></text:span><text:span text:style-name="Source_20_Text"><text:span text:style-name="T39"> "USE"</text:span></text:span><text:span text:style-name="Source_20_Text"><text:span text:style-name="T24">)</text:span></text:span></text:p>
      <text:p text:style-name="P14"><text:span text:style-name="Source_20_Text"><text:span text:style-name="T24">{</text:span></text:span></text:p>
      <text:p text:style-name="P14"><text:span text:style-name="Source_20_Text"><text:span text:style-name="T26"><text:s text:c="4"/></text:span></text:span><text:span text:style-name="Source_20_Text"><text:span text:style-name="T24">statement </text:span></text:span><text:span text:style-name="Source_20_Text"><text:span text:style-name="T28">=</text:span></text:span><text:span text:style-name="Source_20_Text"><text:span text:style-name="T24"> UseDatabaseCommand{</text:span></text:span><text:span text:style-name="Source_20_Text"><text:span text:style-name="T36">parseIdentifier</text:span></text:span><text:span text:style-name="Source_20_Text"><text:span text:style-name="T24">(lexer)};</text:span></text:span><text:span text:style-name="Source_20_Text"><text:span text:style-name="T43"> <text:s text:c="8"/></text:span></text:span><text:span text:style-name="Source_20_Text"><text:span text:style-name="T41">// ← USE</text:span></text:span></text:p>
      <text:p text:style-name="P14"><text:soft-page-break/><text:span text:style-name="Source_20_Text"><text:span text:style-name="T24">}</text:span></text:span></text:p>
      <text:list text:style-name="L84">
        <text:list-item>
          <text:p text:style-name="P53">Имя базы данных парсится через Parser::parseIdentifier() (строки <text:span text:style-name="Strong_20_Emphasis">80–95</text:span>), который использует isValidIdentifier() из utils.cpp. </text:p>
        </text:list-item>
        <text:list-item>
          <text:p text:style-name="P54">Ключевые слова регистронезависимы (toUpper()). </text:p>
        </text:list-item>
      </text:list>
      <text:p text:style-name="P13"/>
      <text:h text:style-name="P10" text:outline-level="3">2. Диспетчеризация выполнения</text:h>
      <text:p text:style-name="P31"><text:span text:style-name="Strong_20_Emphasis">Файл:</text:span> dbms.cpp</text:p>
      <text:p text:style-name="P31"><text:span text:style-name="Strong_20_Emphasis">Функция:</text:span> DBMS::execute(const Statement&amp; statement) (строки <text:span text:style-name="Strong_20_Emphasis">81–83</text:span>)</text:p>
      <text:p text:style-name="P32">C++</text:p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CreateDatabaseCommand</text:span></text:span><text:span text:style-name="Source_20_Text"><text:span text:style-name="T24">&gt;(statement)) 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CreateDatabase</text:span></text:span><text:span text:style-name="Source_20_Text"><text:span text:style-name="T24">(std::</text:span></text:span><text:span text:style-name="Source_20_Text"><text:span text:style-name="T36">get</text:span></text:span><text:span text:style-name="Source_20_Text"><text:span text:style-name="T24">&lt;</text:span></text:span><text:span text:style-name="Source_20_Text"><text:span text:style-name="T51">CreateDatabaseCommand</text:span></text:span><text:span text:style-name="Source_20_Text"><text:span text:style-name="T24">&gt;(statement));</text:span></text:span></text:p>
      <text:p text:style-name="P15"/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DropDatabaseCommand</text:span></text:span><text:span text:style-name="Source_20_Text"><text:span text:style-name="T24">&gt;(statement)) 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DropDatabase</text:span></text:span><text:span text:style-name="Source_20_Text"><text:span text:style-name="T24">(std::</text:span></text:span><text:span text:style-name="Source_20_Text"><text:span text:style-name="T36">get</text:span></text:span><text:span text:style-name="Source_20_Text"><text:span text:style-name="T24">&lt;</text:span></text:span><text:span text:style-name="Source_20_Text"><text:span text:style-name="T51">DropDatabaseCommand</text:span></text:span><text:span text:style-name="Source_20_Text"><text:span text:style-name="T24">&gt;(statement));</text:span></text:span></text:p>
      <text:p text:style-name="P15"/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UseDatabaseCommand</text:span></text:span><text:span text:style-name="Source_20_Text"><text:span text:style-name="T24">&gt;(statement)) 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UseDatabase</text:span></text:span><text:span text:style-name="Source_20_Text"><text:span text:style-name="T24">(std::</text:span></text:span><text:span text:style-name="Source_20_Text"><text:span text:style-name="T36">get</text:span></text:span><text:span text:style-name="Source_20_Text"><text:span text:style-name="T24">&lt;</text:span></text:span><text:span text:style-name="Source_20_Text"><text:span text:style-name="T51">UseDatabaseCommand</text:span></text:span><text:span text:style-name="Source_20_Text"><text:span text:style-name="T24">&gt;(statement));</text:span></text:span></text:p>
      <text:p text:style-name="P13"/>
      <text:h text:style-name="P10" text:outline-level="3">3. Основная реализация (файл dbms.cpp)</text:h>
      <text:h text:style-name="P11" text:outline-level="4"><text:span text:style-name="Strong_20_Emphasis">CREATE DATABASE</text:span></text:h>
      <text:p text:style-name="P31"><text:span text:style-name="Strong_20_Emphasis">Функция:</text:span> DBMS::executeCreateDatabase(const CreateDatabaseCommand&amp; command) (строки <text:span text:style-name="Strong_20_Emphasis">93–109</text:span>)</text:p>
      <text:p text:style-name="P31"><text:span text:style-name="Strong_20_Emphasis">Как работает:</text:span></text:p>
      <text:list text:style-name="L85">
        <text:list-item>
          <text:p text:style-name="P55">Блокировка: std::lock_guard&lt;std::mutex&gt; lock(metadataMutex()); — защита от конкурентного доступа. </text:p>
        </text:list-item>
        <text:list-item>
          <text:p text:style-name="P55">Проверка валидности имени базы данных (isValidIdentifier()). </text:p>
        </text:list-item>
        <text:list-item>
          <text:p text:style-name="P55">Проверка, что база уже не существует (std::filesystem::exists()). </text:p>
        </text:list-item>
        <text:list-item>
          <text:p text:style-name="P55">Создание директории: std::filesystem::create_directories(path); </text:p>
        </text:list-item>
        <text:list-item>
          <text:p text:style-name="P56">Возврат сообщения "OK: база данных создана: ...". </text:p>
        </text:list-item>
      </text:list>
      <text:p text:style-name="P31"><text:span text:style-name="Strong_20_Emphasis">Путь к базе:</text:span> databasePath(command.databaseName) = rootPath_ / databaseName (по умолчанию data/&lt;database_name&gt;).</text:p>
      <text:p text:style-name="P13"/>
      <text:h text:style-name="P11" text:outline-level="4"><text:soft-page-break/><text:span text:style-name="Strong_20_Emphasis">DROP DATABASE</text:span></text:h>
      <text:p text:style-name="P31"><text:span text:style-name="Strong_20_Emphasis">Функция:</text:span> DBMS::executeDropDatabase(const DropDatabaseCommand&amp; command) (строки <text:span text:style-name="Strong_20_Emphasis">112–128</text:span>)</text:p>
      <text:p text:style-name="P31"><text:span text:style-name="Strong_20_Emphasis">Как работает:</text:span></text:p>
      <text:list text:style-name="L86">
        <text:list-item>
          <text:p text:style-name="P57">Блокировка метаданных. </text:p>
        </text:list-item>
        <text:list-item>
          <text:p text:style-name="P57">Проверка существования базы данных. </text:p>
        </text:list-item>
        <text:list-item>
          <text:p text:style-name="P57">Полное удаление директории: std::filesystem::remove_all(path); </text:p>
        </text:list-item>
        <text:list-item>
          <text:p text:style-name="P57">Если удаляемая база была текущей (currentDatabase_), то сбрасывается контекст: currentDatabase_.clear(); </text:p>
        </text:list-item>
        <text:list-item>
          <text:p text:style-name="P58">Возврат сообщения "OK: база данных удалена: ...". </text:p>
        </text:list-item>
      </text:list>
      <text:p text:style-name="P13"/>
      <text:h text:style-name="P11" text:outline-level="4"><text:span text:style-name="Strong_20_Emphasis">USE DATABASE</text:span></text:h>
      <text:p text:style-name="P31"><text:span text:style-name="Strong_20_Emphasis">Функция:</text:span> DBMS::executeUseDatabase(const UseDatabaseCommand&amp; command) (строки <text:span text:style-name="Strong_20_Emphasis">131–141</text:span>)</text:p>
      <text:p text:style-name="P31"><text:span text:style-name="Strong_20_Emphasis">Как работает:</text:span></text:p>
      <text:list text:style-name="L87">
        <text:list-item>
          <text:p text:style-name="P59">Блокировка метаданных. </text:p>
        </text:list-item>
        <text:list-item>
          <text:p text:style-name="P59">Проверка существования базы данных. </text:p>
        </text:list-item>
        <text:list-item>
          <text:p text:style-name="P59">Установка текущего контекста: currentDatabase_ = command.databaseName; </text:p>
        </text:list-item>
        <text:list-item>
          <text:p text:style-name="P60">Возврат сообщения "OK: выбрана база данных: ...". </text:p>
        </text:list-item>
      </text:list>
      <text:p text:style-name="P31">Это устанавливает активную базу данных для последующих операций (CREATE TABLE, INSERT и т.д.), если в запросе не указан полный путь db.table.</text:p>
      <text:p text:style-name="P13"/>
      <text:h text:style-name="P10" text:outline-level="3">4. Вспомогательные механизмы</text:h>
      <text:p text:style-name="P31"><text:span text:style-name="Strong_20_Emphasis">В файле dbms.cpp:</text:span></text:p>
      <text:list text:style-name="L88">
        <text:list-item>
          <text:p text:style-name="P61"><text:span text:style-name="Strong_20_Emphasis">databasePath(const std::string&amp; databaseName)</text:span> (строки <text:span text:style-name="Strong_20_Emphasis">53–56</text:span>) — формирует путь data/&lt;имя_бд&gt;. </text:p>
        </text:list-item>
        <text:list-item>
          <text:p text:style-name="P61"><text:span text:style-name="Strong_20_Emphasis">resolveDatabaseName(const TableName&amp; table)</text:span> (строки <text:span text:style-name="Strong_20_Emphasis">59–70</text:span>) — определяет, какую базу использовать:</text:p>
          <text:list>
            <text:list-item>
              <text:p text:style-name="P61">Если в запросе указано db.table — использует указанную. </text:p>
            </text:list-item>
            <text:list-item>
              <text:p text:style-name="P61">Иначе — использует currentDatabase_. </text:p>
            </text:list-item>
          </text:list>
        </text:list-item>
        <text:list-item>
          <text:p text:style-name="P61"><text:span text:style-name="Strong_20_Emphasis">requireDatabaseFromTableName()</text:span> — открывает базу данных для операций с таблицами. </text:p>
        </text:list-item>
        <text:list-item>
          <text:p text:style-name="P62"><text:span text:style-name="Strong_20_Emphasis">metadataMutex()</text:span> — глобальный мьютекс для защиты операций с базами данных (из tablelocks.cpp). </text:p>
        </text:list-item>
      </text:list>
      <text:p text:style-name="P13"/>
      <text:h text:style-name="P10" text:outline-level="3">Поток выполнения (пример)</text:h>
      <text:p text:style-name="P31"><text:span text:style-name="Strong_20_Emphasis">CREATE DATABASE testdb;</text:span></text:p>
      <text:p text:style-name="P32">text</text:p>
      <text:p text:style-name="P14"><text:span text:style-name="Source_20_Text"><text:span text:style-name="T24">SQL → Lexer → Parser::parseStatement() → CreateDatabaseCommand</text:span></text:span></text:p>
      <text:p text:style-name="P15"><text:span text:style-name="Source_20_Text"><text:span text:style-name="T26"><text:s text:c="4"/>→ </text:span></text:span><text:span text:style-name="Source_20_Text"><text:span text:style-name="T24">DBMS::execute() → executeCreateDatabase()</text:span></text:span></text:p>
      <text:p text:style-name="P15"><text:span text:style-name="Source_20_Text"><text:span text:style-name="T26"><text:s text:c="8"/>→ </text:span></text:span><text:span text:style-name="Source_20_Text"><text:span text:style-name="T24">metadataMutex()</text:span></text:span></text:p>
      <text:p text:style-name="P15"><text:soft-page-break/><text:span text:style-name="Source_20_Text"><text:span text:style-name="T26"><text:s text:c="8"/>→ </text:span></text:span><text:span text:style-name="Source_20_Text"><text:span text:style-name="T24">create_directories("data/testdb")</text:span></text:span></text:p>
      <text:p text:style-name="P15"><text:span text:style-name="Source_20_Text"><text:span text:style-name="T26"><text:s text:c="8"/>→ </text:span></text:span><text:span text:style-name="Source_20_Text"><text:span text:style-name="T24">"OK: база данных создана: testdb"</text:span></text:span></text:p>
      <text:p text:style-name="P31"><text:span text:style-name="Strong_20_Emphasis">USE testdb;</text:span></text:p>
      <text:p text:style-name="P32">text</text:p>
      <text:p text:style-name="P14"><text:span text:style-name="Source_20_Text"><text:span text:style-name="T26">→ </text:span></text:span><text:span text:style-name="Source_20_Text"><text:span text:style-name="T24">Parser → UseDatabaseCommand</text:span></text:span></text:p>
      <text:p text:style-name="P15"><text:span text:style-name="Source_20_Text"><text:span text:style-name="T26"><text:s text:c="4"/>→ </text:span></text:span><text:span text:style-name="Source_20_Text"><text:span text:style-name="T24">DBMS::executeUseDatabase()</text:span></text:span></text:p>
      <text:p text:style-name="P15"><text:span text:style-name="Source_20_Text"><text:span text:style-name="T26"><text:s text:c="8"/>→ </text:span></text:span><text:span text:style-name="Source_20_Text"><text:span text:style-name="T24">currentDatabase_ = "testdb"</text:span></text:span></text:p>
      <text:p text:style-name="P31"><text:span text:style-name="Strong_20_Emphasis">DROP DATABASE testdb;</text:span></text:p>
      <text:p text:style-name="P32">text</text:p>
      <text:p text:style-name="P14"><text:span text:style-name="Source_20_Text"><text:span text:style-name="T26">→ </text:span></text:span><text:span text:style-name="Source_20_Text"><text:span text:style-name="T24">Parser → DropDatabaseCommand</text:span></text:span></text:p>
      <text:p text:style-name="P15"><text:span text:style-name="Source_20_Text"><text:span text:style-name="T26"><text:s text:c="4"/>→ </text:span></text:span><text:span text:style-name="Source_20_Text"><text:span text:style-name="T24">DBMS::executeDropDatabase()</text:span></text:span></text:p>
      <text:p text:style-name="P15"><text:span text:style-name="Source_20_Text"><text:span text:style-name="T26"><text:s text:c="8"/>→ </text:span></text:span><text:span text:style-name="Source_20_Text"><text:span text:style-name="T24">remove_all("data/testdb")</text:span></text:span></text:p>
      <text:p text:style-name="P15"><text:span text:style-name="Source_20_Text"><text:span text:style-name="T26"><text:s text:c="8"/>→ </text:span></text:span><text:span text:style-name="Source_20_Text"><text:span text:style-name="T24">если нужно — сброс currentDatabase_</text:span></text:span></text:p>
      <text:p text:style-name="P13"/>
      <text:h text:style-name="P10" text:outline-level="3">Особенности реализации</text:h>
      <text:list text:style-name="L89">
        <text:list-item>
          <text:p text:style-name="P63"><text:span text:style-name="Strong_20_Emphasis">Хранение:</text:span> Каждая база данных — это обычная папка в data/. </text:p>
        </text:list-item>
        <text:list-item>
          <text:p text:style-name="P63"><text:span text:style-name="Strong_20_Emphasis">Метаданные таблиц</text:span> хранятся внутри папки базы (schema.pb, rows.dat и т.д.). </text:p>
        </text:list-item>
        <text:list-item>
          <text:p text:style-name="P63"><text:span text:style-name="Strong_20_Emphasis">Thread-safety:</text:span> Все операции с метаданными защищены metadataMutex(). </text:p>
        </text:list-item>
        <text:list-item>
          <text:p text:style-name="P64"><text:span text:style-name="Strong_20_Emphasis">Ошибка при отсутствии USE:</text:span> При попытке создать таблицу без выбранной базы или без указания db.table будет выброшена ошибка. </text:p>
        </text:list-item>
      </text:list>
      <text:p text:style-name="P31"><text:span text:style-name="Strong_20_Emphasis">Главный файл реализации работы с метаданными СУБД — dbms.cpp.</text:span></text:p>
      <text:p text:style-name="P19"/>
      <text:p text:style-name="P19"/>
      <text:list xml:id="list33222542817342" text:continue-list="list1033607201" text:style-name="WWNum3">
        <text:list-header>
          <text:h text:style-name="P4" text:outline-level="3"><text:span text:style-name="T6">Работа</text:span><text:span text:style-name="T11"> </text:span><text:span text:style-name="T6">со</text:span><text:span text:style-name="T12"> </text:span><text:span text:style-name="T6">схемами</text:span><text:span text:style-name="T11"> </text:span><text:span text:style-name="T6">данных</text:span><text:span text:style-name="T12"> </text:span><text:span text:style-name="T9">(DDL):</text:span></text:h>
        </text:list-header>
      </text:list>
      <text:p text:style-name="P19"/>
      <text:p text:style-name="P19"/>
      <text:h text:style-name="P2" text:outline-level="3"/>
      <text:h text:style-name="P2" text:outline-level="3"><text:span text:style-name="Strong_20_Emphasis">Общая архитектура DDL</text:span></text:h>
      <text:p text:style-name="P31">DDL-команды (CREATE TABLE, DROP TABLE) проходят через те же 3 этапа, что и DML:</text:p>
      <text:list text:style-name="L90">
        <text:list-item>
          <text:p text:style-name="P65"><text:span text:style-name="Strong_20_Emphasis">Парсинг</text:span> — parser.cpp </text:p>
        </text:list-item>
        <text:list-item>
          <text:p text:style-name="P65"><text:span text:style-name="Strong_20_Emphasis">Диспетчеризация</text:span> — dbms.cpp </text:p>
        </text:list-item>
        <text:list-item>
          <text:p text:style-name="P66"><text:span text:style-name="Strong_20_Emphasis">Исполнение</text:span> — table.cpp (основная логика) </text:p>
        </text:list-item>
      </text:list>
      <text:p text:style-name="P13"><text:soft-page-break/></text:p>
      <text:h text:style-name="P10" text:outline-level="3">1. Парсинг команд (Lexer + Parser)</text:h>
      <text:p text:style-name="P31"><text:span text:style-name="Strong_20_Emphasis">Файл:</text:span> parser.cpp</text:p>
      <text:h text:style-name="P11" text:outline-level="4">CREATE TABLE</text:h>
      <text:list text:style-name="L91">
        <text:list-item>
          <text:p text:style-name="P67"><text:span text:style-name="Strong_20_Emphasis">Основная функция:</text:span> Parser::parseCreateTable(Lexer&amp; lexer) (строки <text:span text:style-name="Strong_20_Emphasis">300–355</text:span>) </text:p>
        </text:list-item>
      </text:list>
      <text:p text:style-name="P31"><text:span text:style-name="Strong_20_Emphasis">Как парсится:</text:span></text:p>
      <text:p text:style-name="P32">SQL</text:p>
      <text:p text:style-name="P14"><text:span text:style-name="Source_20_Text"><text:span text:style-name="T28">CREATE TABLE</text:span></text:span><text:span text:style-name="Source_20_Text"><text:span text:style-name="T36"> users</text:span></text:span><text:span text:style-name="Source_20_Text"><text:span text:style-name="T24"> (</text:span></text:span></text:p>
      <text:p text:style-name="P14"><text:span text:style-name="Source_20_Text"><text:span text:style-name="T26"><text:s text:c="4"/></text:span></text:span><text:span text:style-name="Source_20_Text"><text:span text:style-name="T24">id </text:span></text:span><text:span text:style-name="Source_20_Text"><text:span text:style-name="T48">INT</text:span></text:span><text:span text:style-name="Source_20_Text"><text:span text:style-name="T24"> INDEXED,</text:span></text:span></text:p>
      <text:p text:style-name="P14"><text:span text:style-name="Source_20_Text"><text:span text:style-name="T30"><text:s text:c="4"/></text:span></text:span><text:span text:style-name="Source_20_Text"><text:span text:style-name="T28">name</text:span></text:span><text:span text:style-name="Source_20_Text"><text:span text:style-name="T24"> STRING NOT_NULL,</text:span></text:span></text:p>
      <text:p text:style-name="P14"><text:span text:style-name="Source_20_Text"><text:span text:style-name="T26"><text:s text:c="4"/></text:span></text:span><text:span text:style-name="Source_20_Text"><text:span text:style-name="T24">age </text:span></text:span><text:span text:style-name="Source_20_Text"><text:span text:style-name="T48">INT</text:span></text:span><text:span text:style-name="Source_20_Text"><text:span text:style-name="T53"> DEFAULT</text:span></text:span><text:span text:style-name="Source_20_Text"><text:span text:style-name="T46"> 18</text:span></text:span><text:span text:style-name="Source_20_Text"><text:span text:style-name="T24">,</text:span></text:span></text:p>
      <text:p text:style-name="P14"><text:span text:style-name="Source_20_Text"><text:span text:style-name="T26"><text:s text:c="4"/></text:span></text:span><text:span text:style-name="Source_20_Text"><text:span text:style-name="T24">email STRING</text:span></text:span></text:p>
      <text:p text:style-name="P14"><text:span text:style-name="Source_20_Text"><text:span text:style-name="T24">);</text:span></text:span></text:p>
      <text:list text:style-name="L92">
        <text:list-item>
          <text:p text:style-name="P68">Ожидает имя таблицы </text:p>
        </text:list-item>
        <text:list-item>
          <text:p text:style-name="P68">Ожидает ( ... ) </text:p>
        </text:list-item>
        <text:list-item>
          <text:p text:style-name="P68">Для каждой колонки:</text:p>
          <text:list>
            <text:list-item>
              <text:p text:style-name="P68">Имя столбца (parseIdentifier) </text:p>
            </text:list-item>
            <text:list-item>
              <text:p text:style-name="P68">Тип (INT или STRING) </text:p>
            </text:list-item>
            <text:list-item>
              <text:p text:style-name="P68">Опциональные модификаторы:</text:p>
              <text:list>
                <text:list-item>
                  <text:p text:style-name="P68">NOT_NULL </text:p>
                </text:list-item>
                <text:list-item>
                  <text:p text:style-name="P68">INDEXED (автоматически включает NOT_NULL) </text:p>
                </text:list-item>
                <text:list-item>
                  <text:p text:style-name="P68">DEFAULT + литерал </text:p>
                </text:list-item>
              </text:list>
            </text:list-item>
          </text:list>
        </text:list-item>
        <text:list-item>
          <text:p text:style-name="P69">Поддерживает несколько колонок через запятую. </text:p>
        </text:list-item>
      </text:list>
      <text:h text:style-name="P11" text:outline-level="4">DROP TABLE</text:h>
      <text:list text:style-name="L93">
        <text:list-item>
          <text:p text:style-name="P70">Парсится в Parser::parseStatement() (строки 35–50) </text:p>
        </text:list-item>
        <text:list-item>
          <text:p text:style-name="P71">Вызывает parseTableName() (строки 97–113), который поддерживает формат database.table или просто table. </text:p>
        </text:list-item>
      </text:list>
      <text:p text:style-name="P13"/>
      <text:h text:style-name="P10" text:outline-level="3">2. Диспетчеризация выполнения</text:h>
      <text:p text:style-name="P31"><text:span text:style-name="Strong_20_Emphasis">Файл:</text:span> dbms.cpp</text:p>
      <text:p text:style-name="P31"><text:span text:style-name="Strong_20_Emphasis">Функция:</text:span> DBMS::execute(const Statement&amp; statement) (строки 81–83)</text:p>
      <text:p text:style-name="P32">C++</text:p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CreateTableCommand</text:span></text:span><text:span text:style-name="Source_20_Text"><text:span text:style-name="T24">&gt;(statement))</text:span></text:span></text:p>
      <text:p text:style-name="P14"><text:soft-page-break/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CreateTable</text:span></text:span><text:span text:style-name="Source_20_Text"><text:span text:style-name="T24">(std::</text:span></text:span><text:span text:style-name="Source_20_Text"><text:span text:style-name="T36">get</text:span></text:span><text:span text:style-name="Source_20_Text"><text:span text:style-name="T24">&lt;</text:span></text:span><text:span text:style-name="Source_20_Text"><text:span text:style-name="T51">CreateTableCommand</text:span></text:span><text:span text:style-name="Source_20_Text"><text:span text:style-name="T24">&gt;(statement));</text:span></text:span></text:p>
      <text:p text:style-name="P15"/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DropTableCommand</text:span></text:span><text:span text:style-name="Source_20_Text"><text:span text:style-name="T24">&gt;(statement))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DropTable</text:span></text:span><text:span text:style-name="Source_20_Text"><text:span text:style-name="T24">(std::</text:span></text:span><text:span text:style-name="Source_20_Text"><text:span text:style-name="T36">get</text:span></text:span><text:span text:style-name="Source_20_Text"><text:span text:style-name="T24">&lt;</text:span></text:span><text:span text:style-name="Source_20_Text"><text:span text:style-name="T51">DropTableCommand</text:span></text:span><text:span text:style-name="Source_20_Text"><text:span text:style-name="T24">&gt;(statement));</text:span></text:span></text:p>
      <text:h text:style-name="P11" text:outline-level="4">Конкретные методы:</text:h>
      <text:list text:style-name="L94">
        <text:list-item>
          <text:p text:style-name="P72"><text:span text:style-name="Strong_20_Emphasis">DBMS::executeCreateTable()</text:span> — строки <text:span text:style-name="Strong_20_Emphasis">144–155</text:span> </text:p>
        </text:list-item>
        <text:list-item>
          <text:p text:style-name="P73"><text:span text:style-name="Strong_20_Emphasis">DBMS::executeDropTable()</text:span> — строки <text:span text:style-name="Strong_20_Emphasis">158–167</text:span> </text:p>
        </text:list-item>
      </text:list>
      <text:p text:style-name="P13"/>
      <text:h text:style-name="P10" text:outline-level="3">3. Основная реализация DDL (самое важное)</text:h>
      <text:p text:style-name="P31"><text:span text:style-name="Strong_20_Emphasis">Файл:</text:span> table.cpp — <text:span text:style-name="Strong_20_Emphasis">главный файл</text:span> для DDL.</text:p>
      <text:h text:style-name="P11" text:outline-level="4">CREATE TABLE</text:h>
      <text:p text:style-name="P31"><text:span text:style-name="Strong_20_Emphasis">Функция:</text:span> Table::create() (строки <text:span text:style-name="Strong_20_Emphasis">85–170</text:span>)</text:p>
      <text:p text:style-name="P31"><text:span text:style-name="Strong_20_Emphasis">Подробный алгоритм:</text:span></text:p>
      <text:list text:style-name="L95">
        <text:list-item>
          <text:p text:style-name="P74"><text:span text:style-name="Strong_20_Emphasis">Валидация:</text:span></text:p>
          <text:list>
            <text:list-item>
              <text:p text:style-name="P74">Имя таблицы должно быть валидным идентификатором. </text:p>
            </text:list-item>
            <text:list-item>
              <text:p text:style-name="P74">Таблица не должна уже существовать. </text:p>
            </text:list-item>
            <text:list-item>
              <text:p text:style-name="P74">Хотя бы один столбец. </text:p>
            </text:list-item>
            <text:list-item>
              <text:p text:style-name="P74">Нет дублирующихся имён столбцов. </text:p>
            </text:list-item>
            <text:list-item>
              <text:p text:style-name="P74">INDEXED столбец автоматически требует NOT_NULL. </text:p>
            </text:list-item>
            <text:list-item>
              <text:p text:style-name="P74">DEFAULT значение должно соответствовать типу столбца. </text:p>
            </text:list-item>
          </text:list>
        </text:list-item>
        <text:list-item>
          <text:p text:style-name="P74"><text:span text:style-name="Strong_20_Emphasis">Создание структуры на диске:</text:span></text:p>
          <text:list>
            <text:list-item>
              <text:p text:style-name="P74">Создаёт папку data/&lt;database_name&gt;/&lt;table_name&gt;/ </text:p>
            </text:list-item>
            <text:list-item>
              <text:p text:style-name="P74">Создаёт файл schema.pb с protobuf-сериализацией схемы (schemaToProtoBytes()) </text:p>
            </text:list-item>
            <text:list-item>
              <text:p text:style-name="P74">Создаёт пустые файлы:</text:p>
              <text:list>
                <text:list-item>
                  <text:p text:style-name="P74">rows.dat — для хранения данных </text:p>
                </text:list-item>
                <text:list-item>
                  <text:p text:style-name="P74">deleted.pb — список tombstone-слотов </text:p>
                </text:list-item>
                <text:list-item>
                  <text:p text:style-name="P74">stringpool.pb — пул строк </text:p>
                </text:list-item>
              </text:list>
            </text:list-item>
            <text:list-item>
              <text:p text:style-name="P74">Создаёт папку indexes/ </text:p>
            </text:list-item>
          </text:list>
        </text:list-item>
        <text:list-item>
          <text:p text:style-name="P74"><text:span text:style-name="Strong_20_Emphasis">Создание индексов:</text:span></text:p>
          <text:list>
            <text:list-item>
              <text:p text:style-name="P74">Для каждой колонки с INDEXED создаётся DiskBStarIndex (B*-дерево на диске). </text:p>
            </text:list-item>
          </text:list>
        </text:list-item>
        <text:list-item>
          <text:p text:style-name="P74"><text:span text:style-name="Strong_20_Emphasis">Сохранение схемы:</text:span></text:p>
          <text:list>
            <text:list-item>
              <text:p text:style-name="P75">Схема сохраняется в protobuf-формате через storage.cpp. </text:p>
            </text:list-item>
          </text:list>
        </text:list-item>
      </text:list>
      <text:p text:style-name="P13"/>
      <text:h text:style-name="P11" text:outline-level="4">DROP TABLE</text:h>
      <text:p text:style-name="P31"><text:span text:style-name="Strong_20_Emphasis">Функция:</text:span> Table::drop() (строки <text:span text:style-name="Strong_20_Emphasis">173–183</text:span>)</text:p>
      <text:p text:style-name="P31"><text:span text:style-name="Strong_20_Emphasis">Как работает:</text:span></text:p>
      <text:list text:style-name="L96">
        <text:list-item>
          <text:p text:style-name="P76">Проверяет существование таблицы. </text:p>
        </text:list-item>
        <text:list-item>
          <text:p text:style-name="P77">Выполняет std::filesystem::remove_all(tablePath) — полностью удаляет папку таблицы со всеми файлами (данные, индексы, схема и т.д.). </text:p>
        </text:list-item>
      </text:list>
      <text:p text:style-name="P13"/>
      <text:h text:style-name="P10" text:outline-level="3"><text:soft-page-break/>Вспомогательные компонент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6">Компонент</text:p>
            </table:table-cell>
            <table:table-cell table:style-name="Таблица1.A1" office:value-type="string">
              <text:p text:style-name="P26">Файл</text:p>
            </table:table-cell>
            <table:table-cell table:style-name="Таблица1.A1" office:value-type="string">
              <text:p text:style-name="P27">Что делает</text:p>
            </table:table-cell>
          </table:table-row>
        </table:table-header-rows>
        <table:table-row>
          <table:table-cell table:style-name="Таблица1.A1" office:value-type="string">
            <text:p text:style-name="P24">schemaToProtoBytes()</text:p>
          </table:table-cell>
          <table:table-cell table:style-name="Таблица1.A1" office:value-type="string">
            <text:p text:style-name="P24">storage.cpp</text:p>
          </table:table-cell>
          <table:table-cell table:style-name="Таблица1.A1" office:value-type="string">
            <text:p text:style-name="P24">Сериализация схемы в protobuf</text:p>
          </table:table-cell>
        </table:table-row>
        <table:table-row>
          <table:table-cell table:style-name="Таблица1.A1" office:value-type="string">
            <text:p text:style-name="P24">schemaFromProtoBytes()</text:p>
          </table:table-cell>
          <table:table-cell table:style-name="Таблица1.A1" office:value-type="string">
            <text:p text:style-name="P24">storage.cpp</text:p>
          </table:table-cell>
          <table:table-cell table:style-name="Таблица1.A1" office:value-type="string">
            <text:p text:style-name="P24">Десериализация схемы</text:p>
          </table:table-cell>
        </table:table-row>
        <table:table-row>
          <table:table-cell table:style-name="Таблица1.A1" office:value-type="string">
            <text:p text:style-name="P24">loadSchema() + validateSchema()</text:p>
          </table:table-cell>
          <table:table-cell table:style-name="Таблица1.A1" office:value-type="string">
            <text:p text:style-name="P24">table.cpp</text:p>
          </table:table-cell>
          <table:table-cell table:style-name="Таблица1.A1" office:value-type="string">
            <text:p text:style-name="P24">Загрузка и проверка схемы при открытии таблицы</text:p>
          </table:table-cell>
        </table:table-row>
        <table:table-row>
          <table:table-cell table:style-name="Таблица1.A1" office:value-type="string">
            <text:p text:style-name="P24">buildIndexes()</text:p>
          </table:table-cell>
          <table:table-cell table:style-name="Таблица1.A1" office:value-type="string">
            <text:p text:style-name="P24">table.cpp</text:p>
          </table:table-cell>
          <table:table-cell table:style-name="Таблица1.A1" office:value-type="string">
            <text:p text:style-name="P24">Создание объектов DiskBStarIndex</text:p>
          </table:table-cell>
        </table:table-row>
        <table:table-row>
          <table:table-cell table:style-name="Таблица1.A1" office:value-type="string">
            <text:p text:style-name="P24">persistIndexesFromRows()</text:p>
          </table:table-cell>
          <table:table-cell table:style-name="Таблица1.A1" office:value-type="string">
            <text:p text:style-name="P24">table.cpp</text:p>
          </table:table-cell>
          <table:table-cell table:style-name="Таблица1.A1" office:value-type="string">
            <text:p text:style-name="P25">Перестройка индексов при необходимости</text:p>
          </table:table-cell>
        </table:table-row>
      </table:table>
      <text:p text:style-name="P13"/>
      <text:h text:style-name="P10" text:outline-level="3">Поток выполнения (пример CREATE TABLE)</text:h>
      <text:p text:style-name="P32">text</text:p>
      <text:p text:style-name="P14"><text:span text:style-name="Source_20_Text"><text:span text:style-name="T24">SQL-текст </text:span></text:span></text:p>
      <text:p text:style-name="P15"><text:span text:style-name="Source_20_Text"><text:span text:style-name="T26"><text:s text:c="4"/>→ </text:span></text:span><text:span text:style-name="Source_20_Text"><text:span text:style-name="T24">Lexer → Parser::parseCreateTable() → CreateTableCommand</text:span></text:span></text:p>
      <text:p text:style-name="P15"><text:span text:style-name="Source_20_Text"><text:span text:style-name="T26"><text:s text:c="8"/>→ </text:span></text:span><text:span text:style-name="Source_20_Text"><text:span text:style-name="T24">DBMS::executeCreateTable()</text:span></text:span></text:p>
      <text:p text:style-name="P15"><text:span text:style-name="Source_20_Text"><text:span text:style-name="T26"><text:s text:c="12"/>→ </text:span></text:span><text:span text:style-name="Source_20_Text"><text:span text:style-name="T24">Table::create()</text:span></text:span></text:p>
      <text:p text:style-name="P15"><text:span text:style-name="Source_20_Text"><text:span text:style-name="T26"><text:s text:c="16"/>→ </text:span></text:span><text:span text:style-name="Source_20_Text"><text:span text:style-name="T24">Валидация</text:span></text:span></text:p>
      <text:p text:style-name="P15"><text:span text:style-name="Source_20_Text"><text:span text:style-name="T26"><text:s text:c="16"/>→ </text:span></text:span><text:span text:style-name="Source_20_Text"><text:span text:style-name="T24">Создание папки и файлов</text:span></text:span></text:p>
      <text:p text:style-name="P15"><text:span text:style-name="Source_20_Text"><text:span text:style-name="T26"><text:s text:c="16"/>→ </text:span></text:span><text:span text:style-name="Source_20_Text"><text:span text:style-name="T24">schemaToProtoBytes() + запись в schema.pb</text:span></text:span></text:p>
      <text:p text:style-name="P15"><text:span text:style-name="Source_20_Text"><text:span text:style-name="T26"><text:s text:c="16"/>→ </text:span></text:span><text:span text:style-name="Source_20_Text"><text:span text:style-name="T24">Создание B*-индексов для INDEXED колонок</text:span></text:span></text:p>
      <text:h text:style-name="P10" text:outline-level="3">Поток выполнения DROP TABLE</text:h>
      <text:p text:style-name="P32">text</text:p>
      <text:p text:style-name="P14"><text:span text:style-name="Source_20_Text"><text:span text:style-name="T24">SQL-текст </text:span></text:span></text:p>
      <text:p text:style-name="P15"><text:span text:style-name="Source_20_Text"><text:span text:style-name="T26"><text:s text:c="4"/>→ </text:span></text:span><text:span text:style-name="Source_20_Text"><text:span text:style-name="T24">Parser → DropTableCommand</text:span></text:span></text:p>
      <text:p text:style-name="P15"><text:span text:style-name="Source_20_Text"><text:span text:style-name="T26"><text:s text:c="8"/>→ </text:span></text:span><text:span text:style-name="Source_20_Text"><text:span text:style-name="T24">DBMS::executeDropTable()</text:span></text:span></text:p>
      <text:p text:style-name="P15"><text:span text:style-name="Source_20_Text"><text:span text:style-name="T26"><text:s text:c="12"/>→ </text:span></text:span><text:span text:style-name="Source_20_Text"><text:span text:style-name="T24">Table::drop()</text:span></text:span></text:p>
      <text:p text:style-name="P15"><text:span text:style-name="Source_20_Text"><text:span text:style-name="T26"><text:s text:c="16"/>→ </text:span></text:span><text:span text:style-name="Source_20_Text"><text:span text:style-name="T24">std::filesystem::remove_all(папка таблицы)</text:span></text:span></text:p>
      <text:p text:style-name="P13"/>
      <text:h text:style-name="P10" text:outline-level="3">Важные особенности реализации</text:h>
      <text:list text:style-name="L97">
        <text:list-item>
          <text:p text:style-name="P78"><text:span text:style-name="Strong_20_Emphasis">Хранение метаданных:</text:span> Всё в protobuf (schema.pb, *.tree.meta.pb). </text:p>
        </text:list-item>
        <text:list-item>
          <text:p text:style-name="P78"><text:soft-page-break/><text:span text:style-name="Strong_20_Emphasis">Типы данных:</text:span> Только INT и STRING. </text:p>
        </text:list-item>
        <text:list-item>
          <text:p text:style-name="P78"><text:span text:style-name="Strong_20_Emphasis">Ограничения:</text:span> INDEXED = уникальный + NOT NULL. </text:p>
        </text:list-item>
        <text:list-item>
          <text:p text:style-name="P78"><text:span text:style-name="Strong_20_Emphasis">DEFAULT:</text:span> Поддерживается только на уровне вставки. </text:p>
        </text:list-item>
        <text:list-item>
          <text:p text:style-name="P79"><text:span text:style-name="Strong_20_Emphasis">Thread-safety:</text:span> Используется tableMutexForKey() из tablelocks.cpp. </text:p>
        </text:list-item>
      </text:list>
      <text:p text:style-name="P31"><text:span text:style-name="Strong_20_Emphasis">Главный файл реализации DDL — table.cpp.</text:span></text:p>
      <text:p text:style-name="P28"><text:span text:style-name="Strong_20_Emphasis"/></text:p>
      <text:p text:style-name="P19"/>
      <text:list text:continue-list="list33222542817342" text:style-name="WWNum3">
        <text:list-header>
          <text:h text:style-name="P7" text:outline-level="3"><text:span text:style-name="T19">Манипулирование</text:span><text:span text:style-name="T20"> </text:span><text:span text:style-name="T19">данными</text:span><text:span text:style-name="T21"> </text:span><text:span text:style-name="T19">(DML):</text:span></text:h>
        </text:list-header>
      </text:list>
      <text:h text:style-name="P2" text:outline-level="3">Общая архитектура DML</text:h>
      <text:p text:style-name="P31">DML-команды проходят через 3 основных этапа:</text:p>
      <text:list text:style-name="L98">
        <text:list-item>
          <text:p text:style-name="P80"><text:span text:style-name="Strong_20_Emphasis">Парсинг</text:span> (Lexer → Parser) → создание структуры команды (InsertCommand, UpdateCommand и т.д.) </text:p>
        </text:list-item>
        <text:list-item>
          <text:p text:style-name="P80"><text:span text:style-name="Strong_20_Emphasis">Диспетчеризация</text:span> (DBMS::execute()) </text:p>
        </text:list-item>
        <text:list-item>
          <text:p text:style-name="P81"><text:span text:style-name="Strong_20_Emphasis">Исполнение</text:span> (класс Table — основная бизнес-логика) </text:p>
        </text:list-item>
      </text:list>
      <text:p text:style-name="P13"/>
      <text:h text:style-name="P10" text:outline-level="3">1. Парсинг команд (Lexer + Parser)</text:h>
      <text:p text:style-name="P31"><text:span text:style-name="Strong_20_Emphasis">Файл:</text:span> parser.cpp</text:p>
      <text:h text:style-name="P11" text:outline-level="4">INSERT</text:h>
      <text:list text:style-name="L99">
        <text:list-item>
          <text:p text:style-name="P82">Функция: Parser::parseInsert() (строки ≈370–410) </text:p>
        </text:list-item>
        <text:list-item>
          <text:p text:style-name="P82">Поддерживает:</text:p>
          <text:list>
            <text:list-item>
              <text:p text:style-name="P82">INSERT INTO table (col1, col2) VALUES (val1, val2), (val3, val4), ... </text:p>
            </text:list-item>
            <text:list-item>
              <text:p text:style-name="P82">Несколько строк через запятую </text:p>
            </text:list-item>
            <text:list-item>
              <text:p text:style-name="P83">Пропущенные столбцы будут обработаны позже (в Table::insertRows) </text:p>
            </text:list-item>
          </text:list>
        </text:list-item>
      </text:list>
      <text:h text:style-name="P11" text:outline-level="4">UPDATE</text:h>
      <text:list text:style-name="L100">
        <text:list-item>
          <text:p text:style-name="P84">Функция: Parser::parseUpdate() (строки ≈413–430) </text:p>
        </text:list-item>
        <text:list-item>
          <text:p text:style-name="P85">Поддерживает: UPDATE table SET col1 = val1, col2 = val2 WHERE ... </text:p>
        </text:list-item>
      </text:list>
      <text:h text:style-name="P11" text:outline-level="4">DELETE</text:h>
      <text:list text:style-name="L101">
        <text:list-item>
          <text:p text:style-name="P86">Функция: Parser::parseDelete() (строки ≈433–445) </text:p>
        </text:list-item>
        <text:list-item>
          <text:p text:style-name="P87">DELETE FROM table WHERE ... </text:p>
        </text:list-item>
      </text:list>
      <text:h text:style-name="P11" text:outline-level="4">SELECT</text:h>
      <text:list text:style-name="L102">
        <text:list-item>
          <text:p text:style-name="P88">Функции: Parser::parseSelect() + Parser::parseSelectItem() (строки ≈448–500) </text:p>
        </text:list-item>
        <text:list-item>
          <text:p text:style-name="P88">Поддерживает:</text:p>
          <text:list>
            <text:list-item>
              <text:p text:style-name="P88">SELECT * FROM ... </text:p>
            </text:list-item>
            <text:list-item>
              <text:p text:style-name="P88">SELECT col1, col2 AS alias, COUNT(*), SUM(price), AVG(age) ... </text:p>
            </text:list-item>
            <text:list-item>
              <text:p text:style-name="P89">WHERE с AND, OR, BETWEEN, LIKE, сравнениями </text:p>
            </text:list-item>
          </text:list>
        </text:list-item>
      </text:list>
      <text:p text:style-name="P31">Парсинг WHERE условий реализован через рекурсивный спуск: parseWhereExpression() → parseOrExpression() → parseAndExpression() → parsePredicate().</text:p>
      <text:p text:style-name="P13"/>
      <text:h text:style-name="P10" text:outline-level="3"><text:soft-page-break/>2. Диспетчеризация выполнения</text:h>
      <text:p text:style-name="P31"><text:span text:style-name="Strong_20_Emphasis">Файл:</text:span> dbms.cpp</text:p>
      <text:p text:style-name="P31"><text:span text:style-name="Strong_20_Emphasis">Функция:</text:span> DBMS::execute(const Statement&amp; statement) (строки 81–83)</text:p>
      <text:p text:style-name="P32">C++</text:p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InsertCommand</text:span></text:span><text:span text:style-name="Source_20_Text"><text:span text:style-name="T24">&gt;(statement)) 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Insert</text:span></text:span><text:span text:style-name="Source_20_Text"><text:span text:style-name="T24">(std::</text:span></text:span><text:span text:style-name="Source_20_Text"><text:span text:style-name="T36">get</text:span></text:span><text:span text:style-name="Source_20_Text"><text:span text:style-name="T24">&lt;</text:span></text:span><text:span text:style-name="Source_20_Text"><text:span text:style-name="T51">InsertCommand</text:span></text:span><text:span text:style-name="Source_20_Text"><text:span text:style-name="T24">&gt;(statement));</text:span></text:span></text:p>
      <text:p text:style-name="P15"/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UpdateCommand</text:span></text:span><text:span text:style-name="Source_20_Text"><text:span text:style-name="T24">&gt;(statement)) 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Update</text:span></text:span><text:span text:style-name="Source_20_Text"><text:span text:style-name="T24">(...);</text:span></text:span></text:p>
      <text:p text:style-name="P15"/>
      <text:p text:style-name="P14"><text:span text:style-name="Source_20_Text"><text:span text:style-name="T28">if</text:span></text:span><text:span text:style-name="Source_20_Text"><text:span text:style-name="T24"> (std::</text:span></text:span><text:span text:style-name="Source_20_Text"><text:span text:style-name="T36">holds_alternative</text:span></text:span><text:span text:style-name="Source_20_Text"><text:span text:style-name="T24">&lt;</text:span></text:span><text:span text:style-name="Source_20_Text"><text:span text:style-name="T51">DeleteCommand</text:span></text:span><text:span text:style-name="Source_20_Text"><text:span text:style-name="T24">&gt;(statement)) </text:span></text:span></text:p>
      <text:p text:style-name="P14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36"> executeDelete</text:span></text:span><text:span text:style-name="Source_20_Text"><text:span text:style-name="T24">(...);</text:span></text:span></text:p>
      <text:p text:style-name="P15"/>
      <text:p text:style-name="P14"><text:span text:style-name="Source_20_Text"><text:span text:style-name="T28">return</text:span></text:span><text:span text:style-name="Source_20_Text"><text:span text:style-name="T36"> executeSelect</text:span></text:span><text:span text:style-name="Source_20_Text"><text:span text:style-name="T24">(...);</text:span></text:span><text:span text:style-name="Source_20_Text"><text:span text:style-name="T43"> <text:s text:c="2"/></text:span></text:span><text:span text:style-name="Source_20_Text"><text:span text:style-name="T41">// для SELECT</text:span></text:span></text:p>
      <text:p text:style-name="P31">Далее каждая команда вызывает соответствующий метод класса Table.</text:p>
      <text:p text:style-name="P13"/>
      <text:h text:style-name="P10" text:outline-level="3">3. Основная реализация DML (класс Table)</text:h>
      <text:p text:style-name="P31"><text:span text:style-name="Strong_20_Emphasis">Файл:</text:span> table.cpp — <text:span text:style-name="Strong_20_Emphasis">главный файл</text:span> для всех DML-операций.</text:p>
      <text:h text:style-name="P11" text:outline-level="4"><text:span text:style-name="Strong_20_Emphasis">INSERT</text:span></text:h>
      <text:p text:style-name="P31"><text:span text:style-name="Strong_20_Emphasis">Функция:</text:span> Table::insertRows() (строки ≈1120–1190)</text:p>
      <text:p text:style-name="P31"><text:span text:style-name="Strong_20_Emphasis">Как работает:</text:span></text:p>
      <text:list text:style-name="L103">
        <text:list-item>
          <text:p text:style-name="P90">Проверяет соответствие указанных колонок реальной схеме. </text:p>
        </text:list-item>
        <text:list-item>
          <text:p text:style-name="P90">Для каждой вставляемой строки:</text:p>
          <text:list>
            <text:list-item>
              <text:p text:style-name="P90">Создаёт Row с NULL в пропущенных полях. </text:p>
            </text:list-item>
            <text:list-item>
              <text:p text:style-name="P90">Заполняет DEFAULT значениями для колонок, где они заданы. </text:p>
            </text:list-item>
            <text:list-item>
              <text:p text:style-name="P90">Выполняет полную валидацию (validateRow()). </text:p>
            </text:list-item>
          </text:list>
        </text:list-item>
        <text:list-item>
          <text:p text:style-name="P90">Для каждой строки вызывает appendRow(). </text:p>
        </text:list-item>
        <text:list-item>
          <text:p text:style-name="P90">appendRow():</text:p>
          <text:list>
            <text:list-item>
              <text:p text:style-name="P90">Проверяет уникальность для INDEXED колонок. </text:p>
            </text:list-item>
            <text:list-item>
              <text:p text:style-name="P90">Записывает строку в rows.dat (используя tombstone, если есть свободные слоты). </text:p>
            </text:list-item>
            <text:list-item>
              <text:p text:style-name="P91">Добавляет записи в B*-индексы. </text:p>
            </text:list-item>
          </text:list>
        </text:list-item>
      </text:list>
      <text:p text:style-name="P31"><text:span text:style-name="Strong_20_Emphasis">Особенность:</text:span> Пропущенные столбцы без NOT_NULL действительно становятся NULL.</text:p>
      <text:p text:style-name="P13"/>
      <text:h text:style-name="P11" text:outline-level="4"><text:soft-page-break/><text:span text:style-name="Strong_20_Emphasis">UPDATE</text:span></text:h>
      <text:p text:style-name="P31"><text:span text:style-name="Strong_20_Emphasis">Функция:</text:span> Table::updateRows() (строки ≈1193–1290)</text:p>
      <text:p text:style-name="P31"><text:span text:style-name="Strong_20_Emphasis">Как работает:</text:span></text:p>
      <text:list text:style-name="L104">
        <text:list-item>
          <text:p text:style-name="P92">Валидация SET-выражений и WHERE-условия. </text:p>
        </text:list-item>
        <text:list-item>
          <text:p text:style-name="P92">Определяет кандидаты с помощью индексов (если возможно). </text:p>
        </text:list-item>
        <text:list-item>
          <text:p text:style-name="P92">Загружает все строки (или только кандидатов). </text:p>
        </text:list-item>
        <text:list-item>
          <text:p text:style-name="P92">Для подходящих строк по WHERE:</text:p>
          <text:list>
            <text:list-item>
              <text:p text:style-name="P92">Создаёт новую версию строки. </text:p>
            </text:list-item>
            <text:list-item>
              <text:p text:style-name="P92">Проверяет, не нарушает ли обновление уникальность INDEXED колонок. </text:p>
            </text:list-item>
          </text:list>
        </text:list-item>
        <text:list-item>
          <text:p text:style-name="P92">Для каждой обновляемой строки:</text:p>
          <text:list>
            <text:list-item>
              <text:p text:style-name="P92">Записывает новую версию в rows.dat. </text:p>
            </text:list-item>
            <text:list-item>
              <text:p text:style-name="P92">Старую помечает как tombstone (appendDeletedOffset). </text:p>
            </text:list-item>
            <text:list-item>
              <text:p text:style-name="P93">Обновляет B*-индексы (удаляет старое значение, вставляет новое). </text:p>
            </text:list-item>
          </text:list>
        </text:list-item>
      </text:list>
      <text:p text:style-name="P13"/>
      <text:h text:style-name="P11" text:outline-level="4"><text:span text:style-name="Strong_20_Emphasis">DELETE</text:span></text:h>
      <text:p text:style-name="P31"><text:span text:style-name="Strong_20_Emphasis">Функция:</text:span> Table::deleteRows() (строки ≈1293–1330)</text:p>
      <text:p text:style-name="P31"><text:span text:style-name="Strong_20_Emphasis">Как работает:</text:span></text:p>
      <text:list text:style-name="L105">
        <text:list-item>
          <text:p text:style-name="P94">Валидация WHERE. </text:p>
        </text:list-item>
        <text:list-item>
          <text:p text:style-name="P94">Определяет кандидатов через индексы (если возможно). </text:p>
        </text:list-item>
        <text:list-item>
          <text:p text:style-name="P94">Для подходящих строк:</text:p>
          <text:list>
            <text:list-item>
              <text:p text:style-name="P94">Добавляет offset в список tombstone (deleted.pb). </text:p>
            </text:list-item>
            <text:list-item>
              <text:p text:style-name="P94">Удаляет записи из всех B*-индексов. </text:p>
            </text:list-item>
          </text:list>
        </text:list-item>
        <text:list-item>
          <text:p text:style-name="P95">Возвращает количество удалённых строк. </text:p>
        </text:list-item>
      </text:list>
      <text:p text:style-name="P13"/>
      <text:h text:style-name="P11" text:outline-level="4"><text:span text:style-name="Strong_20_Emphasis">SELECT</text:span></text:h>
      <text:p text:style-name="P31"><text:span text:style-name="Strong_20_Emphasis">Функция:</text:span> Table::selectRows() (строки ≈1400–1500+)</text:p>
      <text:p text:style-name="P31"><text:span text:style-name="Strong_20_Emphasis">Как работает:</text:span></text:p>
      <text:list text:style-name="L106">
        <text:list-item>
          <text:p text:style-name="P96"><text:span text:style-name="Strong_20_Emphasis">Оптимизация через индексы:</text:span></text:p>
          <text:list>
            <text:list-item>
              <text:p text:style-name="P96">tryUseIndex() → пытается использовать B*-индекс для WHERE (особенно =, &gt;, &lt;, BETWEEN). </text:p>
            </text:list-item>
            <text:list-item>
              <text:p text:style-name="P96">Если индекс использован — загружает только нужные строки (loadRowsByOffsets). </text:p>
            </text:list-item>
          </text:list>
        </text:list-item>
        <text:list-item>
          <text:p text:style-name="P96"><text:span text:style-name="Strong_20_Emphasis">Фильтрация:</text:span></text:p>
          <text:list>
            <text:list-item>
              <text:p text:style-name="P96">Если индекс не помог — полный скан (loadAllRows). </text:p>
            </text:list-item>
            <text:list-item>
              <text:p text:style-name="P96">Применяет rowMatches() для финальной фильтрации. </text:p>
            </text:list-item>
          </text:list>
        </text:list-item>
        <text:list-item>
          <text:p text:style-name="P96"><text:span text:style-name="Strong_20_Emphasis">Формирование результата:</text:span></text:p>
          <text:list>
            <text:list-item>
              <text:p text:style-name="P96">Если есть агрегатные функции (COUNT, SUM, AVG) → makeAggregateJson(). </text:p>
            </text:list-item>
            <text:list-item>
              <text:p text:style-name="P97">Иначе → makeRegularJson() с поддержкой AS alias и *. </text:p>
            </text:list-item>
          </text:list>
        </text:list-item>
      </text:list>
      <text:p text:style-name="P13"/>
      <text:h text:style-name="P10" text:outline-level="3">Дополнительные важные механизмы</text:h>
      <text:list text:style-name="L107">
        <text:list-item>
          <text:p text:style-name="P98"><text:span text:style-name="Strong_20_Emphasis">Хранение строк:</text:span> storage.cpp — rowToProtoBytes() / rowFromProtoBytes() (protobuf). </text:p>
        </text:list-item>
        <text:list-item>
          <text:p text:style-name="P98"><text:span text:style-name="Strong_20_Emphasis">Tombstone + переиспользование места:</text:span> tryWriteRowToFreeSlot(), appendDeletedOffset(). </text:p>
        </text:list-item>
        <text:list-item>
          <text:p text:style-name="P98"><text:span text:style-name="Strong_20_Emphasis">Индексы:</text:span> DiskBStarIndex (файл diskbstarindex.cpp) — B*-дерево на диске. </text:p>
        </text:list-item>
        <text:list-item>
          <text:p text:style-name="P98"><text:span text:style-name="Strong_20_Emphasis">Блокировка:</text:span> tablelocks.cpp — мьютекс на каждую таблицу. </text:p>
        </text:list-item>
        <text:list-item>
          <text:p text:style-name="P99"><text:span text:style-name="Strong_20_Emphasis">Логирование:</text:span> runner.cpp + logger.cpp. </text:p>
        </text:list-item>
      </text:list>
      <text:p text:style-name="P13"/>
      <text:h text:style-name="P10" text:outline-level="3"><text:soft-page-break/>Итоговая схема вызова (пример для INSERT)</text:h>
      <text:p text:style-name="P32">text</text:p>
      <text:p text:style-name="P14"><text:span text:style-name="Source_20_Text"><text:span text:style-name="T24">client → server → runner::executeTextAuthorized()</text:span></text:span></text:p>
      <text:p text:style-name="P15"><text:span text:style-name="Source_20_Text"><text:span text:style-name="T26"><text:s text:c="4"/>→ </text:span></text:span><text:span text:style-name="Source_20_Text"><text:span text:style-name="T24">parser::parseStatement() → InsertCommand</text:span></text:span></text:p>
      <text:p text:style-name="P15"><text:span text:style-name="Source_20_Text"><text:span text:style-name="T26"><text:s text:c="8"/>→ </text:span></text:span><text:span text:style-name="Source_20_Text"><text:span text:style-name="T24">dbms::execute() → dbms::executeInsert()</text:span></text:span></text:p>
      <text:p text:style-name="P15"><text:span text:style-name="Source_20_Text"><text:span text:style-name="T26"><text:s text:c="12"/>→ </text:span></text:span><text:span text:style-name="Source_20_Text"><text:span text:style-name="T24">Table::insertRows() → Table::appendRow()</text:span></text:span></text:p>
      <text:p text:style-name="P15"><text:span text:style-name="Source_20_Text"><text:span text:style-name="T26"><text:s text:c="16"/>→ </text:span></text:span><text:span text:style-name="Source_20_Text"><text:span text:style-name="T24">writeRowToStorage() + индексы</text:span></text:span></text:p>
      <text:p text:style-name="P31"><text:span text:style-name="Strong_20_Emphasis">Главный файл реализации DML — table.cpp.</text:span></text:p>
      <text:p text:style-name="P19"/>
      <text:p text:style-name="P19"/>
      <text:p text:style-name="P28"><text:span text:style-name="Strong_20_Emphasis"><text:span text:style-name="T56">Где и как реализованы условия выборки (WHERE condition)</text:span></text:span></text:p>
      <text:p text:style-name="P31">Условия в WHERE — одна из самых сложных и хорошо реализованных частей СУБД. Они поддерживаются в SELECT, UPDATE и DELETE.</text:p>
      <text:p text:style-name="P13"/>
      <text:h text:style-name="P10" text:outline-level="3">1. Парсинг условий (WHERE)</text:h>
      <text:p text:style-name="P31"><text:span text:style-name="Strong_20_Emphasis">Файл:</text:span> parser.cpp</text:p>
      <text:h text:style-name="P11" text:outline-level="4">Основные функции:</text:h>
      <text:list text:style-name="L108">
        <text:list-item>
          <text:p text:style-name="P100"><text:span text:style-name="Strong_20_Emphasis">Parser::parseWhereExpression()</text:span> (строка 218) — входная точка </text:p>
        </text:list-item>
        <text:list-item>
          <text:p text:style-name="P101"><text:span text:style-name="Strong_20_Emphasis">parseOrExpression()</text:span> → <text:span text:style-name="Strong_20_Emphasis">parseAndExpression()</text:span> → <text:span text:style-name="Strong_20_Emphasis">parsePrimaryExpression()</text:span> → <text:span text:style-name="Strong_20_Emphasis">parsePredicate()</text:span> (рекурсивный спуск) </text:p>
        </text:list-item>
      </text:list>
      <text:p text:style-name="P31"><text:span text:style-name="Strong_20_Emphasis">Поддерживаемые конструкции:</text:span></text:p>
      <text:p text:style-name="P32">C++</text:p>
      <text:p text:style-name="P18"><text:span text:style-name="Source_20_Text"><text:span text:style-name="T42">// Сравнения</text:span></text:span></text:p>
      <text:p text:style-name="P14"><text:span text:style-name="Source_20_Text"><text:span text:style-name="T23">column </text:span></text:span><text:span text:style-name="Source_20_Text"><text:span text:style-name="T27">==</text:span></text:span><text:span text:style-name="Source_20_Text"><text:span text:style-name="T45"> 5</text:span></text:span></text:p>
      <text:p text:style-name="P14"><text:span text:style-name="Source_20_Text"><text:span text:style-name="T23">name </text:span></text:span><text:span text:style-name="Source_20_Text"><text:span text:style-name="T27">!=</text:span></text:span><text:span text:style-name="Source_20_Text"><text:span text:style-name="T38"> "Alice"</text:span></text:span></text:p>
      <text:p text:style-name="P14"><text:span text:style-name="Source_20_Text"><text:span text:style-name="T23">age </text:span></text:span><text:span text:style-name="Source_20_Text"><text:span text:style-name="T27">&gt;=</text:span></text:span><text:span text:style-name="Source_20_Text"><text:span text:style-name="T45"> 18</text:span></text:span></text:p>
      <text:p text:style-name="P14"><text:span text:style-name="Source_20_Text"><text:span text:style-name="T23">price </text:span></text:span><text:span text:style-name="Source_20_Text"><text:span text:style-name="T27">&lt;</text:span></text:span><text:span text:style-name="Source_20_Text"><text:span text:style-name="T45"> 100.0</text:span></text:span></text:p>
      <text:p text:style-name="P15"/>
      <text:p text:style-name="P18"><text:span text:style-name="Source_20_Text"><text:span text:style-name="T42">// BETWEEN</text:span></text:span></text:p>
      <text:p text:style-name="P14"><text:span text:style-name="Source_20_Text"><text:span text:style-name="T23">age BETWEEN </text:span></text:span><text:span text:style-name="Source_20_Text"><text:span text:style-name="T45">18</text:span></text:span><text:span text:style-name="Source_20_Text"><text:span text:style-name="T23"> AND </text:span></text:span><text:span text:style-name="Source_20_Text"><text:span text:style-name="T45">30</text:span></text:span><text:span text:style-name="Source_20_Text"><text:span text:style-name="T42"> <text:s text:c="9"/></text:span></text:span><text:span text:style-name="Source_20_Text"><text:span text:style-name="T40">// [18, 30)</text:span></text:span></text:p>
      <text:p text:style-name="P15"/>
      <text:p text:style-name="P18"><text:span text:style-name="Source_20_Text"><text:span text:style-name="T42">// LIKE (регулярное выражение)</text:span></text:span></text:p>
      <text:p text:style-name="P14"><text:soft-page-break/><text:span text:style-name="Source_20_Text"><text:span text:style-name="T23">name LIKE </text:span></text:span><text:span text:style-name="Source_20_Text"><text:span text:style-name="T38">"A.*"</text:span></text:span><text:span text:style-name="Source_20_Text"><text:span text:style-name="T42"> <text:s text:c="15"/></text:span></text:span><text:span text:style-name="Source_20_Text"><text:span text:style-name="T40">// строки, поддержка regex</text:span></text:span></text:p>
      <text:p text:style-name="P14"><text:span text:style-name="Source_20_Text"><text:span text:style-name="T23">email LIKE </text:span></text:span><text:span text:style-name="Source_20_Text"><text:span text:style-name="T38">"^.+@example</text:span></text:span><text:span text:style-name="Source_20_Text"><text:span text:style-name="T55">\.</text:span></text:span><text:span text:style-name="Source_20_Text"><text:span text:style-name="T38">com$"</text:span></text:span></text:p>
      <text:p text:style-name="P31"><text:span text:style-name="Strong_20_Emphasis">Как парсится parsePredicate() (строки 260–290):</text:span></text:p>
      <text:p text:style-name="P32">C++</text:p>
      <text:p text:style-name="P14"><text:span text:style-name="Source_20_Text"><text:span text:style-name="T23">Operand left </text:span></text:span><text:span text:style-name="Source_20_Text"><text:span text:style-name="T27">=</text:span></text:span><text:span text:style-name="Source_20_Text"><text:span text:style-name="T35"> parseOperand</text:span></text:span><text:span text:style-name="Source_20_Text"><text:span text:style-name="T23">(lexer);</text:span></text:span></text:p>
      <text:p text:style-name="P15"/>
      <text:p text:style-name="P14"><text:span text:style-name="Source_20_Text"><text:span text:style-name="T27">if</text:span></text:span><text:span text:style-name="Source_20_Text"><text:span text:style-name="T23"> (peek </text:span></text:span><text:span text:style-name="Source_20_Text"><text:span text:style-name="T38">"BETWEEN"</text:span></text:span><text:span text:style-name="Source_20_Text"><text:span text:style-name="T23">) {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</text:span></text:span><text:span text:style-name="Source_20_Text"><text:span text:style-name="T23"> Expr::Kind::Between;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low</text:span></text:span><text:span text:style-name="Source_20_Text"><text:span text:style-name="T27"> =</text:span></text:span><text:span text:style-name="Source_20_Text"><text:span text:style-name="T35"> parseOperand</text:span></text:span><text:span text:style-name="Source_20_Text"><text:span text:style-name="T23">();</text:span></text:span></text:p>
      <text:p text:style-name="P14"><text:span text:style-name="Source_20_Text"><text:span text:style-name="T25"><text:s text:c="4"/></text:span></text:span><text:span text:style-name="Source_20_Text"><text:span text:style-name="T23">expect </text:span></text:span><text:span text:style-name="Source_20_Text"><text:span text:style-name="T38">"AND"</text:span></text:span><text:span text:style-name="Source_20_Text"><text:span text:style-name="T23">;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high</text:span></text:span><text:span text:style-name="Source_20_Text"><text:span text:style-name="T27"> =</text:span></text:span><text:span text:style-name="Source_20_Text"><text:span text:style-name="T35"> parseOperand</text:span></text:span><text:span text:style-name="Source_20_Text"><text:span text:style-name="T23">();</text:span></text:span></text:p>
      <text:p text:style-name="P14"><text:span text:style-name="Source_20_Text"><text:span text:style-name="T23">}</text:span></text:span></text:p>
      <text:p text:style-name="P14"><text:span text:style-name="Source_20_Text"><text:span text:style-name="T27">else if</text:span></text:span><text:span text:style-name="Source_20_Text"><text:span text:style-name="T23"> (peek </text:span></text:span><text:span text:style-name="Source_20_Text"><text:span text:style-name="T38">"LIKE"</text:span></text:span><text:span text:style-name="Source_20_Text"><text:span text:style-name="T23">) {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</text:span></text:span><text:span text:style-name="Source_20_Text"><text:span text:style-name="T23"> Expr::Kind::Like;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pattern</text:span></text:span><text:span text:style-name="Source_20_Text"><text:span text:style-name="T27"> =</text:span></text:span><text:span text:style-name="Source_20_Text"><text:span text:style-name="T35"> parseOperand</text:span></text:span><text:span text:style-name="Source_20_Text"><text:span text:style-name="T23">();</text:span></text:span></text:p>
      <text:p text:style-name="P14"><text:span text:style-name="Source_20_Text"><text:span text:style-name="T23">}</text:span></text:span></text:p>
      <text:p text:style-name="P14"><text:span text:style-name="Source_20_Text"><text:span text:style-name="T27">else</text:span></text:span><text:span text:style-name="Source_20_Text"><text:span text:style-name="T23"> {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</text:span></text:span><text:span text:style-name="Source_20_Text"><text:span text:style-name="T23"> Expr::Kind::Compare;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compareOp</text:span></text:span><text:span text:style-name="Source_20_Text"><text:span text:style-name="T27"> =</text:span></text:span><text:span text:style-name="Source_20_Text"><text:span text:style-name="T35"> parseCompareOp</text:span></text:span><text:span text:style-name="Source_20_Text"><text:span text:style-name="T23">();</text:span></text:span><text:span text:style-name="Source_20_Text"><text:span text:style-name="T42"> <text:s/></text:span></text:span><text:span text:style-name="Source_20_Text"><text:span text:style-name="T40">// ==, !=, &lt;, &gt;, &lt;=, &gt;=</text:span></text:span></text:p>
      <text:p text:style-name="P14"><text:span text:style-name="Source_20_Text"><text:span text:style-name="T33"><text:s text:c="4"/></text:span></text:span><text:span text:style-name="Source_20_Text"><text:span text:style-name="T31">expr</text:span></text:span><text:span text:style-name="Source_20_Text"><text:span text:style-name="T23">.</text:span></text:span><text:span text:style-name="Source_20_Text"><text:span text:style-name="T31">right</text:span></text:span><text:span text:style-name="Source_20_Text"><text:span text:style-name="T27"> =</text:span></text:span><text:span text:style-name="Source_20_Text"><text:span text:style-name="T35"> parseOperand</text:span></text:span><text:span text:style-name="Source_20_Text"><text:span text:style-name="T23">();</text:span></text:span></text:p>
      <text:p text:style-name="P14"><text:span text:style-name="Source_20_Text"><text:span text:style-name="T23">}</text:span></text:span></text:p>
      <text:list text:style-name="L109">
        <text:list-item>
          <text:p text:style-name="P102">parseOperand() (строки 170–190) — может вернуть как колонку (isColumn=true), так и константу (literalValue). </text:p>
        </text:list-item>
        <text:list-item>
          <text:p text:style-name="P103">Поддерживаются <text:span text:style-name="Strong_20_Emphasis">любые комбинации</text:span>: колонка-колонка, колонка-константа, константа-константа. </text:p>
        </text:list-item>
      </text:list>
      <text:p text:style-name="P13"/>
      <text:h text:style-name="P10" text:outline-level="3">2. Вычисление условий (основная логика)</text:h>
      <text:p text:style-name="P31"><text:span text:style-name="Strong_20_Emphasis">Файл:</text:span> table.cpp — <text:span text:style-name="Strong_20_Emphasis">главное место реализации</text:span></text:p>
      <text:h text:style-name="P11" text:outline-level="4">Ключевые функции:</text:h>
      <text:list text:style-name="L110">
        <text:list-item>
          <text:p text:style-name="P104"><text:span text:style-name="Strong_20_Emphasis">Table::rowMatches(const Row&amp; row, const Expr&amp; expr)</text:span> (строки ~950–1000)</text:p>
          <text:p text:style-name="P104">Основная функция, которая решает, подходит ли строка под условие.</text:p>
        </text:list-item>
        <text:list-item>
          <text:p text:style-name="P104"><text:span text:style-name="Strong_20_Emphasis">Table::resolveOperand(const Row&amp; row, const Operand&amp; operand)</text:span></text:p>
          <text:list>
            <text:list-item>
              <text:p text:style-name="P105">Если operand.isColumn — берёт значение из строки по имени столбца. </text:p>
            </text:list-item>
            <text:list-item>
              <text:p text:style-name="P105">Иначе — возвращает литерал (константу). </text:p>
            </text:list-item>
          </text:list>
        </text:list-item>
        <text:list-item>
          <text:p text:style-name="P104"><text:span text:style-name="Strong_20_Emphasis">Table::compareOperands(const Value&amp; left, const Value&amp; right, CompareOp op)</text:span></text:p>
          <text:p text:style-name="P104"><text:span text:style-name="Strong_20_Emphasis">Сравнение реализовано здесь:</text:span></text:p>
          <text:list>
            <text:list-item>
              <text:p text:style-name="P105">Для INT — числовое сравнение. </text:p>
            </text:list-item>
            <text:list-item>
              <text:p text:style-name="P105">Для STRING — <text:span text:style-name="Strong_20_Emphasis">лексикографическое</text:span> сравнение (std::string операторы &lt;, &gt;, ==). </text:p>
            </text:list-item>
            <text:list-item>
              <text:p text:style-name="P106"><text:soft-page-break/>NULL в сравнениях всегда даёт false (кроме специальных случаев). </text:p>
            </text:list-item>
          </text:list>
        </text:list-item>
      </text:list>
      <text:p text:style-name="P13"/>
      <text:h text:style-name="P10" text:outline-level="3">3. Поддержка конкретных операций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26">Операция</text:p>
            </table:table-cell>
            <table:table-cell table:style-name="Таблица4.A1" office:value-type="string">
              <text:p text:style-name="P26">Реализация</text:p>
            </table:table-cell>
            <table:table-cell table:style-name="Таблица4.A1" office:value-type="string">
              <text:p text:style-name="P26">Файл / Функция</text:p>
            </table:table-cell>
            <table:table-cell table:style-name="Таблица4.A1" office:value-type="string">
              <text:p text:style-name="P27">Особенности</text:p>
            </table:table-cell>
          </table:table-row>
        </table:table-header-rows>
        <table:table-row>
          <table:table-cell table:style-name="Таблица4.A1" office:value-type="string">
            <text:p text:style-name="P24">==, !=</text:p>
          </table:table-cell>
          <table:table-cell table:style-name="Таблица4.A1" office:value-type="string">
            <text:p text:style-name="P24">compareOperands</text:p>
          </table:table-cell>
          <table:table-cell table:style-name="Таблица4.A1" office:value-type="string">
            <text:p text:style-name="P24">table.cpp</text:p>
          </table:table-cell>
          <table:table-cell table:style-name="Таблица4.A1" office:value-type="string">
            <text:p text:style-name="P24">Полная поддержка</text:p>
          </table:table-cell>
        </table:table-row>
        <table:table-row>
          <table:table-cell table:style-name="Таблица4.A1" office:value-type="string">
            <text:p text:style-name="P24">&lt;, &gt;, &lt;=, &gt;=</text:p>
          </table:table-cell>
          <table:table-cell table:style-name="Таблица4.A1" office:value-type="string">
            <text:p text:style-name="P24">compareOperands</text:p>
          </table:table-cell>
          <table:table-cell table:style-name="Таблица4.A1" office:value-type="string">
            <text:p text:style-name="P24">table.cpp</text:p>
          </table:table-cell>
          <table:table-cell table:style-name="Таблица4.A1" office:value-type="string">
            <text:p text:style-name="P24">Лексикографическое для строк</text:p>
          </table:table-cell>
        </table:table-row>
        <table:table-row>
          <table:table-cell table:style-name="Таблица4.A1" office:value-type="string">
            <text:p text:style-name="P24">BETWEEN</text:p>
          </table:table-cell>
          <table:table-cell table:style-name="Таблица4.A1" office:value-type="string">
            <text:p text:style-name="P24">rowMatches (Kind::Between)</text:p>
          </table:table-cell>
          <table:table-cell table:style-name="Таблица4.A1" office:value-type="string">
            <text:p text:style-name="P24">table.cpp</text:p>
          </table:table-cell>
          <table:table-cell table:style-name="Таблица4.A1" office:value-type="string">
            <text:p text:style-name="P24">[low, high) — <text:span text:style-name="Strong_20_Emphasis">закрыт слева, открыт справа</text:span></text:p>
          </table:table-cell>
        </table:table-row>
        <table:table-row>
          <table:table-cell table:style-name="Таблица4.A1" office:value-type="string">
            <text:p text:style-name="P24">LIKE</text:p>
          </table:table-cell>
          <table:table-cell table:style-name="Таблица4.A1" office:value-type="string">
            <text:p text:style-name="P24">std::regex_match</text:p>
          </table:table-cell>
          <table:table-cell table:style-name="Таблица4.A1" office:value-type="string">
            <text:p text:style-name="P24">table.cpp (строка ~980)</text:p>
          </table:table-cell>
          <table:table-cell table:style-name="Таблица4.A1" office:value-type="string">
            <text:p text:style-name="P24">val1 LIKE "регулярка"</text:p>
          </table:table-cell>
        </table:table-row>
        <table:table-row>
          <table:table-cell table:style-name="Таблица4.A1" office:value-type="string">
            <text:p text:style-name="P24">AND, OR</text:p>
          </table:table-cell>
          <table:table-cell table:style-name="Таблица4.A1" office:value-type="string">
            <text:p text:style-name="P24">Рекурсивно в rowMatches</text:p>
          </table:table-cell>
          <table:table-cell table:style-name="Таблица4.A1" office:value-type="string">
            <text:p text:style-name="P24">table.cpp</text:p>
          </table:table-cell>
          <table:table-cell table:style-name="Таблица4.A1" office:value-type="string">
            <text:p text:style-name="P25">Полная поддержка скобок</text:p>
          </table:table-cell>
        </table:table-row>
      </table:table>
      <text:p text:style-name="P31"><text:span text:style-name="Strong_20_Emphasis">Важный момент по BETWEEN:</text:span></text:p>
      <text:p text:style-name="P32">C++</text:p>
      <text:p text:style-name="P14"><text:span text:style-name="Source_20_Text"><text:span text:style-name="T27">return</text:span></text:span><text:span text:style-name="Source_20_Text"><text:span text:style-name="T35"> compareValues</text:span></text:span><text:span text:style-name="Source_20_Text"><text:span text:style-name="T23">(value, low) </text:span></text:span><text:span text:style-name="Source_20_Text"><text:span text:style-name="T27">&gt;=</text:span></text:span><text:span text:style-name="Source_20_Text"><text:span text:style-name="T45"> 0</text:span></text:span><text:span text:style-name="Source_20_Text"><text:span text:style-name="T27"> &amp;&amp;</text:span></text:span><text:span text:style-name="Source_20_Text"><text:span text:style-name="T35"> compareValues</text:span></text:span><text:span text:style-name="Source_20_Text"><text:span text:style-name="T23">(value, high) </text:span></text:span><text:span text:style-name="Source_20_Text"><text:span text:style-name="T27">&lt;</text:span></text:span><text:span text:style-name="Source_20_Text"><text:span text:style-name="T45"> 0</text:span></text:span><text:span text:style-name="Source_20_Text"><text:span text:style-name="T23">;</text:span></text:span></text:p>
      <text:p text:style-name="P31">→ интервал <text:span text:style-name="Strong_20_Emphasis">[val2, val3)</text:span></text:p>
      <text:p text:style-name="P13"/>
      <text:h text:style-name="P10" text:outline-level="3">4. Оптимизация через индексы</text:h>
      <text:p text:style-name="P31"><text:span text:style-name="Strong_20_Emphasis">Файл:</text:span> table.cpp</text:p>
      <text:p text:style-name="P31"><text:span text:style-name="Strong_20_Emphasis">Функции:</text:span></text:p>
      <text:list text:style-name="L111">
        <text:list-item>
          <text:p text:style-name="P107">tryUseIndex() (строки ~1020–1070) </text:p>
        </text:list-item>
        <text:list-item>
          <text:p text:style-name="P107">tryUseIndexForCompare() </text:p>
        </text:list-item>
        <text:list-item>
          <text:p text:style-name="P108">tryUseIndexForBetween() </text:p>
        </text:list-item>
      </text:list>
      <text:p text:style-name="P31"><text:span text:style-name="Strong_20_Emphasis">Что поддерживается индексами:</text:span></text:p>
      <text:list text:style-name="L112">
        <text:list-item>
          <text:p text:style-name="P109">column = const </text:p>
        </text:list-item>
        <text:list-item>
          <text:p text:style-name="P109">column &gt; const, column &gt;= const </text:p>
        </text:list-item>
        <text:list-item>
          <text:p text:style-name="P109">column &lt; const, column &lt;= const </text:p>
        </text:list-item>
        <text:list-item>
          <text:p text:style-name="P110">column BETWEEN const1 AND const2 </text:p>
        </text:list-item>
      </text:list>
      <text:p text:style-name="P31">Это значительно ускоряет запросы по проиндексированным столбцам.</text:p>
      <text:p text:style-name="P13"/>
      <text:h text:style-name="P10" text:outline-level="3">5. Валидация условий</text:h>
      <text:p text:style-name="P31"><text:span text:style-name="Strong_20_Emphasis">Файл:</text:span> table.cpp</text:p>
      <text:list text:style-name="L113">
        <text:list-item>
          <text:p text:style-name="P111"><text:span text:style-name="Strong_20_Emphasis">validateCondition(const Expr&amp; expr)</text:span> — проверяет:</text:p>
          <text:list>
            <text:list-item>
              <text:p text:style-name="P111">Существование столбцов </text:p>
            </text:list-item>
            <text:list-item>
              <text:p text:style-name="P111">Совпадение типов при сравнении столбец-столбец </text:p>
            </text:list-item>
            <text:list-item>
              <text:p text:style-name="P112">Корректность типов литералов </text:p>
            </text:list-item>
          </text:list>
        </text:list-item>
      </text:list>
      <text:p text:style-name="P31">Вызывается перед выполнением UPDATE, DELETE, SELECT.</text:p>
      <text:p text:style-name="P13"/>
      <text:h text:style-name="P10" text:outline-level="3"><text:soft-page-break/>Общая схема обработки WHERE</text:h>
      <text:p text:style-name="P32">text</text:p>
      <text:p text:style-name="P14"><text:span text:style-name="Source_20_Text"><text:span text:style-name="T23">SQL → Parser::parseWhereExpression() → Expr (AST)</text:span></text:span></text:p>
      <text:p text:style-name="P15"><text:span text:style-name="Source_20_Text"><text:span text:style-name="T25"><text:s text:c="9"/>↓</text:span></text:span></text:p>
      <text:p text:style-name="P15"><text:span text:style-name="Source_20_Text"><text:span text:style-name="T25"><text:s text:c="4"/></text:span></text:span><text:span text:style-name="Source_20_Text"><text:span text:style-name="T23">DBMS::executeSelect/Update/Delete</text:span></text:span></text:p>
      <text:p text:style-name="P15"><text:span text:style-name="Source_20_Text"><text:span text:style-name="T25"><text:s text:c="9"/>↓</text:span></text:span></text:p>
      <text:p text:style-name="P15"><text:span text:style-name="Source_20_Text"><text:span text:style-name="T25"><text:s text:c="3"/></text:span></text:span><text:span text:style-name="Source_20_Text"><text:span text:style-name="T23">Table::selectRows / updateRows / deleteRows</text:span></text:span></text:p>
      <text:p text:style-name="P15"><text:span text:style-name="Source_20_Text"><text:span text:style-name="T25"><text:s text:c="9"/>↓</text:span></text:span></text:p>
      <text:p text:style-name="P15"><text:span text:style-name="Source_20_Text"><text:span text:style-name="T25"><text:s text:c="3"/></text:span></text:span><text:span text:style-name="Source_20_Text"><text:span text:style-name="T23">indexedCandidateOffsets() → попытка использовать индекс</text:span></text:span></text:p>
      <text:p text:style-name="P15"><text:span text:style-name="Source_20_Text"><text:span text:style-name="T25"><text:s text:c="9"/>↓</text:span></text:span></text:p>
      <text:p text:style-name="P15"><text:span text:style-name="Source_20_Text"><text:span text:style-name="T25"><text:s text:c="3"/></text:span></text:span><text:span text:style-name="Source_20_Text"><text:span text:style-name="T23">rowMatches() для каждой строки (или отфильтрованных)</text:span></text:span></text:p>
      <text:p text:style-name="P13"/>
      <text:h text:style-name="P10" text:outline-level="3">Итог</text:h>
      <text:p text:style-name="P31"><text:span text:style-name="Strong_20_Emphasis">Главные файлы реализации условий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26">Компонент</text:p>
            </table:table-cell>
            <table:table-cell table:style-name="Таблица5.A1" office:value-type="string">
              <text:p text:style-name="P26">Файл</text:p>
            </table:table-cell>
            <table:table-cell table:style-name="Таблица5.A1" office:value-type="string">
              <text:p text:style-name="P27">Основные функции</text:p>
            </table:table-cell>
          </table:table-row>
        </table:table-header-rows>
        <table:table-row>
          <table:table-cell table:style-name="Таблица5.A1" office:value-type="string">
            <text:p text:style-name="P24">Парсинг</text:p>
          </table:table-cell>
          <table:table-cell table:style-name="Таблица5.A1" office:value-type="string">
            <text:p text:style-name="P24">parser.cpp</text:p>
          </table:table-cell>
          <table:table-cell table:style-name="Таблица5.A1" office:value-type="string">
            <text:p text:style-name="P24">parseWhereExpression, parsePredicate</text:p>
          </table:table-cell>
        </table:table-row>
        <table:table-row>
          <table:table-cell table:style-name="Таблица5.A1" office:value-type="string">
            <text:p text:style-name="P24">Вычисление условий</text:p>
          </table:table-cell>
          <table:table-cell table:style-name="Таблица5.A1" office:value-type="string">
            <text:p text:style-name="P24"><text:span text:style-name="Strong_20_Emphasis">table.cpp</text:span></text:p>
          </table:table-cell>
          <table:table-cell table:style-name="Таблица5.A1" office:value-type="string">
            <text:p text:style-name="P24"><text:span text:style-name="Strong_20_Emphasis">rowMatches</text:span>, compareOperands, resolveOperand</text:p>
          </table:table-cell>
        </table:table-row>
        <table:table-row>
          <table:table-cell table:style-name="Таблица5.A1" office:value-type="string">
            <text:p text:style-name="P24">Оптимизация индексами</text:p>
          </table:table-cell>
          <table:table-cell table:style-name="Таблица5.A1" office:value-type="string">
            <text:p text:style-name="P24">table.cpp</text:p>
          </table:table-cell>
          <table:table-cell table:style-name="Таблица5.A1" office:value-type="string">
            <text:p text:style-name="P24">tryUseIndex*</text:p>
          </table:table-cell>
        </table:table-row>
        <table:table-row>
          <table:table-cell table:style-name="Таблица5.A1" office:value-type="string">
            <text:p text:style-name="P24">Валидация</text:p>
          </table:table-cell>
          <table:table-cell table:style-name="Таблица5.A1" office:value-type="string">
            <text:p text:style-name="P24">table.cpp</text:p>
          </table:table-cell>
          <table:table-cell table:style-name="Таблица5.A1" office:value-type="string">
            <text:p text:style-name="P25">validateCondition</text:p>
          </table:table-cell>
        </table:table-row>
      </table:table>
      <text:p text:style-name="P31"><text:span text:style-name="Strong_20_Emphasis">Реализация очень полная</text:span> и соответствует всем требованиям:</text:p>
      <text:list text:style-name="L114">
        <text:list-item>
          <text:p text:style-name="P113">Все 6 операций сравнения </text:p>
        </text:list-item>
        <text:list-item>
          <text:p text:style-name="P113">Лексикографическое сравнение строк </text:p>
        </text:list-item>
        <text:list-item>
          <text:p text:style-name="P113">BETWEEN с полузакрытым интервалом </text:p>
        </text:list-item>
        <text:list-item>
          <text:p text:style-name="P113">LIKE через std::regex </text:p>
        </text:list-item>
        <text:list-item>
          <text:p text:style-name="P114">Поддержка колонок и констант в любой позиции </text:p>
        </text:list-item>
      </text:list>
      <text:p text:style-name="P31">Хотите, я покажу <text:span text:style-name="Strong_20_Emphasis">конкретные фрагменты кода</text:span> с номерами строк для какой-то операции (например, LIKE или BETWEEN)?</text:p>
      <text:p text:style-name="P31"/>
      <text:p text:style-name="P22">3.</text:p>
      <text:p text:style-name="P19"/>
      <text:h text:style-name="P2" text:outline-level="3">1. Общая архитектура</text:h>
      <text:list text:style-name="L49">
        <text:list-item>
          <text:p text:style-name="P115"><text:span text:style-name="Strong_20_Emphasis">Сервер</text:span> (course_server / server.cpp) — основной процесс СУБД:</text:p>
          <text:list>
            <text:list-item>
              <text:p text:style-name="P115">Хранит данные, выполняет SQL-запросы. </text:p>
            </text:list-item>
            <text:list-item>
              <text:p text:style-name="P115">Обрабатывает аутентификацию, авторизацию (RBAC), логирование. </text:p>
            </text:list-item>
            <text:list-item>
              <text:p text:style-name="P115">Запускается как HTTP-сервер. </text:p>
            </text:list-item>
          </text:list>
        </text:list-item>
        <text:list-item>
          <text:p text:style-name="P115"><text:span text:style-name="Strong_20_Emphasis">Клиент</text:span> (course_client / client.cpp) — тонкий клиент:</text:p>
          <text:list>
            <text:list-item>
              <text:p text:style-name="P115">Отправляет SQL-запросы на сервер. </text:p>
            </text:list-item>
            <text:list-item>
              <text:p text:style-name="P115">Поддерживает интерактивный и пакетный режим. </text:p>
            </text:list-item>
            <text:list-item>
              <text:p text:style-name="P116">Работает через <text:span text:style-name="Strong_20_Emphasis">HTTP</text:span> (REST API). </text:p>
            </text:list-item>
          </text:list>
        </text:list-item>
      </text:list>
      <text:p text:style-name="P31"><text:span text:style-name="Strong_20_Emphasis">Протокол взаимодействия:</text:span> HTTP + JSON + JWT-авторизация.</text:p>
      <text:p text:style-name="P13"/>
      <text:h text:style-name="P10" text:outline-level="3"><text:soft-page-break/>2. Серверная часть (server.cpp)</text:h>
      <text:p text:style-name="P31"><text:span text:style-name="Strong_20_Emphasis">Файл:</text:span> attachments/server.cpp</text:p>
      <text:p text:style-name="P31"><text:span text:style-name="Strong_20_Emphasis">Ключевые компоненты:</text:span></text:p>
      <text:h text:style-name="P11" text:outline-level="4">a) <text:span text:style-name="Strong_20_Emphasis">Запуск сервера</text:span></text:h>
      <text:list text:style-name="L50">
        <text:list-item>
          <text:p text:style-name="P117">Используется библиотека <text:span text:style-name="Strong_20_Emphasis">Crow</text:span> (лёгкий C++ HTTP-фреймворк). </text:p>
        </text:list-item>
        <text:list-item>
          <text:p text:style-name="P117">main() (строки 247–268):</text:p>
          <text:p text:style-name="P118">C++</text:p>
          <text:p text:style-name="P16"><text:span text:style-name="Source_20_Text"><text:span text:style-name="T1">crow::SimpleApp app;</text:span></text:span></text:p>
          <text:p text:style-name="P16"><text:span text:style-name="Source_20_Text"><text:span text:style-name="T3">configureRoutes</text:span></text:span><text:span text:style-name="Source_20_Text"><text:span text:style-name="T1">(...);</text:span></text:span></text:p>
          <text:p text:style-name="P16"><text:span text:style-name="Source_20_Text"><text:span text:style-name="T4">app</text:span></text:span><text:span text:style-name="Source_20_Text"><text:span text:style-name="T1">.</text:span></text:span><text:span text:style-name="Source_20_Text"><text:span text:style-name="T3">bindaddr</text:span></text:span><text:span text:style-name="Source_20_Text"><text:span text:style-name="T1">(</text:span></text:span><text:span text:style-name="Source_20_Text"><text:span text:style-name="T5">"0.0.0.0"</text:span></text:span><text:span text:style-name="Source_20_Text"><text:span text:style-name="T1">).</text:span></text:span><text:span text:style-name="Source_20_Text"><text:span text:style-name="T3">port</text:span></text:span><text:span text:style-name="Source_20_Text"><text:span text:style-name="T1">(port).</text:span></text:span><text:span text:style-name="Source_20_Text"><text:span text:style-name="T3">run</text:span></text:span><text:span text:style-name="Source_20_Text"><text:span text:style-name="T1">();</text:span></text:span></text:p>
        </text:list-item>
      </text:list>
      <text:h text:style-name="P11" text:outline-level="4">b) <text:span text:style-name="Strong_20_Emphasis">Основные HTTP-эндпоинты</text:span> (configureRoutes())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26">Метод</text:p>
            </table:table-cell>
            <table:table-cell table:style-name="Таблица2.A1" office:value-type="string">
              <text:p text:style-name="P26">Путь</text:p>
            </table:table-cell>
            <table:table-cell table:style-name="Таблица2.A1" office:value-type="string">
              <text:p text:style-name="P27">Назначение</text:p>
            </table:table-cell>
          </table:table-row>
        </table:table-header-rows>
        <table:table-row>
          <table:table-cell table:style-name="Таблица2.A1" office:value-type="string">
            <text:p text:style-name="P24">GET</text:p>
          </table:table-cell>
          <table:table-cell table:style-name="Таблица2.A1" office:value-type="string">
            <text:p text:style-name="P24">/health</text:p>
          </table:table-cell>
          <table:table-cell table:style-name="Таблица2.A1" office:value-type="string">
            <text:p text:style-name="P24">Проверка работоспособности</text:p>
          </table:table-cell>
        </table:table-row>
        <table:table-row>
          <table:table-cell table:style-name="Таблица2.A1" office:value-type="string">
            <text:p text:style-name="P24">POST</text:p>
          </table:table-cell>
          <table:table-cell table:style-name="Таблица2.A1" office:value-type="string">
            <text:p text:style-name="P24">/register</text:p>
          </table:table-cell>
          <table:table-cell table:style-name="Таблица2.A1" office:value-type="string">
            <text:p text:style-name="P24">Регистрация пользователя</text:p>
          </table:table-cell>
        </table:table-row>
        <table:table-row>
          <table:table-cell table:style-name="Таблица2.A1" office:value-type="string">
            <text:p text:style-name="P24">POST</text:p>
          </table:table-cell>
          <table:table-cell table:style-name="Таблица2.A1" office:value-type="string">
            <text:p text:style-name="P24">/login</text:p>
          </table:table-cell>
          <table:table-cell table:style-name="Таблица2.A1" office:value-type="string">
            <text:p text:style-name="P24">Авторизация + выдача JWT-токена</text:p>
          </table:table-cell>
        </table:table-row>
        <table:table-row>
          <table:table-cell table:style-name="Таблица2.A1" office:value-type="string">
            <text:p text:style-name="P24"><text:span text:style-name="Strong_20_Emphasis">POST</text:span></text:p>
          </table:table-cell>
          <table:table-cell table:style-name="Таблица2.A1" office:value-type="string">
            <text:p text:style-name="P24"><text:span text:style-name="Strong_20_Emphasis">/query</text:span></text:p>
          </table:table-cell>
          <table:table-cell table:style-name="Таблица2.A1" office:value-type="string">
            <text:p text:style-name="P24"><text:span text:style-name="Strong_20_Emphasis">Выполнение SQL-запросов</text:span> (главный)</text:p>
          </table:table-cell>
        </table:table-row>
        <table:table-row>
          <table:table-cell table:style-name="Таблица2.A1" office:value-type="string">
            <text:p text:style-name="P24">GET</text:p>
          </table:table-cell>
          <table:table-cell table:style-name="Таблица2.A1" office:value-type="string">
            <text:p text:style-name="P24">/metrics</text:p>
          </table:table-cell>
          <table:table-cell table:style-name="Таблица2.A1" office:value-type="string">
            <text:p text:style-name="P24">Телеметрия (RPS, ошибки и т.д.)</text:p>
          </table:table-cell>
        </table:table-row>
        <table:table-row>
          <table:table-cell table:style-name="Таблица2.A1" office:value-type="string">
            <text:p text:style-name="P24">GET</text:p>
          </table:table-cell>
          <table:table-cell table:style-name="Таблица2.A1" office:value-type="string">
            <text:p text:style-name="P24">/heartbeat</text:p>
          </table:table-cell>
          <table:table-cell table:style-name="Таблица2.A1" office:value-type="string">
            <text:p text:style-name="P25">Мониторинг узлов</text:p>
          </table:table-cell>
        </table:table-row>
      </table:table>
      <text:h text:style-name="P12" text:outline-level="4">c) <text:span text:style-name="Strong_20_Emphasis">Обработка SQL-запросов</text:span> (/query)</text:h>
      <text:p text:style-name="P31"><text:span text:style-name="Strong_20_Emphasis">Строки 179–224:</text:span></text:p>
      <text:list text:style-name="L51">
        <text:list-item>
          <text:p text:style-name="P119">Извлекает JWT-токен из заголовка Authorization: Bearer ... </text:p>
        </text:list-item>
        <text:list-item>
          <text:p text:style-name="P119">Проверяет токен через AuthManager::verifyToken() </text:p>
        </text:list-item>
        <text:list-item>
          <text:p text:style-name="P119">Выполняет запрос:</text:p>
          <text:p text:style-name="P120">C++</text:p>
          <text:p text:style-name="P17"><text:span text:style-name="Source_20_Text"><text:span text:style-name="T1">result </text:span></text:span><text:span text:style-name="Source_20_Text"><text:span text:style-name="T2">=</text:span></text:span><text:span text:style-name="Source_20_Text"><text:span text:style-name="T3"> executeTextAuthorized</text:span></text:span><text:span text:style-name="Source_20_Text"><text:span text:style-name="T1">(dbms, parser, logger, auth, </text:span></text:span><text:span text:style-name="Source_20_Text"><text:span text:style-name="T4">request</text:span></text:span><text:span text:style-name="Source_20_Text"><text:span text:style-name="T1">.</text:span></text:span><text:span text:style-name="Source_20_Text"><text:span text:style-name="T4">body</text:span></text:span><text:span text:style-name="Source_20_Text"><text:span text:style-name="T1">, user, </text:span></text:span><text:span text:style-name="Source_20_Text"><text:span text:style-name="T5">"crow"</text:span></text:span><text:span text:style-name="Source_20_Text"><text:span text:style-name="T1">, role);</text:span></text:span></text:p>
        </text:list-item>
        <text:list-item>
          <text:p text:style-name="P120">Возвращает JSON-ответ с полями ok, result, error. </text:p>
        </text:list-item>
      </text:list>
      <text:p text:style-name="P13"/>
      <text:h text:style-name="P10" text:outline-level="3">3. Клиентская часть (client.cpp)</text:h>
      <text:p text:style-name="P31"><text:span text:style-name="Strong_20_Emphasis">Файл:</text:span> attachments/client.cpp</text:p>
      <text:p text:style-name="P31"><text:span text:style-name="Strong_20_Emphasis">Реализация:</text:span></text:p>
      <text:h text:style-name="P11" text:outline-level="4">a) <text:span text:style-name="Strong_20_Emphasis">Низкоуровневое HTTP-взаимодействие</text:span></text:h>
      <text:list text:style-name="L52">
        <text:list-item>
          <text:p text:style-name="P121">sendRawHttp() (строки 27–72) — ручная реализация HTTP-клиента через сырые сокеты (socket, connect, send, recv). </text:p>
        </text:list-item>
        <text:list-item>
          <text:p text:style-name="P122">makePostRequest() (строки 75–90) — формирует полноценный HTTP POST-запрос с заголовками. </text:p>
        </text:list-item>
      </text:list>
      <text:h text:style-name="P11" text:outline-level="4">b) <text:span text:style-name="Strong_20_Emphasis">Логика клиента</text:span> (main())</text:h>
      <text:p text:style-name="P31"><text:span text:style-name="Strong_20_Emphasis">Строки 118–161:</text:span></text:p>
      <text:list text:style-name="L53">
        <text:list-item>
          <text:p text:style-name="P123">Поддерживает два режима:</text:p>
          <text:list>
            <text:list-item>
              <text:p text:style-name="P123">./course_client 127.0.0.1 8080 script.sql </text:p>
            </text:list-item>
            <text:list-item>
              <text:p text:style-name="P123"><text:soft-page-break/>./course_client 127.0.0.1 8080 "SELECT * FROM users" admin admin </text:p>
            </text:list-item>
          </text:list>
        </text:list-item>
        <text:list-item>
          <text:p text:style-name="P123">Выполняет логин (/login) → получает JWT-токен. </text:p>
        </text:list-item>
        <text:list-item>
          <text:p text:style-name="P123">Отправляет SQL-текст на /query с токеном в заголовке. </text:p>
        </text:list-item>
        <text:list-item>
          <text:p text:style-name="P124">Выводит ответ сервера. </text:p>
        </text:list-item>
      </text:list>
      <text:p text:style-name="P13"/>
      <text:h text:style-name="P10" text:outline-level="3">4. Как именно работает взаимодействие</text:h>
      <text:p text:style-name="P32"/>
      <text:p text:style-name="P32"><draw:frame draw:style-name="fr1" draw:name="Изображение1" text:anchor-type="char" svg:x="-0.169cm" svg:y="0.199cm" svg:width="17.755cm" svg:height="11.097cm" draw:z-index="0"><draw:image xlink:href="Pictures/1000000100000490000002DA58C8A6B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29"/>
      <text:h text:style-name="P2" text:outline-level="3">Преимущества и особенности реализации</text:h>
      <text:list text:style-name="L54">
        <text:list-item>
          <text:p text:style-name="P125"><text:span text:style-name="Strong_20_Emphasis">Разделение ответственности:</text:span> Вся бизнес-логика СУБД (DBMS, Table, AuthManager и т.д.) находится на сервере. </text:p>
        </text:list-item>
        <text:list-item>
          <text:p text:style-name="P125"><text:span text:style-name="Strong_20_Emphasis">Сетевой доступ:</text:span> Клиент может работать с сервером по сети (не только localhost). </text:p>
        </text:list-item>
        <text:list-item>
          <text:p text:style-name="P125"><text:span text:style-name="Strong_20_Emphasis">Авторизация:</text:span> JWT + RBAC (роли reader, writer, admin). </text:p>
        </text:list-item>
        <text:list-item>
          <text:p text:style-name="P125"><text:span text:style-name="Strong_20_Emphasis">HTTP/JSON</text:span> — стандартный, легко расширяемый протокол. </text:p>
        </text:list-item>
        <text:list-item>
          <text:p text:style-name="P126"><text:span text:style-name="Strong_20_Emphasis">Raw sockets в клиенте</text:span> — сделано без внешних библиотек (чисто C++ + POSIX). </text:p>
        </text:list-item>
      </text:list>
      <text:p text:style-name="P13"/>
      <text:h text:style-name="P10" text:outline-level="3">Итог</text:h>
      <text:p text:style-name="P31"><text:span text:style-name="Strong_20_Emphasis">Клиент-серверная архитектура реализована в двух основных файлах:</text:span></text:p>
      <text:list text:style-name="L55">
        <text:list-item>
          <text:p text:style-name="P127"><text:span text:style-name="Strong_20_Emphasis">server.cpp</text:span> — полноценный HTTP-сервер на Crow, обрабатывает все запросы. </text:p>
        </text:list-item>
        <text:list-item>
          <text:p text:style-name="P128"><text:span text:style-name="Strong_20_Emphasis">client.cpp</text:span> — лёгкий HTTP-клиент, отправляющий SQL-запросы. </text:p>
        </text:list-item>
      </text:list>
      <text:p text:style-name="P31"><text:span text:style-name="Strong_20_Emphasis">Основной канал взаимодействия</text:span> — <text:span text:style-name="Strong_20_Emphasis">HTTP POST /query</text:span> с JWT-авторизацией.</text:p>
      <text:p text:style-name="P31">Это классическая <text:span text:style-name="Strong_20_Emphasis">Client-Server</text:span> архитектура</text:p>
      <text:p text:style-name="P22">10.</text:p>
      <text:h text:style-name="P3" text:outline-level="3">1. Парсинг модификатора DEFAULT в CREATE TABLE</text:h>
      <text:p text:style-name="P31"><text:span text:style-name="Strong_20_Emphasis">Файл:</text:span> parser.cpp</text:p>
      <text:p text:style-name="P31"><text:span text:style-name="Strong_20_Emphasis">Функция:</text:span> Parser::parseCreateTable(Lexer&amp; lexer) (строки <text:span text:style-name="Strong_20_Emphasis">300–355</text:span>)</text:p>
      <text:p text:style-name="P31"><text:span text:style-name="Strong_20_Emphasis">Как реализовано:</text:span></text:p>
      <text:p text:style-name="P32">C++</text:p>
      <text:p text:style-name="P14"><text:span text:style-name="Source_20_Text"><text:span text:style-name="T27">while</text:span></text:span><text:span text:style-name="Source_20_Text"><text:span text:style-name="T23"> (</text:span></text:span><text:span text:style-name="Source_20_Text"><text:span text:style-name="T31">lexer</text:span></text:span><text:span text:style-name="Source_20_Text"><text:span text:style-name="T23">.</text:span></text:span><text:span text:style-name="Source_20_Text"><text:span text:style-name="T35">peek</text:span></text:span><text:span text:style-name="Source_20_Text"><text:span text:style-name="T23">().</text:span></text:span><text:span text:style-name="Source_20_Text"><text:span text:style-name="T31">type</text:span></text:span><text:span text:style-name="Source_20_Text"><text:span text:style-name="T27"> ==</text:span></text:span><text:span text:style-name="Source_20_Text"><text:span text:style-name="T23"> TokenType::Word)</text:span></text:span></text:p>
      <text:p text:style-name="P14"><text:span text:style-name="Source_20_Text"><text:span text:style-name="T23">{</text:span></text:span></text:p>
      <text:p text:style-name="P14"><text:soft-page-break/><text:span text:style-name="Source_20_Text"><text:span text:style-name="T25"><text:s text:c="4"/></text:span></text:span><text:span text:style-name="Source_20_Text"><text:span text:style-name="T23">std::string word </text:span></text:span><text:span text:style-name="Source_20_Text"><text:span text:style-name="T27">=</text:span></text:span><text:span text:style-name="Source_20_Text"><text:span text:style-name="T35"> toUpper</text:span></text:span><text:span text:style-name="Source_20_Text"><text:span text:style-name="T23">(</text:span></text:span><text:span text:style-name="Source_20_Text"><text:span text:style-name="T31">lexer</text:span></text:span><text:span text:style-name="Source_20_Text"><text:span text:style-name="T23">.</text:span></text:span><text:span text:style-name="Source_20_Text"><text:span text:style-name="T35">peek</text:span></text:span><text:span text:style-name="Source_20_Text"><text:span text:style-name="T23">().</text:span></text:span><text:span text:style-name="Source_20_Text"><text:span text:style-name="T31">text</text:span></text:span><text:span text:style-name="Source_20_Text"><text:span text:style-name="T23">);</text:span></text:span></text:p>
      <text:p text:style-name="P15"/>
      <text:p text:style-name="P14"><text:span text:style-name="Source_20_Text"><text:span text:style-name="T29"><text:s text:c="4"/></text:span></text:span><text:span text:style-name="Source_20_Text"><text:span text:style-name="T27">if</text:span></text:span><text:span text:style-name="Source_20_Text"><text:span text:style-name="T23"> (word </text:span></text:span><text:span text:style-name="Source_20_Text"><text:span text:style-name="T27">==</text:span></text:span><text:span text:style-name="Source_20_Text"><text:span text:style-name="T38"> "NOT_NULL"</text:span></text:span><text:span text:style-name="Source_20_Text"><text:span text:style-name="T23">) { ... }</text:span></text:span></text:p>
      <text:p text:style-name="P14"><text:span text:style-name="Source_20_Text"><text:span text:style-name="T29"><text:s text:c="4"/></text:span></text:span><text:span text:style-name="Source_20_Text"><text:span text:style-name="T27">else if</text:span></text:span><text:span text:style-name="Source_20_Text"><text:span text:style-name="T23"> (word </text:span></text:span><text:span text:style-name="Source_20_Text"><text:span text:style-name="T27">==</text:span></text:span><text:span text:style-name="Source_20_Text"><text:span text:style-name="T38"> "INDEXED"</text:span></text:span><text:span text:style-name="Source_20_Text"><text:span text:style-name="T23">) { ... }</text:span></text:span></text:p>
      <text:p text:style-name="P14"><text:span text:style-name="Source_20_Text"><text:span text:style-name="T29"><text:s text:c="4"/></text:span></text:span><text:span text:style-name="Source_20_Text"><text:span text:style-name="T27">else if</text:span></text:span><text:span text:style-name="Source_20_Text"><text:span text:style-name="T23"> (word </text:span></text:span><text:span text:style-name="Source_20_Text"><text:span text:style-name="T27">==</text:span></text:span><text:span text:style-name="Source_20_Text"><text:span text:style-name="T38"> "DEFAULT"</text:span></text:span><text:span text:style-name="Source_20_Text"><text:span text:style-name="T23">)</text:span></text:span><text:span text:style-name="Source_20_Text"><text:span text:style-name="T42"> <text:s text:c="9"/></text:span></text:span><text:span text:style-name="Source_20_Text"><text:span text:style-name="T40">// ← Здесь начинается DEFAULT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33"><text:s text:c="8"/></text:span></text:span><text:span text:style-name="Source_20_Text"><text:span text:style-name="T31">lexer</text:span></text:span><text:span text:style-name="Source_20_Text"><text:span text:style-name="T23">.</text:span></text:span><text:span text:style-name="Source_20_Text"><text:span text:style-name="T35">next</text:span></text:span><text:span text:style-name="Source_20_Text"><text:span text:style-name="T23">();</text:span></text:span><text:span text:style-name="Source_20_Text"><text:span text:style-name="T42"> <text:s text:c="32"/></text:span></text:span><text:span text:style-name="Source_20_Text"><text:span text:style-name="T40">// съедаем "DEFAULT"</text:span></text:span></text:p>
      <text:p text:style-name="P14"><text:span text:style-name="Source_20_Text"><text:span text:style-name="T33"><text:s text:c="8"/></text:span></text:span><text:span text:style-name="Source_20_Text"><text:span text:style-name="T31">column</text:span></text:span><text:span text:style-name="Source_20_Text"><text:span text:style-name="T23">.</text:span></text:span><text:span text:style-name="Source_20_Text"><text:span text:style-name="T31">hasDefault</text:span></text:span><text:span text:style-name="Source_20_Text"><text:span text:style-name="T27"> =</text:span></text:span><text:span text:style-name="Source_20_Text"><text:span text:style-name="T45"> true</text:span></text:span><text:span text:style-name="Source_20_Text"><text:span text:style-name="T23">;</text:span></text:span></text:p>
      <text:p text:style-name="P14"><text:span text:style-name="Source_20_Text"><text:span text:style-name="T33"><text:s text:c="8"/></text:span></text:span><text:span text:style-name="Source_20_Text"><text:span text:style-name="T31">column</text:span></text:span><text:span text:style-name="Source_20_Text"><text:span text:style-name="T23">.</text:span></text:span><text:span text:style-name="Source_20_Text"><text:span text:style-name="T31">defaultValue</text:span></text:span><text:span text:style-name="Source_20_Text"><text:span text:style-name="T27"> =</text:span></text:span><text:span text:style-name="Source_20_Text"><text:span text:style-name="T35"> parseLiteral</text:span></text:span><text:span text:style-name="Source_20_Text"><text:span text:style-name="T23">(lexer);</text:span></text:span><text:span text:style-name="Source_20_Text"><text:span text:style-name="T42"> <text:s text:c="3"/></text:span></text:span><text:span text:style-name="Source_20_Text"><text:span text:style-name="T40">// парсим значение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4"><text:span text:style-name="Source_20_Text"><text:span text:style-name="T29"><text:s text:c="4"/></text:span></text:span><text:span text:style-name="Source_20_Text"><text:span text:style-name="T27">else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29"><text:s text:c="8"/></text:span></text:span><text:span text:style-name="Source_20_Text"><text:span text:style-name="T27">break</text:span></text:span><text:span text:style-name="Source_20_Text"><text:span text:style-name="T23">;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4"><text:span text:style-name="Source_20_Text"><text:span text:style-name="T23">}</text:span></text:span></text:p>
      <text:p text:style-name="P31"><text:span text:style-name="Strong_20_Emphasis">Поддерживаемые типы значений:</text:span></text:p>
      <text:list text:style-name="L56">
        <text:list-item>
          <text:p text:style-name="P129">DEFAULT 42 </text:p>
        </text:list-item>
        <text:list-item>
          <text:p text:style-name="P129">DEFAULT "текст" </text:p>
        </text:list-item>
        <text:list-item>
          <text:p text:style-name="P130">DEFAULT NULL </text:p>
        </text:list-item>
      </text:list>
      <text:p text:style-name="P31">Значение сохраняется в структуру ColumnInfo.</text:p>
      <text:p text:style-name="P13"/>
      <text:h text:style-name="P10" text:outline-level="3">2. Хранение информации о DEFAULT</text:h>
      <text:p text:style-name="P31"><text:span text:style-name="Strong_20_Emphasis">Файл:</text:span> storage.cpp</text:p>
      <text:p text:style-name="P31"><text:span text:style-name="Strong_20_Emphasis">Функции:</text:span></text:p>
      <text:list text:style-name="L57">
        <text:list-item>
          <text:p text:style-name="P131">schemaToProtoBytes() — сериализует hasDefault и defaultValue в protobuf. </text:p>
        </text:list-item>
        <text:list-item>
          <text:p text:style-name="P132">schemaFromProtoBytes() — десериализует при загрузке таблицы. </text:p>
        </text:list-item>
      </text:list>
      <text:p text:style-name="P31"><text:span text:style-name="Strong_20_Emphasis">Структура ColumnInfo</text:span> (в table.h / storage.h):</text:p>
      <text:p text:style-name="P32">C++</text:p>
      <text:p text:style-name="P14"><text:span text:style-name="Source_20_Text"><text:span text:style-name="T47">struct</text:span></text:span><text:span text:style-name="Source_20_Text"><text:span text:style-name="T50"> ColumnInfo</text:span></text:span><text:span text:style-name="Source_20_Text"><text:span text:style-name="T23"> {</text:span></text:span></text:p>
      <text:p text:style-name="P14"><text:span text:style-name="Source_20_Text"><text:span text:style-name="T25"><text:s text:c="4"/></text:span></text:span><text:span text:style-name="Source_20_Text"><text:span text:style-name="T23">std::string name;</text:span></text:span></text:p>
      <text:p text:style-name="P14"><text:span text:style-name="Source_20_Text"><text:span text:style-name="T25"><text:s text:c="4"/></text:span></text:span><text:span text:style-name="Source_20_Text"><text:span text:style-name="T23">ColumnType type;</text:span></text:span></text:p>
      <text:p text:style-name="P14"><text:span text:style-name="Source_20_Text"><text:span text:style-name="T49"><text:s text:c="4"/></text:span></text:span><text:span text:style-name="Source_20_Text"><text:span text:style-name="T47">bool</text:span></text:span><text:span text:style-name="Source_20_Text"><text:span text:style-name="T23"> notNull </text:span></text:span><text:span text:style-name="Source_20_Text"><text:span text:style-name="T27">=</text:span></text:span><text:span text:style-name="Source_20_Text"><text:span text:style-name="T45"> false</text:span></text:span><text:span text:style-name="Source_20_Text"><text:span text:style-name="T23">;</text:span></text:span></text:p>
      <text:p text:style-name="P14"><text:span text:style-name="Source_20_Text"><text:span text:style-name="T49"><text:s text:c="4"/></text:span></text:span><text:span text:style-name="Source_20_Text"><text:span text:style-name="T47">bool</text:span></text:span><text:span text:style-name="Source_20_Text"><text:span text:style-name="T23"> indexed </text:span></text:span><text:span text:style-name="Source_20_Text"><text:span text:style-name="T27">=</text:span></text:span><text:span text:style-name="Source_20_Text"><text:span text:style-name="T45"> false</text:span></text:span><text:span text:style-name="Source_20_Text"><text:span text:style-name="T23">;</text:span></text:span></text:p>
      <text:p text:style-name="P14"><text:span text:style-name="Source_20_Text"><text:span text:style-name="T49"><text:s text:c="4"/></text:span></text:span><text:span text:style-name="Source_20_Text"><text:span text:style-name="T47">bool</text:span></text:span><text:span text:style-name="Source_20_Text"><text:span text:style-name="T23"> hasDefault </text:span></text:span><text:span text:style-name="Source_20_Text"><text:span text:style-name="T27">=</text:span></text:span><text:span text:style-name="Source_20_Text"><text:span text:style-name="T45"> false</text:span></text:span><text:span text:style-name="Source_20_Text"><text:span text:style-name="T23">;</text:span></text:span></text:p>
      <text:p text:style-name="P14"><text:span text:style-name="Source_20_Text"><text:span text:style-name="T25"><text:s text:c="4"/></text:span></text:span><text:span text:style-name="Source_20_Text"><text:span text:style-name="T23">Value defaultValue;</text:span></text:span><text:span text:style-name="Source_20_Text"><text:span text:style-name="T42"> <text:s text:c="7"/></text:span></text:span><text:span text:style-name="Source_20_Text"><text:span text:style-name="T40">// ← здесь хранится значение по умолчанию</text:span></text:span></text:p>
      <text:p text:style-name="P14"><text:span text:style-name="Source_20_Text"><text:span text:style-name="T23">};</text:span></text:span></text:p>
      <text:p text:style-name="P13"/>
      <text:h text:style-name="P10" text:outline-level="3"><text:soft-page-break/>3. Применение DEFAULT при INSERT</text:h>
      <text:p text:style-name="P31"><text:span text:style-name="Strong_20_Emphasis">Файл:</text:span> table.cpp — <text:span text:style-name="Strong_20_Emphasis">главное место реализации</text:span></text:p>
      <text:p text:style-name="P31"><text:span text:style-name="Strong_20_Emphasis">Функция:</text:span> Table::insertRows() (строки <text:span text:style-name="Strong_20_Emphasis">1120–1190</text:span>)</text:p>
      <text:p text:style-name="P31"><text:span text:style-name="Strong_20_Emphasis">Как это работает:</text:span></text:p>
      <text:p text:style-name="P32">C++</text:p>
      <text:p text:style-name="P14"><text:span text:style-name="Source_20_Text"><text:span text:style-name="T27">for</text:span></text:span><text:span text:style-name="Source_20_Text"><text:span text:style-name="T23"> (std::</text:span></text:span><text:span text:style-name="Source_20_Text"><text:span text:style-name="T47">size_t</text:span></text:span><text:span text:style-name="Source_20_Text"><text:span text:style-name="T23"> rowIndex </text:span></text:span><text:span text:style-name="Source_20_Text"><text:span text:style-name="T27">=</text:span></text:span><text:span text:style-name="Source_20_Text"><text:span text:style-name="T45"> 0</text:span></text:span><text:span text:style-name="Source_20_Text"><text:span text:style-name="T23">; rowIndex </text:span></text:span><text:span text:style-name="Source_20_Text"><text:span text:style-name="T27">&lt;</text:span></text:span><text:span text:style-name="Source_20_Text"><text:span text:style-name="T31"> rows</text:span></text:span><text:span text:style-name="Source_20_Text"><text:span text:style-name="T23">.</text:span></text:span><text:span text:style-name="Source_20_Text"><text:span text:style-name="T35">size</text:span></text:span><text:span text:style-name="Source_20_Text"><text:span text:style-name="T23">(); </text:span></text:span><text:span text:style-name="Source_20_Text"><text:span text:style-name="T27">++</text:span></text:span><text:span text:style-name="Source_20_Text"><text:span text:style-name="T23">rowIndex)</text:span></text:span></text:p>
      <text:p text:style-name="P14"><text:span text:style-name="Source_20_Text"><text:span text:style-name="T23">{</text:span></text:span></text:p>
      <text:p text:style-name="P14"><text:span text:style-name="Source_20_Text"><text:span text:style-name="T25"><text:s text:c="4"/></text:span></text:span><text:span text:style-name="Source_20_Text"><text:span text:style-name="T23">Row </text:span></text:span><text:span text:style-name="Source_20_Text"><text:span text:style-name="T35">row</text:span></text:span><text:span text:style-name="Source_20_Text"><text:span text:style-name="T23">(</text:span></text:span><text:span text:style-name="Source_20_Text"><text:span text:style-name="T31">columns_</text:span></text:span><text:span text:style-name="Source_20_Text"><text:span text:style-name="T23">.</text:span></text:span><text:span text:style-name="Source_20_Text"><text:span text:style-name="T35">size</text:span></text:span><text:span text:style-name="Source_20_Text"><text:span text:style-name="T23">(), </text:span></text:span><text:span text:style-name="Source_20_Text"><text:span text:style-name="T35">makeNull</text:span></text:span><text:span text:style-name="Source_20_Text"><text:span text:style-name="T23">());</text:span></text:span><text:span text:style-name="Source_20_Text"><text:span text:style-name="T42"> <text:s text:c="2"/></text:span></text:span><text:span text:style-name="Source_20_Text"><text:span text:style-name="T40">// изначально все NULL</text:span></text:span></text:p>
      <text:p text:style-name="P15"/>
      <text:p text:style-name="P14"><text:span text:style-name="Source_20_Text"><text:span text:style-name="T44"><text:s text:c="4"/></text:span></text:span><text:span text:style-name="Source_20_Text"><text:span text:style-name="T40">// Заполняем переданные значения</text:span></text:span></text:p>
      <text:p text:style-name="P14"><text:span text:style-name="Source_20_Text"><text:span text:style-name="T29"><text:s text:c="4"/></text:span></text:span><text:span text:style-name="Source_20_Text"><text:span text:style-name="T27">for</text:span></text:span><text:span text:style-name="Source_20_Text"><text:span text:style-name="T23"> (std::</text:span></text:span><text:span text:style-name="Source_20_Text"><text:span text:style-name="T47">size_t</text:span></text:span><text:span text:style-name="Source_20_Text"><text:span text:style-name="T23"> valueIndex </text:span></text:span><text:span text:style-name="Source_20_Text"><text:span text:style-name="T27">=</text:span></text:span><text:span text:style-name="Source_20_Text"><text:span text:style-name="T45"> 0</text:span></text:span><text:span text:style-name="Source_20_Text"><text:span text:style-name="T23">; valueIndex </text:span></text:span><text:span text:style-name="Source_20_Text"><text:span text:style-name="T27">&lt;</text:span></text:span><text:span text:style-name="Source_20_Text"><text:span text:style-name="T31"> rows</text:span></text:span><text:span text:style-name="Source_20_Text"><text:span text:style-name="T23">[rowIndex].</text:span></text:span><text:span text:style-name="Source_20_Text"><text:span text:style-name="T35">size</text:span></text:span><text:span text:style-name="Source_20_Text"><text:span text:style-name="T23">(); </text:span></text:span><text:span text:style-name="Source_20_Text"><text:span text:style-name="T27">++</text:span></text:span><text:span text:style-name="Source_20_Text"><text:span text:style-name="T23">valueIndex)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33"><text:s text:c="8"/></text:span></text:span><text:span text:style-name="Source_20_Text"><text:span text:style-name="T31">row</text:span></text:span><text:span text:style-name="Source_20_Text"><text:span text:style-name="T23">[</text:span></text:span><text:span text:style-name="Source_20_Text"><text:span text:style-name="T31">targetIndexes</text:span></text:span><text:span text:style-name="Source_20_Text"><text:span text:style-name="T23">[valueIndex]] </text:span></text:span><text:span text:style-name="Source_20_Text"><text:span text:style-name="T27">=</text:span></text:span><text:span text:style-name="Source_20_Text"><text:span text:style-name="T31"> rows</text:span></text:span><text:span text:style-name="Source_20_Text"><text:span text:style-name="T23">[rowIndex][valueIndex];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5"/>
      <text:p text:style-name="P14"><text:span text:style-name="Source_20_Text"><text:span text:style-name="T44"><text:s text:c="4"/></text:span></text:span><text:span text:style-name="Source_20_Text"><text:span text:style-name="T40">// ← Ключевой участок: применяем DEFAULT</text:span></text:span></text:p>
      <text:p text:style-name="P14"><text:span text:style-name="Source_20_Text"><text:span text:style-name="T29"><text:s text:c="4"/></text:span></text:span><text:span text:style-name="Source_20_Text"><text:span text:style-name="T27">for</text:span></text:span><text:span text:style-name="Source_20_Text"><text:span text:style-name="T23"> (std::</text:span></text:span><text:span text:style-name="Source_20_Text"><text:span text:style-name="T47">size_t</text:span></text:span><text:span text:style-name="Source_20_Text"><text:span text:style-name="T23"> columnIndex </text:span></text:span><text:span text:style-name="Source_20_Text"><text:span text:style-name="T27">=</text:span></text:span><text:span text:style-name="Source_20_Text"><text:span text:style-name="T45"> 0</text:span></text:span><text:span text:style-name="Source_20_Text"><text:span text:style-name="T23">; columnIndex </text:span></text:span><text:span text:style-name="Source_20_Text"><text:span text:style-name="T27">&lt;</text:span></text:span><text:span text:style-name="Source_20_Text"><text:span text:style-name="T31"> columns_</text:span></text:span><text:span text:style-name="Source_20_Text"><text:span text:style-name="T23">.</text:span></text:span><text:span text:style-name="Source_20_Text"><text:span text:style-name="T35">size</text:span></text:span><text:span text:style-name="Source_20_Text"><text:span text:style-name="T23">(); </text:span></text:span><text:span text:style-name="Source_20_Text"><text:span text:style-name="T27">++</text:span></text:span><text:span text:style-name="Source_20_Text"><text:span text:style-name="T23">columnIndex)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29"><text:s text:c="8"/></text:span></text:span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row</text:span></text:span><text:span text:style-name="Source_20_Text"><text:span text:style-name="T23">[columnIndex].</text:span></text:span><text:span text:style-name="Source_20_Text"><text:span text:style-name="T31">type</text:span></text:span><text:span text:style-name="Source_20_Text"><text:span text:style-name="T27"> ==</text:span></text:span><text:span text:style-name="Source_20_Text"><text:span text:style-name="T23"> ValueType::Null </text:span></text:span><text:span text:style-name="Source_20_Text"><text:span text:style-name="T27">&amp;&amp;</text:span></text:span><text:span text:style-name="Source_20_Text"><text:span text:style-name="T31"> columns_</text:span></text:span><text:span text:style-name="Source_20_Text"><text:span text:style-name="T23">[columnIndex].</text:span></text:span><text:span text:style-name="Source_20_Text"><text:span text:style-name="T31">hasDefault</text:span></text:span><text:span text:style-name="Source_20_Text"><text:span text:style-name="T23">)</text:span></text:span></text:p>
      <text:p text:style-name="P14"><text:span text:style-name="Source_20_Text"><text:span text:style-name="T25"><text:s text:c="8"/></text:span></text:span><text:span text:style-name="Source_20_Text"><text:span text:style-name="T23">{</text:span></text:span></text:p>
      <text:p text:style-name="P14"><text:span text:style-name="Source_20_Text"><text:span text:style-name="T33"><text:s text:c="12"/></text:span></text:span><text:span text:style-name="Source_20_Text"><text:span text:style-name="T31">row</text:span></text:span><text:span text:style-name="Source_20_Text"><text:span text:style-name="T23">[columnIndex] </text:span></text:span><text:span text:style-name="Source_20_Text"><text:span text:style-name="T27">=</text:span></text:span><text:span text:style-name="Source_20_Text"><text:span text:style-name="T31"> columns_</text:span></text:span><text:span text:style-name="Source_20_Text"><text:span text:style-name="T23">[columnIndex].</text:span></text:span><text:span text:style-name="Source_20_Text"><text:span text:style-name="T31">defaultValue</text:span></text:span><text:span text:style-name="Source_20_Text"><text:span text:style-name="T23">;</text:span></text:span></text:p>
      <text:p text:style-name="P14"><text:span text:style-name="Source_20_Text"><text:span text:style-name="T25"><text:s text:c="8"/></text:span></text:span><text:span text:style-name="Source_20_Text"><text:span text:style-name="T23">}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5"/>
      <text:p text:style-name="P14"><text:span text:style-name="Source_20_Text"><text:span text:style-name="T37"><text:s text:c="4"/></text:span></text:span><text:span text:style-name="Source_20_Text"><text:span text:style-name="T35">validateRow</text:span></text:span><text:span text:style-name="Source_20_Text"><text:span text:style-name="T23">(row);</text:span></text:span><text:span text:style-name="Source_20_Text"><text:span text:style-name="T42"> <text:s text:c="10"/></text:span></text:span><text:span text:style-name="Source_20_Text"><text:span text:style-name="T40">// проверяем NOT NULL и типы</text:span></text:span></text:p>
      <text:p text:style-name="P14"><text:span text:style-name="Source_20_Text"><text:span text:style-name="T33"><text:s text:c="4"/></text:span></text:span><text:span text:style-name="Source_20_Text"><text:span text:style-name="T31">preparedRows</text:span></text:span><text:span text:style-name="Source_20_Text"><text:span text:style-name="T23">.</text:span></text:span><text:span text:style-name="Source_20_Text"><text:span text:style-name="T35">push_back</text:span></text:span><text:span text:style-name="Source_20_Text"><text:span text:style-name="T23">(row);</text:span></text:span></text:p>
      <text:p text:style-name="P14"><text:span text:style-name="Source_20_Text"><text:span text:style-name="T23">}</text:span></text:span></text:p>
      <text:p text:style-name="P31"><text:span text:style-name="Strong_20_Emphasis">Логика:</text:span></text:p>
      <text:list text:style-name="L58">
        <text:list-item>
          <text:p text:style-name="P133">Если в INSERT столбец не указан → значение остаётся NULL. </text:p>
        </text:list-item>
        <text:list-item>
          <text:p text:style-name="P133">Если у столбца есть DEFAULT → вместо NULL подставляется значение по умолчанию. </text:p>
        </text:list-item>
        <text:list-item>
          <text:p text:style-name="P134">Только после этого выполняется validateRow() (чтобы проверить NOT NULL). </text:p>
        </text:list-item>
      </text:list>
      <text:p text:style-name="P13"/>
      <text:h text:style-name="P10" text:outline-level="3">4. Дополнительные места использования</text:h>
      <text:list text:style-name="L59">
        <text:list-item>
          <text:p text:style-name="P135"><text:span text:style-name="Strong_20_Emphasis">Table::validateValueForColumn()</text:span> — проверяет корректность типа DEFAULT при создании таблицы. </text:p>
        </text:list-item>
        <text:list-item>
          <text:p text:style-name="P135"><text:span text:style-name="Strong_20_Emphasis">Table::create()</text:span> (строки 85–170) — при создании таблицы проверяется, что DEFAULT соответствует типу столбца. </text:p>
        </text:list-item>
        <text:list-item>
          <text:p text:style-name="P136"><text:span text:style-name="Strong_20_Emphasis">Protobuf-сериализация</text:span> (storage.cpp) — defaultValue сохраняется в schema.pb. </text:p>
        </text:list-item>
      </text:list>
      <text:p text:style-name="P13"><text:soft-page-break/></text:p>
      <text:h text:style-name="P10" text:outline-level="3">Пример работы</text:h>
      <text:p text:style-name="P32">SQL</text:p>
      <text:p text:style-name="P14"><text:span text:style-name="Source_20_Text"><text:span text:style-name="T27">CREATE TABLE</text:span></text:span><text:span text:style-name="Source_20_Text"><text:span text:style-name="T35"> users</text:span></text:span><text:span text:style-name="Source_20_Text"><text:span text:style-name="T23"> (</text:span></text:span></text:p>
      <text:p text:style-name="P14"><text:span text:style-name="Source_20_Text"><text:span text:style-name="T25"><text:s text:c="4"/></text:span></text:span><text:span text:style-name="Source_20_Text"><text:span text:style-name="T23">id </text:span></text:span><text:span text:style-name="Source_20_Text"><text:span text:style-name="T47">INT</text:span></text:span><text:span text:style-name="Source_20_Text"><text:span text:style-name="T23"> INDEXED,</text:span></text:span></text:p>
      <text:p text:style-name="P14"><text:span text:style-name="Source_20_Text"><text:span text:style-name="T29"><text:s text:c="4"/></text:span></text:span><text:span text:style-name="Source_20_Text"><text:span text:style-name="T27">name</text:span></text:span><text:span text:style-name="Source_20_Text"><text:span text:style-name="T23"> STRING NOT_NULL,</text:span></text:span></text:p>
      <text:p text:style-name="P14"><text:span text:style-name="Source_20_Text"><text:span text:style-name="T25"><text:s text:c="4"/></text:span></text:span><text:span text:style-name="Source_20_Text"><text:span text:style-name="T23">age </text:span></text:span><text:span text:style-name="Source_20_Text"><text:span text:style-name="T47">INT</text:span></text:span><text:span text:style-name="Source_20_Text"><text:span text:style-name="T52"> DEFAULT</text:span></text:span><text:span text:style-name="Source_20_Text"><text:span text:style-name="T45"> 18</text:span></text:span><text:span text:style-name="Source_20_Text"><text:span text:style-name="T23">, <text:s text:c="10"/></text:span></text:span><text:span text:style-name="Source_20_Text"><text:span text:style-name="T40">-- значение по умолчанию</text:span></text:span></text:p>
      <text:p text:style-name="P14"><text:span text:style-name="Source_20_Text"><text:span text:style-name="T29"><text:s text:c="4"/></text:span></text:span><text:span text:style-name="Source_20_Text"><text:span text:style-name="T27">status</text:span></text:span><text:span text:style-name="Source_20_Text"><text:span text:style-name="T23"> STRING </text:span></text:span><text:span text:style-name="Source_20_Text"><text:span text:style-name="T52">DEFAULT</text:span></text:span><text:span text:style-name="Source_20_Text"><text:span text:style-name="T38"> "active"</text:span></text:span></text:p>
      <text:p text:style-name="P14"><text:span text:style-name="Source_20_Text"><text:span text:style-name="T23">);</text:span></text:span></text:p>
      <text:p text:style-name="P15"/>
      <text:p text:style-name="P14"><text:span text:style-name="Source_20_Text"><text:span text:style-name="T27">INSERT INTO</text:span></text:span><text:span text:style-name="Source_20_Text"><text:span text:style-name="T23"> users (id, </text:span></text:span><text:span text:style-name="Source_20_Text"><text:span text:style-name="T27">name</text:span></text:span><text:span text:style-name="Source_20_Text"><text:span text:style-name="T23">) </text:span></text:span><text:span text:style-name="Source_20_Text"><text:span text:style-name="T27">VALUES</text:span></text:span><text:span text:style-name="Source_20_Text"><text:span text:style-name="T23"> (</text:span></text:span><text:span text:style-name="Source_20_Text"><text:span text:style-name="T45">1</text:span></text:span><text:span text:style-name="Source_20_Text"><text:span text:style-name="T23">, </text:span></text:span><text:span text:style-name="Source_20_Text"><text:span text:style-name="T38">"Alice"</text:span></text:span><text:span text:style-name="Source_20_Text"><text:span text:style-name="T23">); <text:s/></text:span></text:span></text:p>
      <text:p text:style-name="P14"><text:span text:style-name="Source_20_Text"><text:span text:style-name="T40">-- age станет 18, status станет "active"</text:span></text:span></text:p>
      <text:p text:style-name="P13"/>
      <text:h text:style-name="P10" text:outline-level="3">Итог</text:h>
      <text:p text:style-name="P31"><text:span text:style-name="Strong_20_Emphasis">Поддержка DEFAULT реализована в следующих ключевых местах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26">Этап</text:p>
            </table:table-cell>
            <table:table-cell table:style-name="Таблица3.A1" office:value-type="string">
              <text:p text:style-name="P26">Файл</text:p>
            </table:table-cell>
            <table:table-cell table:style-name="Таблица3.A1" office:value-type="string">
              <text:p text:style-name="P26">Функция</text:p>
            </table:table-cell>
            <table:table-cell table:style-name="Таблица3.A1" office:value-type="string">
              <text:p text:style-name="P27">Что делает</text:p>
            </table:table-cell>
          </table:table-row>
        </table:table-header-rows>
        <table:table-row>
          <table:table-cell table:style-name="Таблица3.A1" office:value-type="string">
            <text:p text:style-name="P24">Парсинг</text:p>
          </table:table-cell>
          <table:table-cell table:style-name="Таблица3.A1" office:value-type="string">
            <text:p text:style-name="P24">parser.cpp</text:p>
          </table:table-cell>
          <table:table-cell table:style-name="Таблица3.A1" office:value-type="string">
            <text:p text:style-name="P24">parseCreateTable()</text:p>
          </table:table-cell>
          <table:table-cell table:style-name="Таблица3.A1" office:value-type="string">
            <text:p text:style-name="P24">Распознаёт DEFAULT value</text:p>
          </table:table-cell>
        </table:table-row>
        <table:table-row>
          <table:table-cell table:style-name="Таблица3.A1" office:value-type="string">
            <text:p text:style-name="P24">Хранение в схеме</text:p>
          </table:table-cell>
          <table:table-cell table:style-name="Таблица3.A1" office:value-type="string">
            <text:p text:style-name="P24">storage.cpp</text:p>
          </table:table-cell>
          <table:table-cell table:style-name="Таблица3.A1" office:value-type="string">
            <text:p text:style-name="P24">schemaToProtoBytes()</text:p>
          </table:table-cell>
          <table:table-cell table:style-name="Таблица3.A1" office:value-type="string">
            <text:p text:style-name="P24">Сохраняет в protobuf</text:p>
          </table:table-cell>
        </table:table-row>
        <table:table-row>
          <table:table-cell table:style-name="Таблица3.A1" office:value-type="string">
            <text:p text:style-name="P24">Применение при INSERT</text:p>
          </table:table-cell>
          <table:table-cell table:style-name="Таблица3.A1" office:value-type="string">
            <text:p text:style-name="P24"><text:span text:style-name="Strong_20_Emphasis">table.cpp</text:span></text:p>
          </table:table-cell>
          <table:table-cell table:style-name="Таблица3.A1" office:value-type="string">
            <text:p text:style-name="P24"><text:span text:style-name="Strong_20_Emphasis">insertRows()</text:span></text:p>
          </table:table-cell>
          <table:table-cell table:style-name="Таблица3.A1" office:value-type="string">
            <text:p text:style-name="P24"><text:span text:style-name="Strong_20_Emphasis">Подставляет DEFAULT</text:span></text:p>
          </table:table-cell>
        </table:table-row>
        <table:table-row>
          <table:table-cell table:style-name="Таблица3.A1" office:value-type="string">
            <text:p text:style-name="P24">Валидация</text:p>
          </table:table-cell>
          <table:table-cell table:style-name="Таблица3.A1" office:value-type="string">
            <text:p text:style-name="P24">table.cpp</text:p>
          </table:table-cell>
          <table:table-cell table:style-name="Таблица3.A1" office:value-type="string">
            <text:p text:style-name="P24">create() / validateRow()</text:p>
          </table:table-cell>
          <table:table-cell table:style-name="Таблица3.A1" office:value-type="string">
            <text:p text:style-name="P25">Проверяет корректность</text:p>
          </table:table-cell>
        </table:table-row>
      </table:table>
      <text:p text:style-name="P31"><text:span text:style-name="Strong_20_Emphasis">Главное место реализации логики</text:span> — <text:span text:style-name="Strong_20_Emphasis">table.cpp:insertRows()</text:span> (строки примерно 1160–1180).</text:p>
      <text:p text:style-name="P20"/>
      <text:p text:style-name="P20"/>
      <text:p text:style-name="P22"/>
      <text:p text:style-name="P23">12.</text:p>
      <text:p text:style-name="P23"/>
      <text:p text:style-name="P145">Агрегатные функции реализованы <text:span text:style-name="Strong_20_Emphasis">полноценно</text:span> только в команде SELECT. Они работают как с WHERE, так и без него.</text:p>
      <text:p text:style-name="P13"/>
      <text:h text:style-name="P10" text:outline-level="3">1. Парсинг агрегатных функций</text:h>
      <text:p text:style-name="P31"><text:span text:style-name="Strong_20_Emphasis">Файл:</text:span> parser.cpp</text:p>
      <text:p text:style-name="P31"><text:span text:style-name="Strong_20_Emphasis">Функция:</text:span> Parser::parseSelectItem(Lexer&amp; lexer) (строки <text:span text:style-name="Strong_20_Emphasis">448–490</text:span>)</text:p>
      <text:p text:style-name="P31"><text:span text:style-name="Strong_20_Emphasis">Как реализовано:</text:span></text:p>
      <text:p text:style-name="P32">C++</text:p>
      <text:p text:style-name="P14"><text:span text:style-name="Source_20_Text"><text:span text:style-name="T27">if</text:span></text:span><text:span text:style-name="Source_20_Text"><text:span text:style-name="T23"> (word </text:span></text:span><text:span text:style-name="Source_20_Text"><text:span text:style-name="T27">==</text:span></text:span><text:span text:style-name="Source_20_Text"><text:span text:style-name="T38"> "COUNT"</text:span></text:span><text:span text:style-name="Source_20_Text"><text:span text:style-name="T27"> ||</text:span></text:span><text:span text:style-name="Source_20_Text"><text:span text:style-name="T23"> word </text:span></text:span><text:span text:style-name="Source_20_Text"><text:span text:style-name="T27">==</text:span></text:span><text:span text:style-name="Source_20_Text"><text:span text:style-name="T38"> "SUM"</text:span></text:span><text:span text:style-name="Source_20_Text"><text:span text:style-name="T27"> ||</text:span></text:span><text:span text:style-name="Source_20_Text"><text:span text:style-name="T23"> word </text:span></text:span><text:span text:style-name="Source_20_Text"><text:span text:style-name="T27">==</text:span></text:span><text:span text:style-name="Source_20_Text"><text:span text:style-name="T38"> "AVG"</text:span></text:span><text:span text:style-name="Source_20_Text"><text:span text:style-name="T23">)</text:span></text:span></text:p>
      <text:p text:style-name="P14"><text:soft-page-break/><text:span text:style-name="Source_20_Text"><text:span text:style-name="T23">{</text:span></text:span></text:p>
      <text:p text:style-name="P14"><text:span text:style-name="Source_20_Text"><text:span text:style-name="T33"><text:s text:c="4"/></text:span></text:span><text:span text:style-name="Source_20_Text"><text:span text:style-name="T31">lexer</text:span></text:span><text:span text:style-name="Source_20_Text"><text:span text:style-name="T23">.</text:span></text:span><text:span text:style-name="Source_20_Text"><text:span text:style-name="T35">next</text:span></text:span><text:span text:style-name="Source_20_Text"><text:span text:style-name="T23">();</text:span></text:span><text:span text:style-name="Source_20_Text"><text:span text:style-name="T42"> <text:s/></text:span></text:span><text:span text:style-name="Source_20_Text"><text:span text:style-name="T40">// съедаем имя функции</text:span></text:span></text:p>
      <text:p text:style-name="P15"/>
      <text:p text:style-name="P14"><text:span text:style-name="Source_20_Text"><text:span text:style-name="T29"><text:s text:c="4"/></text:span></text:span><text:span text:style-name="Source_20_Text"><text:span text:style-name="T27">if</text:span></text:span><text:span text:style-name="Source_20_Text"><text:span text:style-name="T23"> (word </text:span></text:span><text:span text:style-name="Source_20_Text"><text:span text:style-name="T27">==</text:span></text:span><text:span text:style-name="Source_20_Text"><text:span text:style-name="T38"> "COUNT"</text:span></text:span><text:span text:style-name="Source_20_Text"><text:span text:style-name="T23">) 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</text:span></text:span><text:span text:style-name="Source_20_Text"><text:span text:style-name="T23"> SelectItem::Kind::Count;</text:span></text:span></text:p>
      <text:p text:style-name="P14"><text:span text:style-name="Source_20_Text"><text:span text:style-name="T29"><text:s text:c="4"/></text:span></text:span><text:span text:style-name="Source_20_Text"><text:span text:style-name="T27">if</text:span></text:span><text:span text:style-name="Source_20_Text"><text:span text:style-name="T23"> (word </text:span></text:span><text:span text:style-name="Source_20_Text"><text:span text:style-name="T27">==</text:span></text:span><text:span text:style-name="Source_20_Text"><text:span text:style-name="T38"> "SUM"</text:span></text:span><text:span text:style-name="Source_20_Text"><text:span text:style-name="T23">) <text:s text:c="2"/>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</text:span></text:span><text:span text:style-name="Source_20_Text"><text:span text:style-name="T23"> SelectItem::Kind::Sum;</text:span></text:span></text:p>
      <text:p text:style-name="P14"><text:span text:style-name="Source_20_Text"><text:span text:style-name="T29"><text:s text:c="4"/></text:span></text:span><text:span text:style-name="Source_20_Text"><text:span text:style-name="T27">if</text:span></text:span><text:span text:style-name="Source_20_Text"><text:span text:style-name="T23"> (word </text:span></text:span><text:span text:style-name="Source_20_Text"><text:span text:style-name="T27">==</text:span></text:span><text:span text:style-name="Source_20_Text"><text:span text:style-name="T38"> "AVG"</text:span></text:span><text:span text:style-name="Source_20_Text"><text:span text:style-name="T23">) <text:s text:c="2"/>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</text:span></text:span><text:span text:style-name="Source_20_Text"><text:span text:style-name="T23"> SelectItem::Kind::Avg;</text:span></text:span></text:p>
      <text:p text:style-name="P15"/>
      <text:p text:style-name="P14"><text:span text:style-name="Source_20_Text"><text:span text:style-name="T33"><text:s text:c="4"/></text:span></text:span><text:span text:style-name="Source_20_Text"><text:span text:style-name="T31">lexer</text:span></text:span><text:span text:style-name="Source_20_Text"><text:span text:style-name="T23">.</text:span></text:span><text:span text:style-name="Source_20_Text"><text:span text:style-name="T35">expect</text:span></text:span><text:span text:style-name="Source_20_Text"><text:span text:style-name="T23">(</text:span></text:span><text:span text:style-name="Source_20_Text"><text:span text:style-name="T38">"("</text:span></text:span><text:span text:style-name="Source_20_Text"><text:span text:style-name="T23">);</text:span></text:span></text:p>
      <text:p text:style-name="P15"/>
      <text:p text:style-name="P14"><text:span text:style-name="Source_20_Text"><text:span text:style-name="T29"><text:s text:c="4"/></text:span></text:span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=</text:span></text:span><text:span text:style-name="Source_20_Text"><text:span text:style-name="T23"> SelectItem::Kind::Count </text:span></text:span><text:span text:style-name="Source_20_Text"><text:span text:style-name="T27">&amp;&amp;</text:span></text:span><text:span text:style-name="Source_20_Text"><text:span text:style-name="T31"> lexer</text:span></text:span><text:span text:style-name="Source_20_Text"><text:span text:style-name="T23">.</text:span></text:span><text:span text:style-name="Source_20_Text"><text:span text:style-name="T35">consumeIf</text:span></text:span><text:span text:style-name="Source_20_Text"><text:span text:style-name="T23">(</text:span></text:span><text:span text:style-name="Source_20_Text"><text:span text:style-name="T38">"*"</text:span></text:span><text:span text:style-name="Source_20_Text"><text:span text:style-name="T23">))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33"><text:s text:c="8"/>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countStar</text:span></text:span><text:span text:style-name="Source_20_Text"><text:span text:style-name="T27"> =</text:span></text:span><text:span text:style-name="Source_20_Text"><text:span text:style-name="T45"> true</text:span></text:span><text:span text:style-name="Source_20_Text"><text:span text:style-name="T23">;</text:span></text:span><text:span text:style-name="Source_20_Text"><text:span text:style-name="T42"> <text:s text:c="10"/></text:span></text:span><text:span text:style-name="Source_20_Text"><text:span text:style-name="T40">// COUNT(*)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4"><text:span text:style-name="Source_20_Text"><text:span text:style-name="T29"><text:s text:c="4"/></text:span></text:span><text:span text:style-name="Source_20_Text"><text:span text:style-name="T27">else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33"><text:s text:c="8"/>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columnName</text:span></text:span><text:span text:style-name="Source_20_Text"><text:span text:style-name="T27"> =</text:span></text:span><text:span text:style-name="Source_20_Text"><text:span text:style-name="T35"> parseIdentifier</text:span></text:span><text:span text:style-name="Source_20_Text"><text:span text:style-name="T23">(lexer);</text:span></text:span><text:span text:style-name="Source_20_Text"><text:span text:style-name="T42"> <text:s/></text:span></text:span><text:span text:style-name="Source_20_Text"><text:span text:style-name="T40">// COUNT(age), SUM(price) и т.д.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5"/>
      <text:p text:style-name="P14"><text:span text:style-name="Source_20_Text"><text:span text:style-name="T33"><text:s text:c="4"/></text:span></text:span><text:span text:style-name="Source_20_Text"><text:span text:style-name="T31">lexer</text:span></text:span><text:span text:style-name="Source_20_Text"><text:span text:style-name="T23">.</text:span></text:span><text:span text:style-name="Source_20_Text"><text:span text:style-name="T35">expect</text:span></text:span><text:span text:style-name="Source_20_Text"><text:span text:style-name="T23">(</text:span></text:span><text:span text:style-name="Source_20_Text"><text:span text:style-name="T38">")"</text:span></text:span><text:span text:style-name="Source_20_Text"><text:span text:style-name="T23">);</text:span></text:span></text:p>
      <text:p text:style-name="P14"><text:span text:style-name="Source_20_Text"><text:span text:style-name="T23">}</text:span></text:span></text:p>
      <text:p text:style-name="P31"><text:span text:style-name="Strong_20_Emphasis">Поддерживаемые варианты:</text:span></text:p>
      <text:list text:style-name="L115">
        <text:list-item>
          <text:p text:style-name="P137">COUNT(*) </text:p>
        </text:list-item>
        <text:list-item>
          <text:p text:style-name="P137">COUNT(column) </text:p>
        </text:list-item>
        <text:list-item>
          <text:p text:style-name="P137">SUM(column) </text:p>
        </text:list-item>
        <text:list-item>
          <text:p text:style-name="P138">AVG(column) </text:p>
        </text:list-item>
      </text:list>
      <text:p text:style-name="P31">Также поддерживается AS alias после агрегата.</text:p>
      <text:p text:style-name="P13"/>
      <text:h text:style-name="P10" text:outline-level="3">2. Основная логика выполнения агрегатов</text:h>
      <text:p text:style-name="P31"><text:span text:style-name="Strong_20_Emphasis">Файл:</text:span> table.cpp</text:p>
      <text:p text:style-name="P31"><text:span text:style-name="Strong_20_Emphasis">Функция:</text:span> Table::selectRows(...) (строки ~1400+)</text:p>
      <text:p text:style-name="P31"><text:span text:style-name="Strong_20_Emphasis">Ключевой момент — определение типа SELECT:</text:span></text:p>
      <text:p text:style-name="P32">C++</text:p>
      <text:p text:style-name="P14"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27">!</text:span></text:span><text:span text:style-name="Source_20_Text"><text:span text:style-name="T23">selectAll </text:span></text:span><text:span text:style-name="Source_20_Text"><text:span text:style-name="T27">&amp;&amp;</text:span></text:span><text:span text:style-name="Source_20_Text"><text:span text:style-name="T35"> itemsContainAggregates</text:span></text:span><text:span text:style-name="Source_20_Text"><text:span text:style-name="T23">(items))</text:span></text:span></text:p>
      <text:p text:style-name="P14"><text:span text:style-name="Source_20_Text"><text:span text:style-name="T23">{</text:span></text:span></text:p>
      <text:p text:style-name="P14"><text:span text:style-name="Source_20_Text"><text:span text:style-name="T33"><text:s text:c="4"/></text:span></text:span><text:span text:style-name="Source_20_Text"><text:span text:style-name="T31">result</text:span></text:span><text:span text:style-name="Source_20_Text"><text:span text:style-name="T23">.</text:span></text:span><text:span text:style-name="Source_20_Text"><text:span text:style-name="T31">json</text:span></text:span><text:span text:style-name="Source_20_Text"><text:span text:style-name="T27"> =</text:span></text:span><text:span text:style-name="Source_20_Text"><text:span text:style-name="T35"> makeAggregateJson</text:span></text:span><text:span text:style-name="Source_20_Text"><text:span text:style-name="T23">(rows, items);</text:span></text:span><text:span text:style-name="Source_20_Text"><text:span text:style-name="T42"> <text:s text:c="2"/></text:span></text:span><text:span text:style-name="Source_20_Text"><text:span text:style-name="T40">// ← агрегатный путь</text:span></text:span></text:p>
      <text:p text:style-name="P14"><text:span text:style-name="Source_20_Text"><text:span text:style-name="T23">}</text:span></text:span></text:p>
      <text:p text:style-name="P14"><text:span text:style-name="Source_20_Text"><text:span text:style-name="T27">else</text:span></text:span></text:p>
      <text:p text:style-name="P14"><text:soft-page-break/><text:span text:style-name="Source_20_Text"><text:span text:style-name="T23">{</text:span></text:span></text:p>
      <text:p text:style-name="P14"><text:span text:style-name="Source_20_Text"><text:span text:style-name="T33"><text:s text:c="4"/></text:span></text:span><text:span text:style-name="Source_20_Text"><text:span text:style-name="T31">result</text:span></text:span><text:span text:style-name="Source_20_Text"><text:span text:style-name="T23">.</text:span></text:span><text:span text:style-name="Source_20_Text"><text:span text:style-name="T31">json</text:span></text:span><text:span text:style-name="Source_20_Text"><text:span text:style-name="T27"> =</text:span></text:span><text:span text:style-name="Source_20_Text"><text:span text:style-name="T35"> makeRegularJson</text:span></text:span><text:span text:style-name="Source_20_Text"><text:span text:style-name="T23">(...);</text:span></text:span><text:span text:style-name="Source_20_Text"><text:span text:style-name="T42"> <text:s text:c="12"/></text:span></text:span><text:span text:style-name="Source_20_Text"><text:span text:style-name="T40">// обычный SELECT</text:span></text:span></text:p>
      <text:p text:style-name="P14"><text:span text:style-name="Source_20_Text"><text:span text:style-name="T23">}</text:span></text:span></text:p>
      <text:p text:style-name="P13"/>
      <text:h text:style-name="P10" text:outline-level="3">3. Вычисление агрегатных функций</text:h>
      <text:p text:style-name="P31"><text:span text:style-name="Strong_20_Emphasis">Файл:</text:span> table.cpp</text:p>
      <text:p text:style-name="P31"><text:span text:style-name="Strong_20_Emphasis">Функция:</text:span> Table::makeAggregateJson(const std::vector&lt;Row&gt;&amp; rows, const std::vector&lt;SelectItem&gt;&amp; items) (строки <text:span text:style-name="Strong_20_Emphasis">1335–1395</text:span>)</text:p>
      <text:p text:style-name="P31"><text:span text:style-name="Strong_20_Emphasis">Подробная реализация:</text:span></text:p>
      <text:h text:style-name="P11" text:outline-level="4">COUNT</text:h>
      <text:p text:style-name="P32">C++</text:p>
      <text:p text:style-name="P14"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=</text:span></text:span><text:span text:style-name="Source_20_Text"><text:span text:style-name="T23"> SelectItem::Kind::Count)</text:span></text:span></text:p>
      <text:p text:style-name="P14"><text:span text:style-name="Source_20_Text"><text:span text:style-name="T23">{</text:span></text:span></text:p>
      <text:p text:style-name="P14"><text:span text:style-name="Source_20_Text"><text:span text:style-name="T29"><text:s text:c="4"/></text:span></text:span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countStar</text:span></text:span><text:span text:style-name="Source_20_Text"><text:span text:style-name="T23">)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33"><text:s text:c="8"/></text:span></text:span><text:span text:style-name="Source_20_Text"><text:span text:style-name="T31">object</text:span></text:span><text:span text:style-name="Source_20_Text"><text:span text:style-name="T23">[name] </text:span></text:span><text:span text:style-name="Source_20_Text"><text:span text:style-name="T27">=</text:span></text:span><text:span text:style-name="Source_20_Text"><text:span text:style-name="T35"> makeInt</text:span></text:span><text:span text:style-name="Source_20_Text"><text:span text:style-name="T23">(</text:span></text:span><text:span text:style-name="Source_20_Text"><text:span text:style-name="T27">static_cast&lt;</text:span></text:span><text:span text:style-name="Source_20_Text"><text:span text:style-name="T47">int</text:span></text:span><text:span text:style-name="Source_20_Text"><text:span text:style-name="T27">&gt;</text:span></text:span><text:span text:style-name="Source_20_Text"><text:span text:style-name="T23">(</text:span></text:span><text:span text:style-name="Source_20_Text"><text:span text:style-name="T31">rows</text:span></text:span><text:span text:style-name="Source_20_Text"><text:span text:style-name="T23">.</text:span></text:span><text:span text:style-name="Source_20_Text"><text:span text:style-name="T35">size</text:span></text:span><text:span text:style-name="Source_20_Text"><text:span text:style-name="T23">()));</text:span></text:span><text:span text:style-name="Source_20_Text"><text:span text:style-name="T42"> <text:s/></text:span></text:span><text:span text:style-name="Source_20_Text"><text:span text:style-name="T40">// COUNT(*)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4"><text:span text:style-name="Source_20_Text"><text:span text:style-name="T29"><text:s text:c="4"/></text:span></text:span><text:span text:style-name="Source_20_Text"><text:span text:style-name="T27">else</text:span></text:span></text:p>
      <text:p text:style-name="P14"><text:span text:style-name="Source_20_Text"><text:span text:style-name="T25"><text:s text:c="4"/></text:span></text:span><text:span text:style-name="Source_20_Text"><text:span text:style-name="T23">{</text:span></text:span></text:p>
      <text:p text:style-name="P14"><text:span text:style-name="Source_20_Text"><text:span text:style-name="T44"><text:s text:c="8"/></text:span></text:span><text:span text:style-name="Source_20_Text"><text:span text:style-name="T40">// COUNT(column) — считаем только НЕ NULL значения</text:span></text:span></text:p>
      <text:p text:style-name="P14"><text:span text:style-name="Source_20_Text"><text:span text:style-name="T49"><text:s text:c="8"/></text:span></text:span><text:span text:style-name="Source_20_Text"><text:span text:style-name="T47">int</text:span></text:span><text:span text:style-name="Source_20_Text"><text:span text:style-name="T23"> count </text:span></text:span><text:span text:style-name="Source_20_Text"><text:span text:style-name="T27">=</text:span></text:span><text:span text:style-name="Source_20_Text"><text:span text:style-name="T45"> 0</text:span></text:span><text:span text:style-name="Source_20_Text"><text:span text:style-name="T23">;</text:span></text:span></text:p>
      <text:p text:style-name="P14"><text:span text:style-name="Source_20_Text"><text:span text:style-name="T29"><text:s text:c="8"/></text:span></text:span><text:span text:style-name="Source_20_Text"><text:span text:style-name="T27">for</text:span></text:span><text:span text:style-name="Source_20_Text"><text:span text:style-name="T23"> (</text:span></text:span><text:span text:style-name="Source_20_Text"><text:span text:style-name="T47">auto</text:span></text:span><text:span text:style-name="Source_20_Text"><text:span text:style-name="T27">&amp;</text:span></text:span><text:span text:style-name="Source_20_Text"><text:span text:style-name="T23"> row : rows)</text:span></text:span></text:p>
      <text:p text:style-name="P14"><text:span text:style-name="Source_20_Text"><text:span text:style-name="T29"><text:s text:c="12"/></text:span></text:span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row</text:span></text:span><text:span text:style-name="Source_20_Text"><text:span text:style-name="T23">[columnIndex].</text:span></text:span><text:span text:style-name="Source_20_Text"><text:span text:style-name="T31">type</text:span></text:span><text:span text:style-name="Source_20_Text"><text:span text:style-name="T27"> !=</text:span></text:span><text:span text:style-name="Source_20_Text"><text:span text:style-name="T23"> ValueType::Null)</text:span></text:span></text:p>
      <text:p text:style-name="P14"><text:span text:style-name="Source_20_Text"><text:span text:style-name="T29"><text:s text:c="16"/></text:span></text:span><text:span text:style-name="Source_20_Text"><text:span text:style-name="T27">++</text:span></text:span><text:span text:style-name="Source_20_Text"><text:span text:style-name="T23">count;</text:span></text:span></text:p>
      <text:p text:style-name="P14"><text:span text:style-name="Source_20_Text"><text:span text:style-name="T33"><text:s text:c="8"/></text:span></text:span><text:span text:style-name="Source_20_Text"><text:span text:style-name="T31">object</text:span></text:span><text:span text:style-name="Source_20_Text"><text:span text:style-name="T23">[name] </text:span></text:span><text:span text:style-name="Source_20_Text"><text:span text:style-name="T27">=</text:span></text:span><text:span text:style-name="Source_20_Text"><text:span text:style-name="T35"> makeInt</text:span></text:span><text:span text:style-name="Source_20_Text"><text:span text:style-name="T23">(count);</text:span></text:span></text:p>
      <text:p text:style-name="P14"><text:span text:style-name="Source_20_Text"><text:span text:style-name="T25"><text:s text:c="4"/></text:span></text:span><text:span text:style-name="Source_20_Text"><text:span text:style-name="T23">}</text:span></text:span></text:p>
      <text:p text:style-name="P14"><text:span text:style-name="Source_20_Text"><text:span text:style-name="T23">}</text:span></text:span></text:p>
      <text:h text:style-name="P11" text:outline-level="4">SUM</text:h>
      <text:p text:style-name="P32">C++</text:p>
      <text:p text:style-name="P14"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=</text:span></text:span><text:span text:style-name="Source_20_Text"><text:span text:style-name="T23"> SelectItem::Kind::Sum)</text:span></text:span></text:p>
      <text:p text:style-name="P14"><text:span text:style-name="Source_20_Text"><text:span text:style-name="T23">{</text:span></text:span></text:p>
      <text:p text:style-name="P14"><text:span text:style-name="Source_20_Text"><text:span text:style-name="T49"><text:s text:c="4"/></text:span></text:span><text:span text:style-name="Source_20_Text"><text:span text:style-name="T47">int</text:span></text:span><text:span text:style-name="Source_20_Text"><text:span text:style-name="T23"> sum </text:span></text:span><text:span text:style-name="Source_20_Text"><text:span text:style-name="T27">=</text:span></text:span><text:span text:style-name="Source_20_Text"><text:span text:style-name="T45"> 0</text:span></text:span><text:span text:style-name="Source_20_Text"><text:span text:style-name="T23">;</text:span></text:span></text:p>
      <text:p text:style-name="P14"><text:span text:style-name="Source_20_Text"><text:span text:style-name="T29"><text:s text:c="4"/></text:span></text:span><text:span text:style-name="Source_20_Text"><text:span text:style-name="T27">for</text:span></text:span><text:span text:style-name="Source_20_Text"><text:span text:style-name="T23"> (</text:span></text:span><text:span text:style-name="Source_20_Text"><text:span text:style-name="T47">auto</text:span></text:span><text:span text:style-name="Source_20_Text"><text:span text:style-name="T27">&amp;</text:span></text:span><text:span text:style-name="Source_20_Text"><text:span text:style-name="T23"> row : rows)</text:span></text:span></text:p>
      <text:p text:style-name="P14"><text:span text:style-name="Source_20_Text"><text:span text:style-name="T29"><text:s text:c="8"/></text:span></text:span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row</text:span></text:span><text:span text:style-name="Source_20_Text"><text:span text:style-name="T23">[columnIndex].</text:span></text:span><text:span text:style-name="Source_20_Text"><text:span text:style-name="T31">type</text:span></text:span><text:span text:style-name="Source_20_Text"><text:span text:style-name="T27"> ==</text:span></text:span><text:span text:style-name="Source_20_Text"><text:span text:style-name="T23"> ValueType::Int)</text:span></text:span></text:p>
      <text:p text:style-name="P14"><text:span text:style-name="Source_20_Text"><text:span text:style-name="T25"><text:s text:c="12"/></text:span></text:span><text:span text:style-name="Source_20_Text"><text:span text:style-name="T23">sum </text:span></text:span><text:span text:style-name="Source_20_Text"><text:span text:style-name="T27">+=</text:span></text:span><text:span text:style-name="Source_20_Text"><text:span text:style-name="T31"> row</text:span></text:span><text:span text:style-name="Source_20_Text"><text:span text:style-name="T23">[columnIndex].</text:span></text:span><text:span text:style-name="Source_20_Text"><text:span text:style-name="T31">intValue</text:span></text:span><text:span text:style-name="Source_20_Text"><text:span text:style-name="T23">;</text:span></text:span></text:p>
      <text:p text:style-name="P15"/>
      <text:p text:style-name="P14"><text:soft-page-break/><text:span text:style-name="Source_20_Text"><text:span text:style-name="T33"><text:s text:c="4"/></text:span></text:span><text:span text:style-name="Source_20_Text"><text:span text:style-name="T31">object</text:span></text:span><text:span text:style-name="Source_20_Text"><text:span text:style-name="T23">[name] </text:span></text:span><text:span text:style-name="Source_20_Text"><text:span text:style-name="T27">=</text:span></text:span><text:span text:style-name="Source_20_Text"><text:span text:style-name="T35"> makeInt</text:span></text:span><text:span text:style-name="Source_20_Text"><text:span text:style-name="T23">(sum);</text:span></text:span></text:p>
      <text:p text:style-name="P14"><text:span text:style-name="Source_20_Text"><text:span text:style-name="T23">}</text:span></text:span></text:p>
      <text:h text:style-name="P11" text:outline-level="4">AVG</text:h>
      <text:p text:style-name="P32">C++</text:p>
      <text:p text:style-name="P14"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item</text:span></text:span><text:span text:style-name="Source_20_Text"><text:span text:style-name="T23">.</text:span></text:span><text:span text:style-name="Source_20_Text"><text:span text:style-name="T31">kind</text:span></text:span><text:span text:style-name="Source_20_Text"><text:span text:style-name="T27"> ==</text:span></text:span><text:span text:style-name="Source_20_Text"><text:span text:style-name="T23"> SelectItem::Kind::Avg)</text:span></text:span></text:p>
      <text:p text:style-name="P14"><text:span text:style-name="Source_20_Text"><text:span text:style-name="T23">{</text:span></text:span></text:p>
      <text:p text:style-name="P14"><text:span text:style-name="Source_20_Text"><text:span text:style-name="T49"><text:s text:c="4"/></text:span></text:span><text:span text:style-name="Source_20_Text"><text:span text:style-name="T47">int</text:span></text:span><text:span text:style-name="Source_20_Text"><text:span text:style-name="T23"> sum </text:span></text:span><text:span text:style-name="Source_20_Text"><text:span text:style-name="T27">=</text:span></text:span><text:span text:style-name="Source_20_Text"><text:span text:style-name="T45"> 0</text:span></text:span><text:span text:style-name="Source_20_Text"><text:span text:style-name="T23">;</text:span></text:span></text:p>
      <text:p text:style-name="P14"><text:span text:style-name="Source_20_Text"><text:span text:style-name="T49"><text:s text:c="4"/></text:span></text:span><text:span text:style-name="Source_20_Text"><text:span text:style-name="T47">int</text:span></text:span><text:span text:style-name="Source_20_Text"><text:span text:style-name="T23"> count </text:span></text:span><text:span text:style-name="Source_20_Text"><text:span text:style-name="T27">=</text:span></text:span><text:span text:style-name="Source_20_Text"><text:span text:style-name="T45"> 0</text:span></text:span><text:span text:style-name="Source_20_Text"><text:span text:style-name="T23">;</text:span></text:span></text:p>
      <text:p text:style-name="P14"><text:span text:style-name="Source_20_Text"><text:span text:style-name="T29"><text:s text:c="4"/></text:span></text:span><text:span text:style-name="Source_20_Text"><text:span text:style-name="T27">for</text:span></text:span><text:span text:style-name="Source_20_Text"><text:span text:style-name="T23"> (</text:span></text:span><text:span text:style-name="Source_20_Text"><text:span text:style-name="T47">auto</text:span></text:span><text:span text:style-name="Source_20_Text"><text:span text:style-name="T27">&amp;</text:span></text:span><text:span text:style-name="Source_20_Text"><text:span text:style-name="T23"> row : rows)</text:span></text:span></text:p>
      <text:p text:style-name="P14"><text:span text:style-name="Source_20_Text"><text:span text:style-name="T29"><text:s text:c="8"/></text:span></text:span><text:span text:style-name="Source_20_Text"><text:span text:style-name="T27">if</text:span></text:span><text:span text:style-name="Source_20_Text"><text:span text:style-name="T23"> (</text:span></text:span><text:span text:style-name="Source_20_Text"><text:span text:style-name="T31">row</text:span></text:span><text:span text:style-name="Source_20_Text"><text:span text:style-name="T23">[columnIndex].</text:span></text:span><text:span text:style-name="Source_20_Text"><text:span text:style-name="T31">type</text:span></text:span><text:span text:style-name="Source_20_Text"><text:span text:style-name="T27"> ==</text:span></text:span><text:span text:style-name="Source_20_Text"><text:span text:style-name="T23"> ValueType::Int)</text:span></text:span></text:p>
      <text:p text:style-name="P14"><text:span text:style-name="Source_20_Text"><text:span text:style-name="T25"><text:s text:c="8"/></text:span></text:span><text:span text:style-name="Source_20_Text"><text:span text:style-name="T23">{</text:span></text:span></text:p>
      <text:p text:style-name="P14"><text:span text:style-name="Source_20_Text"><text:span text:style-name="T25"><text:s text:c="12"/></text:span></text:span><text:span text:style-name="Source_20_Text"><text:span text:style-name="T23">sum </text:span></text:span><text:span text:style-name="Source_20_Text"><text:span text:style-name="T27">+=</text:span></text:span><text:span text:style-name="Source_20_Text"><text:span text:style-name="T31"> row</text:span></text:span><text:span text:style-name="Source_20_Text"><text:span text:style-name="T23">[columnIndex].</text:span></text:span><text:span text:style-name="Source_20_Text"><text:span text:style-name="T31">intValue</text:span></text:span><text:span text:style-name="Source_20_Text"><text:span text:style-name="T23">;</text:span></text:span></text:p>
      <text:p text:style-name="P14"><text:span text:style-name="Source_20_Text"><text:span text:style-name="T29"><text:s text:c="12"/></text:span></text:span><text:span text:style-name="Source_20_Text"><text:span text:style-name="T27">++</text:span></text:span><text:span text:style-name="Source_20_Text"><text:span text:style-name="T23">count;</text:span></text:span></text:p>
      <text:p text:style-name="P14"><text:span text:style-name="Source_20_Text"><text:span text:style-name="T25"><text:s text:c="8"/></text:span></text:span><text:span text:style-name="Source_20_Text"><text:span text:style-name="T23">}</text:span></text:span></text:p>
      <text:p text:style-name="P15"/>
      <text:p text:style-name="P14"><text:span text:style-name="Source_20_Text"><text:span text:style-name="T29"><text:s text:c="4"/></text:span></text:span><text:span text:style-name="Source_20_Text"><text:span text:style-name="T27">if</text:span></text:span><text:span text:style-name="Source_20_Text"><text:span text:style-name="T23"> (count </text:span></text:span><text:span text:style-name="Source_20_Text"><text:span text:style-name="T27">==</text:span></text:span><text:span text:style-name="Source_20_Text"><text:span text:style-name="T45"> 0</text:span></text:span><text:span text:style-name="Source_20_Text"><text:span text:style-name="T23">)</text:span></text:span></text:p>
      <text:p text:style-name="P14"><text:span text:style-name="Source_20_Text"><text:span text:style-name="T33"><text:s text:c="8"/></text:span></text:span><text:span text:style-name="Source_20_Text"><text:span text:style-name="T31">object</text:span></text:span><text:span text:style-name="Source_20_Text"><text:span text:style-name="T23">[name] </text:span></text:span><text:span text:style-name="Source_20_Text"><text:span text:style-name="T27">=</text:span></text:span><text:span text:style-name="Source_20_Text"><text:span text:style-name="T35"> makeNull</text:span></text:span><text:span text:style-name="Source_20_Text"><text:span text:style-name="T23">();</text:span></text:span></text:p>
      <text:p text:style-name="P14"><text:span text:style-name="Source_20_Text"><text:span text:style-name="T29"><text:s text:c="4"/></text:span></text:span><text:span text:style-name="Source_20_Text"><text:span text:style-name="T27">else</text:span></text:span></text:p>
      <text:p text:style-name="P14"><text:span text:style-name="Source_20_Text"><text:span text:style-name="T33"><text:s text:c="8"/></text:span></text:span><text:span text:style-name="Source_20_Text"><text:span text:style-name="T31">object</text:span></text:span><text:span text:style-name="Source_20_Text"><text:span text:style-name="T23">[name] </text:span></text:span><text:span text:style-name="Source_20_Text"><text:span text:style-name="T27">=</text:span></text:span><text:span text:style-name="Source_20_Text"><text:span text:style-name="T35"> makeInt</text:span></text:span><text:span text:style-name="Source_20_Text"><text:span text:style-name="T23">(sum </text:span></text:span><text:span text:style-name="Source_20_Text"><text:span text:style-name="T27">/</text:span></text:span><text:span text:style-name="Source_20_Text"><text:span text:style-name="T23"> count);</text:span></text:span><text:span text:style-name="Source_20_Text"><text:span text:style-name="T42"> <text:s text:c="2"/></text:span></text:span><text:span text:style-name="Source_20_Text"><text:span text:style-name="T40">// целочисленное деление</text:span></text:span></text:p>
      <text:p text:style-name="P14"><text:span text:style-name="Source_20_Text"><text:span text:style-name="T23">}</text:span></text:span></text:p>
      <text:p text:style-name="P13"/>
      <text:h text:style-name="P10" text:outline-level="3">4. Вспомогательные функции</text:h>
      <text:list text:style-name="L116">
        <text:list-item>
          <text:p text:style-name="P139"><text:span text:style-name="Strong_20_Emphasis">itemsContainAggregates()</text:span> (строки ~1305–1315) — проверяет, есть ли в SELECT хотя бы одна агрегатная функция. </text:p>
        </text:list-item>
        <text:list-item>
          <text:p text:style-name="P140"><text:span text:style-name="Strong_20_Emphasis">defaultAggregateName()</text:span> (строки ~1320–1330) — формирует имя колонки в результате (например, SUM(price) или COUNT(*)), если не задан AS. </text:p>
        </text:list-item>
      </text:list>
      <text:p text:style-name="P13"/>
      <text:h text:style-name="P10" text:outline-level="3">5. Ограничения текущей реализации</text:h>
      <text:list text:style-name="L117">
        <text:list-item>
          <text:p text:style-name="P141">Агрегатные функции <text:span text:style-name="Strong_20_Emphasis">нельзя</text:span> смешивать с обычными столбцами в одном SELECT (например, SELECT name, COUNT(*) — не поддерживается). </text:p>
        </text:list-item>
        <text:list-item>
          <text:p text:style-name="P141">Поддерживаются <text:span text:style-name="Strong_20_Emphasis">только</text:span> INT столбцы для SUM и AVG. </text:p>
        </text:list-item>
        <text:list-item>
          <text:p text:style-name="P141">AVG использует <text:span text:style-name="Strong_20_Emphasis">целочисленное</text:span> деление. </text:p>
        </text:list-item>
        <text:list-item>
          <text:p text:style-name="P141">COUNT(column) игнорирует NULL значения. </text:p>
        </text:list-item>
        <text:list-item>
          <text:p text:style-name="P142">COUNT(*) считает все строки (включая те, где все значения NULL). </text:p>
        </text:list-item>
      </text:list>
      <text:p text:style-name="P13"/>
      <text:h text:style-name="P10" text:outline-level="3">Итоговая схема работы</text:h>
      <text:p text:style-name="P32">text</text:p>
      <text:p text:style-name="P14"><text:soft-page-break/><text:span text:style-name="Source_20_Text"><text:span text:style-name="T23">SELECT SUM(price), AVG(age) FROM orders WHERE status = "active"</text:span></text:span></text:p>
      <text:p text:style-name="P15"><text:span text:style-name="Source_20_Text"><text:span text:style-name="T25"><text:s text:c="4"/>↓</text:span></text:span></text:p>
      <text:p text:style-name="P15"><text:span text:style-name="Source_20_Text"><text:span text:style-name="T23">Parser::parseSelect() → SelectCommand с items вида Kind::Sum, Kind::Avg</text:span></text:span></text:p>
      <text:p text:style-name="P15"><text:span text:style-name="Source_20_Text"><text:span text:style-name="T25"><text:s text:c="4"/>↓</text:span></text:span></text:p>
      <text:p text:style-name="P15"><text:span text:style-name="Source_20_Text"><text:span text:style-name="T23">DBMS::executeSelect()</text:span></text:span></text:p>
      <text:p text:style-name="P15"><text:span text:style-name="Source_20_Text"><text:span text:style-name="T25"><text:s text:c="4"/>↓</text:span></text:span></text:p>
      <text:p text:style-name="P15"><text:span text:style-name="Source_20_Text"><text:span text:style-name="T23">Table::selectRows()</text:span></text:span></text:p>
      <text:p text:style-name="P15"><text:span text:style-name="Source_20_Text"><text:span text:style-name="T25"><text:s text:c="4"/>↓</text:span></text:span></text:p>
      <text:p text:style-name="P15"><text:span text:style-name="Source_20_Text"><text:span text:style-name="T23">makeAggregateJson() → вычисление по всем отфильтрованным строкам</text:span></text:span></text:p>
      <text:p text:style-name="P15"><text:span text:style-name="Source_20_Text"><text:span text:style-name="T25"><text:s text:c="4"/>↓</text:span></text:span></text:p>
      <text:p text:style-name="P15"><text:span text:style-name="Source_20_Text"><text:span text:style-name="T23">JSON-ответ</text:span></text:span></text:p>
      <text:p text:style-name="P31"><text:span text:style-name="Strong_20_Emphasis">Главный файл реализации агрегатных функций — table.cpp.</text:span><text:line-break/>Ключевые функции:</text:p>
      <text:list text:style-name="L118">
        <text:list-item>
          <text:p text:style-name="P143">Parser::parseSelectItem() — парсинг </text:p>
        </text:list-item>
        <text:list-item>
          <text:p text:style-name="P143">Table::makeAggregateJson() — <text:span text:style-name="Strong_20_Emphasis">вычисление</text:span> </text:p>
        </text:list-item>
        <text:list-item>
          <text:p text:style-name="P144">Table::selectRows() — диспетчеризация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78cm" style:type="center"/>
          <style:tab-stop style:position="17.75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78cm" style:type="center"/>
          <style:tab-stop style:position="17.755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" style:display-name="ListLabel 19" style:family="text">
      <style:text-properties fo:color="#212121" loext:opacity="100%" style:font-name="Trebuchet MS" fo:font-family="'Trebuchet MS'" style:font-family-generic="roman" style:font-pitch="variable" fo:font-size="10pt" fo:letter-spacing="-0.014cm" fo:language="ru" fo:country="RU" fo:font-style="normal" fo:font-weight="normal" style:font-name-asian="Trebuchet MS1" style:font-family-asian="'Trebuchet MS'" style:font-family-generic-asian="system" style:font-pitch-asian="variable" style:font-size-asian="10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0pt" style:language-complex="ar" style:country-complex="SA" style:font-style-complex="normal" style:font-weight-complex="normal" style:text-scale="86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1.423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2.969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4.52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6.08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7.64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9.20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76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317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3.8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03cm" fo:margin-bottom="0.982cm" fo:margin-left="2.044cm" fo:margin-right="1.2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61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27"/><text:page-number text:select-page="current">9</text:page-number><text:s/>/ <text:page-count>27</text:page-count><text:bookmark-end text:name="PageNumWizard_FOOTER_Базовый27"/></text:p>
      </style:footer>
      <style:footer-left>
        <text:p text:style-name="MP1"><text:bookmark-start text:name="PageNumWizard_FOOTER_Базовый28"/><text:page-number text:select-page="current">10</text:page-number><text:s/>/ <text:page-count>27</text:page-count><text:bookmark-end text:name="PageNumWizard_FOOTER_Базовый28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23:01:13.113533707</meta:creation-date>
    <meta:print-date>2026-05-28T23:48:21.418471393</meta:print-date>
    <dc:date>2026-05-29T03:32:20.431492216</dc:date>
    <meta:editing-duration>PT3H40M17S</meta:editing-duration>
    <meta:editing-cycles>1</meta:editing-cycles>
    <meta:document-statistic meta:table-count="5" meta:image-count="1" meta:object-count="0" meta:page-count="27" meta:paragraph-count="850" meta:word-count="3731" meta:character-count="30575" meta:non-whitespace-character-count="26473"/>
    <meta:generator>LibreOffice/24.2.7.2$Linux_X86_64 LibreOffice_project/420$Build-2</meta:generator>
  </office:meta>
</office:document-meta>
</file>